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A0000004375E9E637.png" manifest:media-type="image/png"/>
  <manifest:file-entry manifest:full-path="Pictures/1000000000000398000005151BB3C087.png" manifest:media-type="image/png"/>
  <manifest:file-entry manifest:full-path="Pictures/100000000000058B000002D744B9A33C.png" manifest:media-type="image/png"/>
  <manifest:file-entry manifest:full-path="Pictures/10000001000001D60000011AF0F607A8.png" manifest:media-type="image/png"/>
  <manifest:file-entry manifest:full-path="Pictures/10000000000000D600000066A56B1D87.png" manifest:media-type="image/png"/>
  <manifest:file-entry manifest:full-path="Pictures/10000000000002EC000000F999B1DB5C.png" manifest:media-type="image/png"/>
  <manifest:file-entry manifest:full-path="Pictures/100000000000038400000230CE0D33C7.png" manifest:media-type="image/png"/>
  <manifest:file-entry manifest:full-path="Pictures/100000000000056B0000021A2AE39FD5.png" manifest:media-type="image/png"/>
  <manifest:file-entry manifest:full-path="Pictures/10000001000003AB0000019CA62D7F49.png" manifest:media-type="image/png"/>
  <manifest:file-entry manifest:full-path="Pictures/10000000000004BC000003C68FAF1FA9.png" manifest:media-type="image/png"/>
  <manifest:file-entry manifest:full-path="Pictures/100000000000040D0000029B0F7472CE.png" manifest:media-type="image/png"/>
  <manifest:file-entry manifest:full-path="Pictures/10000000000002A00000010EA319C734.png" manifest:media-type="image/png"/>
  <manifest:file-entry manifest:full-path="Pictures/1000000000000256000001D04B058882.png" manifest:media-type="image/png"/>
  <manifest:file-entry manifest:full-path="Pictures/10000001000003EE000003A1AE679998.png" manifest:media-type="image/png"/>
  <manifest:file-entry manifest:full-path="Pictures/10000000000002F00000016DACB12D65.png" manifest:media-type="image/png"/>
  <manifest:file-entry manifest:full-path="Pictures/100000010000002B0000002E081B07BE.png" manifest:media-type="image/png"/>
  <manifest:file-entry manifest:full-path="Pictures/10000000000003140000025E47901519.png" manifest:media-type="image/png"/>
  <manifest:file-entry manifest:full-path="Pictures/100000000000011B000000E4F079B019.png" manifest:media-type="image/png"/>
  <manifest:file-entry manifest:full-path="Pictures/100000000000049D00000393F0993E54.png" manifest:media-type="image/png"/>
  <manifest:file-entry manifest:full-path="Pictures/100000000000046200000241D5C29588.png" manifest:media-type="image/png"/>
  <manifest:file-entry manifest:full-path="Pictures/1000000000000393000000E6A26884DC.png" manifest:media-type="image/png"/>
  <manifest:file-entry manifest:full-path="Pictures/1000000000000211000000FA34939168.png" manifest:media-type="image/png"/>
  <manifest:file-entry manifest:full-path="Pictures/1000000000000249000000C77F543DAE.png" manifest:media-type="image/png"/>
  <manifest:file-entry manifest:full-path="Pictures/100000000000002B0000010CAEC05A31.png" manifest:media-type="image/png"/>
  <manifest:file-entry manifest:full-path="Pictures/100000000000038A0000013D1E9D4908.png" manifest:media-type="image/png"/>
  <manifest:file-entry manifest:full-path="Pictures/10000000000005C0000002523334F2C9.png" manifest:media-type="image/png"/>
  <manifest:file-entry manifest:full-path="Pictures/10000000000005BF00000215027F1F75.png" manifest:media-type="image/png"/>
  <manifest:file-entry manifest:full-path="Pictures/10000000000005BF00000217893BC53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wiss"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Verdana" svg:font-family="Verdana" style:font-family-generic="swiss" style:font-pitch="variable"/>
    <style:font-face style:name="Wingdings" svg:font-family="Wingdings" style:font-family-generic="system" style:font-pitch="variable"/>
  </office:font-face-decls>
  <office:automatic-styles>
    <style:style style:name="P1" style:family="paragraph">
      <loext:graphic-properties draw:fill="none"/>
      <style:paragraph-properties fo:text-align="start"/>
      <style:text-properties fo:font-size="18pt"/>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Tahoma" fo:font-size="10pt" style:font-size-asian="10pt" style:font-size-complex="10pt"/>
    </style:style>
    <style:style style:name="P5" style:family="paragraph" style:parent-style-name="Standard">
      <style:paragraph-properties fo:text-align="start" style:justify-single-word="false"/>
      <style:text-properties style:font-name="Tahoma" fo:font-size="28pt" style:font-size-asian="28pt"/>
    </style:style>
    <style:style style:name="P6" style:family="paragraph">
      <loext:graphic-properties draw:fill="none"/>
      <style:paragraph-properties fo:text-align="start"/>
      <style:text-properties fo:font-size="12pt"/>
    </style:style>
    <style:style style:name="P7" style:family="paragraph" style:parent-style-name="Standard">
      <style:paragraph-properties fo:text-align="center" style:justify-single-word="false"/>
      <style:text-properties style:font-name="Tahoma" fo:font-size="28pt" fo:language="en" fo:country="US" style:font-size-asian="28pt"/>
    </style:style>
    <style:style style:name="P8" style:family="paragraph" style:parent-style-name="Standard">
      <style:paragraph-properties fo:text-align="center" style:justify-single-word="false"/>
      <style:text-properties style:font-name="Tahoma" fo:font-size="14pt" fo:language="en" fo:country="US" style:font-size-asian="14pt"/>
    </style:style>
    <style:style style:name="P9" style:family="paragraph" style:parent-style-name="Standard">
      <style:paragraph-properties fo:text-align="start" style:justify-single-word="false"/>
      <style:text-properties style:font-name="Tahoma" fo:font-size="14pt" fo:language="en" fo:country="US" style:font-size-asian="14pt"/>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paragraph-properties fo:text-align="start" style:justify-single-word="false"/>
    </style:style>
    <style:style style:name="P12" style:family="paragraph" style:parent-style-name="Standard">
      <style:paragraph-properties fo:margin-top="0cm" fo:margin-bottom="0cm" style:contextual-spacing="false"/>
    </style:style>
    <style:style style:name="P13" style:family="paragraph" style:parent-style-name="Standard" style:master-page-name="Converted1">
      <style:paragraph-properties fo:text-align="center" style:justify-single-word="false" style:page-number="1"/>
      <style:text-properties style:font-name="Tahoma" fo:font-size="14pt" style:font-size-asian="14pt"/>
    </style:style>
    <style:style style:name="P14" style:family="paragraph" style:parent-style-name="Standard">
      <style:paragraph-properties fo:text-align="center" style:justify-single-word="false"/>
      <style:text-properties style:font-name="Tahoma" fo:font-size="14pt" style:font-size-asian="14pt"/>
    </style:style>
    <style:style style:name="P15" style:family="paragraph" style:parent-style-name="Standard">
      <style:text-properties style:font-name-asian="F"/>
    </style:style>
    <style:style style:name="P16" style:family="paragraph" style:parent-style-name="Standard">
      <style:paragraph-properties fo:margin-top="0cm" fo:margin-bottom="0cm" style:contextual-spacing="false" fo:break-before="page"/>
    </style:style>
    <style:style style:name="P17" style:family="paragraph" style:parent-style-name="Mon_5f_texte" style:list-style-name="WWNum4">
      <style:paragraph-properties fo:margin-left="1.889cm" fo:margin-top="0.071cm" fo:margin-bottom="0.071cm" style:contextual-spacing="false" fo:text-indent="-0.63cm" style:auto-text-indent="false"/>
    </style:style>
    <style:style style:name="P18" style:family="paragraph" style:parent-style-name="Mon_5f_texte">
      <style:paragraph-properties fo:text-indent="0cm" style:auto-text-indent="false"/>
    </style:style>
    <style:style style:name="P19" style:family="paragraph" style:parent-style-name="Standard">
      <style:paragraph-properties fo:text-align="start" style:justify-single-word="false"/>
      <style:text-properties style:font-name-complex="Arial1"/>
    </style:style>
    <style:style style:name="P20" style:family="paragraph" style:parent-style-name="Mon_5f_texte">
      <style:paragraph-properties fo:margin-top="0cm" fo:margin-bottom="0.071cm" style:contextual-spacing="false" fo:text-indent="0cm" style:auto-text-indent="false" fo:break-before="page"/>
    </style:style>
    <style:style style:name="P21" style:family="paragraph" style:parent-style-name="Heading_20_2">
      <style:paragraph-properties fo:margin-left="1cm" fo:text-indent="-1cm" style:auto-text-indent="false"/>
    </style:style>
    <style:style style:name="P22" style:family="paragraph" style:parent-style-name="Standard">
      <style:text-properties fo:font-size="6pt" style:font-size-asian="6pt" style:font-size-complex="6pt"/>
    </style:style>
    <style:style style:name="P23" style:family="paragraph" style:parent-style-name="mon_5f_parag">
      <style:paragraph-properties fo:text-align="start" style:justify-single-word="false"/>
      <style:text-properties style:font-name="Times New Roman"/>
    </style:style>
    <style:style style:name="P24" style:family="paragraph" style:parent-style-name="mon_5f_parag">
      <style:paragraph-properties fo:text-align="start" style:justify-single-word="false"/>
    </style:style>
    <style:style style:name="P25" style:family="paragraph" style:parent-style-name="Mon_5f_texte">
      <style:paragraph-properties fo:text-indent="0cm" style:auto-text-indent="false"/>
      <style:text-properties fo:font-size="6pt" style:font-size-asian="6pt" style:font-size-complex="6pt"/>
    </style:style>
    <style:style style:name="P26" style:family="paragraph" style:parent-style-name="Mon_5f_texte">
      <style:text-properties fo:font-size="6pt" style:font-size-asian="6pt" style:font-size-complex="6pt"/>
    </style:style>
    <style:style style:name="P27" style:family="paragraph" style:parent-style-name="Mon_5f_texte">
      <style:paragraph-properties fo:text-align="start" style:justify-single-word="false"/>
    </style:style>
    <style:style style:name="P28" style:family="paragraph" style:parent-style-name="Mon_5f_texte">
      <style:text-properties fo:font-size="4pt" style:font-size-asian="4pt" style:font-size-complex="4pt"/>
    </style:style>
    <style:style style:name="P29" style:family="paragraph" style:parent-style-name="Réponse">
      <style:text-properties officeooo:rsid="0008517e" officeooo:paragraph-rsid="0008517e"/>
    </style:style>
    <style:style style:name="P30" style:family="paragraph" style:parent-style-name="Réponse">
      <style:text-properties officeooo:paragraph-rsid="0008517e"/>
    </style:style>
    <style:style style:name="P31" style:family="paragraph" style:parent-style-name="Standard">
      <style:text-properties officeooo:paragraph-rsid="000d2250"/>
    </style:style>
    <style:style style:name="P32" style:family="paragraph" style:parent-style-name="Mon_5f_texte" style:list-style-name="WWNum4">
      <style:paragraph-properties fo:margin-top="0.071cm" fo:margin-bottom="0.071cm" style:contextual-spacing="false"/>
    </style:style>
    <style:style style:name="P33" style:family="paragraph" style:parent-style-name="Réponse">
      <style:text-properties officeooo:rsid="000a176a" officeooo:paragraph-rsid="000a176a"/>
    </style:style>
    <style:style style:name="P34" style:family="paragraph" style:parent-style-name="Réponse">
      <style:text-properties officeooo:paragraph-rsid="000a176a"/>
    </style:style>
    <style:style style:name="P35" style:family="paragraph" style:parent-style-name="Réponse">
      <style:text-properties officeooo:rsid="0010dd06" officeooo:paragraph-rsid="0010dd06"/>
    </style:style>
    <style:style style:name="P36" style:family="paragraph" style:parent-style-name="Standard">
      <style:text-properties style:use-window-font-color="true" loext:opacity="0%" style:font-name="Lucida Console" fo:font-size="9pt" style:font-size-asian="9pt"/>
    </style:style>
    <style:style style:name="P37" style:family="paragraph" style:parent-style-name="Standard">
      <style:text-properties officeooo:rsid="0010dd06" officeooo:paragraph-rsid="0010dd06"/>
    </style:style>
    <style:style style:name="P38" style:family="paragraph" style:parent-style-name="Standard">
      <style:text-properties fo:color="#00a89a" loext:opacity="100%" style:font-name="Lucida Console" fo:font-size="9pt" style:font-size-asian="9pt"/>
    </style:style>
    <style:style style:name="P39" style:family="paragraph">
      <loext:graphic-properties draw:fill="none"/>
      <style:paragraph-properties fo:text-align="start"/>
    </style:style>
    <style:style style:name="P40" style:family="paragraph" style:parent-style-name="Mon_5f_texte">
      <style:paragraph-properties fo:text-indent="1.249cm" style:auto-text-indent="false"/>
    </style:style>
    <style:style style:name="P41" style:family="paragraph" style:parent-style-name="mon_5f_parag_5f_2">
      <style:paragraph-properties fo:margin-top="0cm" fo:margin-bottom="0cm" style:contextual-spacing="false" fo:padding-left="0.212cm" fo:padding-right="0.212cm" fo:padding-top="0.212cm" fo:padding-bottom="0cm" fo:border="0.74pt solid #000000"/>
    </style:style>
    <style:style style:name="P42" style:family="paragraph" style:parent-style-name="mon_5f_parag_5f_2">
      <style:paragraph-properties fo:margin-top="0cm" fo:margin-bottom="0cm" style:contextual-spacing="false" fo:padding-left="0.212cm" fo:padding-right="0.212cm" fo:padding-top="0.212cm" fo:padding-bottom="0cm" fo:border="0.74pt solid #000000"/>
      <style:text-properties style:font-name="Consolas" fo:font-size="10pt" style:font-size-asian="10pt" style:font-size-complex="10pt"/>
    </style:style>
    <style:style style:name="P43" style:family="paragraph" style:parent-style-name="mon_5f_parag_5f_2">
      <style:paragraph-properties fo:margin-top="0cm" fo:margin-bottom="0cm" style:contextual-spacing="false" fo:padding-left="0.212cm" fo:padding-right="0.212cm" fo:padding-top="0.212cm" fo:padding-bottom="0cm" fo:border="0.74pt solid #000000"/>
      <style:text-properties fo:color="#00b050" loext:opacity="100%" style:font-name="Consolas" fo:font-size="8pt" style:font-size-asian="8pt" style:font-size-complex="8pt"/>
    </style:style>
    <style:style style:name="P44" style:family="paragraph" style:parent-style-name="Réponse">
      <style:text-properties officeooo:paragraph-rsid="00129e0f"/>
    </style:style>
    <style:style style:name="P45" style:family="paragraph" style:parent-style-name="Standard">
      <style:text-properties style:use-window-font-color="true" loext:opacity="0%" style:font-name="Lucida Console" fo:font-size="9pt" fo:font-weight="normal" style:font-size-asian="9pt" style:font-weight-asian="normal"/>
    </style:style>
    <style:style style:name="P46" style:family="paragraph" style:parent-style-name="Réponse">
      <style:text-properties officeooo:rsid="00129e0f" officeooo:paragraph-rsid="00129e0f"/>
    </style:style>
    <style:style style:name="P47" style:family="paragraph" style:parent-style-name="Mon_5f_texte">
      <style:paragraph-properties fo:margin-top="0cm" fo:margin-bottom="0.176cm" style:contextual-spacing="false" fo:text-indent="0cm" style:auto-text-indent="false" fo:break-before="page"/>
    </style:style>
    <style:style style:name="P48" style:family="paragraph" style:parent-style-name="Réponse">
      <style:text-properties officeooo:paragraph-rsid="00134e00"/>
    </style:style>
    <style:style style:name="P49" style:family="paragraph" style:parent-style-name="Standard">
      <style:paragraph-properties fo:text-indent="0cm" style:auto-text-indent="false"/>
    </style:style>
    <style:style style:name="P50" style:family="paragraph" style:parent-style-name="Réponse">
      <style:text-properties officeooo:rsid="0014ebc6" officeooo:paragraph-rsid="0014ebc6"/>
    </style:style>
    <style:style style:name="P51" style:family="paragraph" style:parent-style-name="Réponse">
      <style:text-properties officeooo:paragraph-rsid="0014ebc6"/>
    </style:style>
    <style:style style:name="P52" style:family="paragraph" style:parent-style-name="Réponse">
      <style:text-properties officeooo:paragraph-rsid="0015b95b"/>
    </style:style>
    <style:style style:name="P53" style:family="paragraph" style:parent-style-name="Standard">
      <style:paragraph-properties fo:margin-left="0cm" fo:text-indent="0cm" style:auto-text-indent="false"/>
    </style:style>
    <style:style style:name="P54" style:family="paragraph" style:parent-style-name="Réponse">
      <style:text-properties officeooo:paragraph-rsid="0017b808"/>
    </style:style>
    <style:style style:name="P55" style:family="paragraph" style:parent-style-name="Standard">
      <style:text-properties officeooo:paragraph-rsid="0017b808"/>
    </style:style>
    <style:style style:name="P56" style:family="paragraph" style:parent-style-name="Standard">
      <style:text-properties fo:color="#d42c3a" loext:opacity="100%" style:font-name="Lucida Console" fo:font-size="9pt" style:font-size-asian="9pt"/>
    </style:style>
    <style:style style:name="P57" style:family="paragraph" style:parent-style-name="Mon_5f_texte">
      <style:paragraph-properties fo:text-indent="0cm" style:auto-text-indent="false"/>
      <style:text-properties officeooo:paragraph-rsid="00180f8c"/>
    </style:style>
    <style:style style:name="P58" style:family="paragraph" style:parent-style-name="Réponse">
      <style:text-properties officeooo:paragraph-rsid="00180f8c"/>
    </style:style>
    <style:style style:name="P59" style:family="paragraph" style:parent-style-name="Réponse">
      <style:text-properties officeooo:paragraph-rsid="00193417"/>
    </style:style>
    <style:style style:name="P60" style:family="paragraph" style:parent-style-name="Réponse">
      <style:text-properties officeooo:rsid="00193417" officeooo:paragraph-rsid="00193417"/>
    </style:style>
    <style:style style:name="P61" style:family="paragraph" style:parent-style-name="Réponse">
      <style:text-properties officeooo:rsid="001a997d" officeooo:paragraph-rsid="001a997d"/>
    </style:style>
    <style:style style:name="P62" style:family="paragraph" style:parent-style-name="Réponse">
      <style:text-properties officeooo:paragraph-rsid="001a997d"/>
    </style:style>
    <style:style style:name="P63" style:family="paragraph" style:parent-style-name="Standard">
      <style:text-properties officeooo:paragraph-rsid="001a997d"/>
    </style:style>
    <style:style style:name="P64" style:family="paragraph" style:parent-style-name="Mon_5f_texte">
      <style:paragraph-properties fo:margin-top="0cm" fo:margin-bottom="0cm" style:contextual-spacing="false"/>
    </style:style>
    <style:style style:name="P65" style:family="paragraph" style:parent-style-name="Réponse">
      <style:text-properties officeooo:rsid="001bbd36" officeooo:paragraph-rsid="001bbd36"/>
    </style:style>
    <style:style style:name="P66" style:family="paragraph" style:parent-style-name="Mon_5f_texte" style:list-style-name="WWNum4"/>
    <style:style style:name="P67" style:family="paragraph" style:parent-style-name="Mon_5f_texte">
      <style:paragraph-properties fo:margin-top="0cm" fo:margin-bottom="0.176cm" style:contextual-spacing="false" fo:break-before="page"/>
    </style:style>
    <style:style style:name="P68" style:family="paragraph">
      <loext:graphic-properties draw:fill="solid" draw:fill-color="#00b0f0"/>
      <style:paragraph-properties fo:text-align="start"/>
    </style:style>
    <style:style style:name="P69" style:family="paragraph" style:parent-style-name="Mon_5f_texte">
      <style:paragraph-properties fo:margin-top="0cm" fo:margin-bottom="0cm" style:contextual-spacing="false" fo:text-align="start" style:justify-single-word="false" fo:text-indent="0cm" style:auto-text-indent="false"/>
    </style:style>
    <style:style style:name="P70" style:family="paragraph" style:parent-style-name="Mon_5f_texte">
      <style:paragraph-properties fo:margin-top="0cm" fo:margin-bottom="0cm" style:contextual-spacing="false" fo:text-align="start" style:justify-single-word="false" fo:text-indent="0cm" style:auto-text-indent="false"/>
      <style:text-properties fo:font-size="4pt" style:font-size-asian="4pt" style:font-size-complex="4pt"/>
    </style:style>
    <style:style style:name="P71" style:family="paragraph">
      <loext:graphic-properties draw:fill="solid" draw:fill-color="#00b0f0"/>
      <style:paragraph-properties fo:text-align="start"/>
      <style:text-properties fo:font-size="12pt"/>
    </style:style>
    <style:style style:name="P72" style:family="paragraph" style:parent-style-name="Mon_5f_texte">
      <style:text-properties fo:font-weight="bold" style:font-weight-asian="bold" style:font-weight-complex="bold"/>
    </style:style>
    <style:style style:name="P73" style:family="paragraph" style:parent-style-name="Réponse">
      <style:text-properties officeooo:paragraph-rsid="001cc11e"/>
    </style:style>
    <style:style style:name="P74" style:family="paragraph" style:parent-style-name="Réponse">
      <style:text-properties officeooo:paragraph-rsid="001d153a"/>
    </style:style>
    <style:style style:name="P75" style:family="paragraph" style:parent-style-name="Réponse">
      <style:text-properties officeooo:paragraph-rsid="001e9282"/>
    </style:style>
    <style:style style:name="P76" style:family="paragraph" style:parent-style-name="Réponse">
      <style:text-properties officeooo:rsid="001eaab9" officeooo:paragraph-rsid="001eaab9"/>
    </style:style>
    <style:style style:name="P77" style:family="paragraph" style:parent-style-name="Réponse">
      <style:text-properties officeooo:paragraph-rsid="001eaab9"/>
    </style:style>
    <style:style style:name="P78" style:family="paragraph" style:parent-style-name="Réponse">
      <style:text-properties officeooo:paragraph-rsid="00208eaf"/>
    </style:style>
    <style:style style:name="P79" style:family="paragraph" style:parent-style-name="Réponse">
      <style:text-properties officeooo:paragraph-rsid="002196b0"/>
    </style:style>
    <style:style style:name="P80" style:family="paragraph" style:parent-style-name="Réponse">
      <style:text-properties officeooo:paragraph-rsid="0023599a"/>
    </style:style>
    <style:style style:name="P81" style:family="paragraph" style:parent-style-name="Réponse">
      <style:text-properties officeooo:rsid="0023c712" officeooo:paragraph-rsid="0023c712"/>
    </style:style>
    <style:style style:name="P82" style:family="paragraph" style:parent-style-name="Réponse">
      <style:text-properties officeooo:paragraph-rsid="0023c712"/>
    </style:style>
    <style:style style:name="P83" style:family="paragraph" style:parent-style-name="Réponse">
      <style:text-properties officeooo:rsid="0025139e" officeooo:paragraph-rsid="0025139e"/>
    </style:style>
    <style:style style:name="P84" style:family="paragraph" style:parent-style-name="Réponse">
      <style:text-properties officeooo:paragraph-rsid="002674e1"/>
    </style:style>
    <style:style style:name="P85" style:family="paragraph" style:parent-style-name="Mon_5f_texte">
      <style:paragraph-properties fo:margin-top="0.071cm" fo:margin-bottom="0.071cm" style:contextual-spacing="false" fo:text-indent="0cm" style:auto-text-indent="false"/>
    </style:style>
    <style:style style:name="P86" style:family="paragraph" style:parent-style-name="Standard">
      <style:text-properties fo:color="#1ca800" loext:opacity="100%" style:font-name="Lucida Console" fo:font-size="9pt" style:font-size-asian="9pt"/>
    </style:style>
    <style:style style:name="P87" style:family="paragraph" style:parent-style-name="Réponse">
      <style:text-properties officeooo:rsid="00268752" officeooo:paragraph-rsid="00268752"/>
    </style:style>
    <style:style style:name="P88" style:family="paragraph" style:parent-style-name="Réponse">
      <style:text-properties officeooo:rsid="00276f55" officeooo:paragraph-rsid="00276f55"/>
    </style:style>
    <style:style style:name="P89" style:family="paragraph" style:parent-style-name="Réponse">
      <style:text-properties officeooo:rsid="002798ad" officeooo:paragraph-rsid="002798ad"/>
    </style:style>
    <style:style style:name="P90" style:family="paragraph" style:parent-style-name="Réponse">
      <style:text-properties officeooo:paragraph-rsid="00281e2d"/>
    </style:style>
    <style:style style:name="P91" style:family="paragraph" style:parent-style-name="Frame_20_contents">
      <style:paragraph-properties fo:text-align="center" style:justify-single-word="false"/>
    </style:style>
    <style:style style:name="P92" style:family="paragraph">
      <loext:graphic-properties draw:fill="solid" draw:fill-color="#00fa71"/>
      <style:paragraph-properties fo:text-align="start"/>
      <style:text-properties fo:font-size="12pt"/>
    </style:style>
    <style:style style:name="P93" style:family="paragraph" style:parent-style-name="Réponse">
      <style:text-properties officeooo:rsid="0029d324" officeooo:paragraph-rsid="0029d324"/>
    </style:style>
    <style:style style:name="P94" style:family="paragraph" style:parent-style-name="Standard">
      <style:text-properties officeooo:rsid="0029d324" officeooo:paragraph-rsid="0029d324"/>
    </style:style>
    <style:style style:name="P95" style:family="paragraph" style:parent-style-name="Réponse">
      <style:text-properties officeooo:rsid="002b4399" officeooo:paragraph-rsid="002b4399"/>
    </style:style>
    <style:style style:name="P96" style:family="paragraph" style:parent-style-name="Réponse">
      <style:text-properties officeooo:rsid="002ce4c3" officeooo:paragraph-rsid="002ce4c3"/>
    </style:style>
    <style:style style:name="P97" style:family="paragraph" style:parent-style-name="Réponse">
      <style:text-properties officeooo:rsid="002e6b03" officeooo:paragraph-rsid="002e6b03"/>
    </style:style>
    <style:style style:name="P98" style:family="paragraph" style:parent-style-name="Réponse">
      <style:text-properties officeooo:rsid="00301d96" officeooo:paragraph-rsid="00301d96"/>
    </style:style>
    <style:style style:name="P99" style:family="paragraph" style:parent-style-name="Réponse">
      <style:text-properties officeooo:rsid="0031e8c3" officeooo:paragraph-rsid="0031e8c3"/>
    </style:style>
    <style:style style:name="P100" style:family="paragraph" style:parent-style-name="Standard">
      <style:text-properties officeooo:rsid="0031e8c3" officeooo:paragraph-rsid="0031e8c3"/>
    </style:style>
    <style:style style:name="P101" style:family="paragraph" style:parent-style-name="Standard">
      <style:text-properties officeooo:rsid="00339e61" officeooo:paragraph-rsid="00339e61"/>
    </style:style>
    <style:style style:name="P102" style:family="paragraph" style:parent-style-name="Réponse">
      <style:text-properties officeooo:rsid="00339e61" officeooo:paragraph-rsid="00339e61"/>
    </style:style>
    <style:style style:name="P103" style:family="paragraph" style:parent-style-name="Standard">
      <style:paragraph-properties fo:text-indent="0.63cm" style:auto-text-indent="false"/>
    </style:style>
    <style:style style:name="P104" style:family="paragraph" style:parent-style-name="Standard">
      <style:text-properties fo:font-size="16pt" style:font-size-asian="16pt" style:font-size-complex="16pt"/>
    </style:style>
    <style:style style:name="P105" style:family="paragraph" style:parent-style-name="Mon_5f_texte">
      <style:paragraph-properties fo:text-align="center" style:justify-single-word="false"/>
    </style:style>
    <style:style style:name="P106" style:family="paragraph" style:parent-style-name="Réponse">
      <style:text-properties officeooo:rsid="00361d39" officeooo:paragraph-rsid="00361d39"/>
    </style:style>
    <style:style style:name="P107" style:family="paragraph" style:parent-style-name="Standard">
      <style:text-properties officeooo:paragraph-rsid="00361d39"/>
    </style:style>
    <style:style style:name="P108" style:family="paragraph" style:parent-style-name="Standard">
      <style:text-properties style:font-name-complex="Arial1"/>
    </style:style>
    <style:style style:name="P109" style:family="paragraph" style:parent-style-name="Mon_5f_texte">
      <style:paragraph-properties fo:margin-top="0.071cm" fo:margin-bottom="0.071cm" style:contextual-spacing="false"/>
    </style:style>
    <style:style style:name="P110" style:family="paragraph" style:parent-style-name="Standard" style:list-style-name="WWNum5">
      <style:paragraph-properties fo:margin-top="0cm" fo:margin-bottom="0.071cm" style:contextual-spacing="false"/>
    </style:style>
    <style:style style:name="P111" style:family="paragraph" style:parent-style-name="Standard" style:list-style-name="WWNum6">
      <style:paragraph-properties fo:margin-top="0cm" fo:margin-bottom="0.071cm" style:contextual-spacing="false"/>
    </style:style>
    <style:style style:name="P112" style:family="paragraph" style:parent-style-name="Standard">
      <style:paragraph-properties fo:margin-left="1.27cm" fo:margin-top="0cm" fo:margin-bottom="0.071cm" style:contextual-spacing="false" fo:text-indent="1.228cm" style:auto-text-indent="false"/>
    </style:style>
    <style:style style:name="P113" style:family="paragraph" style:parent-style-name="Standard" style:list-style-name="WWNum7">
      <style:paragraph-properties fo:margin-top="0cm" fo:margin-bottom="0.071cm" style:contextual-spacing="false"/>
    </style:style>
    <style:style style:name="P114" style:family="paragraph" style:parent-style-name="Standard" style:list-style-name="WWNum8">
      <style:paragraph-properties fo:margin-top="0cm" fo:margin-bottom="0.071cm" style:contextual-spacing="false"/>
    </style:style>
    <style:style style:name="P115" style:family="paragraph" style:parent-style-name="Standard" style:list-style-name="WWNum9">
      <style:paragraph-properties fo:margin-top="0cm" fo:margin-bottom="0.071cm" style:contextual-spacing="false"/>
    </style:style>
    <style:style style:name="P116" style:family="paragraph" style:parent-style-name="Standard" style:list-style-name="WWNum10">
      <style:paragraph-properties fo:margin-top="0cm" fo:margin-bottom="0.071cm" style:contextual-spacing="false"/>
    </style:style>
    <style:style style:name="P117" style:family="paragraph" style:parent-style-name="Standard">
      <style:text-properties style:font-name="Arial" fo:font-size="11pt" fo:font-weight="bold" style:font-size-asian="11pt" style:font-weight-asian="bold" style:font-name-complex="Arial1" style:font-size-complex="11pt" style:font-weight-complex="bold"/>
    </style:style>
    <style:style style:name="P118" style:family="paragraph" style:parent-style-name="Standard" style:list-style-name="WWNum11">
      <style:paragraph-properties fo:margin-top="0cm" fo:margin-bottom="0.071cm" style:contextual-spacing="false"/>
    </style:style>
    <style:style style:name="P119" style:family="paragraph" style:parent-style-name="Standard" style:list-style-name="WWNum12">
      <style:paragraph-properties fo:margin-top="0cm" fo:margin-bottom="0.071cm" style:contextual-spacing="false"/>
    </style:style>
    <style:style style:name="P120" style:family="paragraph" style:parent-style-name="Standard" style:list-style-name="WWNum13">
      <style:paragraph-properties fo:margin-top="0cm" fo:margin-bottom="0.071cm" style:contextual-spacing="false"/>
    </style:style>
    <style:style style:name="P121" style:family="paragraph" style:parent-style-name="Standard" style:list-style-name="WWNum14">
      <style:paragraph-properties fo:margin-top="0cm" fo:margin-bottom="0.071cm" style:contextual-spacing="false"/>
    </style:style>
    <style:style style:name="P122" style:family="paragraph" style:parent-style-name="Standard" style:list-style-name="WWNum15">
      <style:paragraph-properties fo:margin-top="0cm" fo:margin-bottom="0.071cm" style:contextual-spacing="false"/>
    </style:style>
    <style:style style:name="P123" style:family="paragraph" style:parent-style-name="Standard">
      <style:paragraph-properties fo:margin-left="1.249cm" fo:margin-top="0cm" fo:margin-bottom="0.071cm" style:contextual-spacing="false" fo:text-indent="1.249cm" style:auto-text-indent="false"/>
    </style:style>
    <style:style style:name="P124" style:family="paragraph" style:parent-style-name="Standard" style:list-style-name="WWNum16">
      <style:paragraph-properties fo:margin-top="0cm" fo:margin-bottom="0.071cm" style:contextual-spacing="false"/>
    </style:style>
    <style:style style:name="P125" style:family="paragraph" style:parent-style-name="Standard">
      <style:paragraph-properties fo:margin-left="1.884cm" fo:margin-top="0cm" fo:margin-bottom="0.071cm" style:contextual-spacing="false" fo:text-indent="0.614cm" style:auto-text-indent="false"/>
    </style:style>
    <style:style style:name="P126" style:family="paragraph" style:parent-style-name="Standard" style:list-style-name="WWNum17">
      <style:paragraph-properties fo:margin-top="0cm" fo:margin-bottom="0.071cm" style:contextual-spacing="false"/>
    </style:style>
    <style:style style:name="P127" style:family="paragraph" style:parent-style-name="Standard" style:list-style-name="WWNum18">
      <style:paragraph-properties fo:margin-top="0cm" fo:margin-bottom="0.071cm" style:contextual-spacing="false"/>
    </style:style>
    <style:style style:name="P128" style:family="paragraph" style:parent-style-name="Standard" style:list-style-name="WWNum19">
      <style:paragraph-properties fo:margin-top="0cm" fo:margin-bottom="0.071cm" style:contextual-spacing="false"/>
    </style:style>
    <style:style style:name="P129" style:family="paragraph" style:parent-style-name="Standard" style:list-style-name="WWNum20">
      <style:paragraph-properties fo:margin-top="0cm" fo:margin-bottom="0.071cm" style:contextual-spacing="false"/>
    </style:style>
    <style:style style:name="P130" style:family="paragraph" style:parent-style-name="Standard" style:list-style-name="WWNum21">
      <style:paragraph-properties fo:margin-top="0cm" fo:margin-bottom="0.071cm" style:contextual-spacing="false"/>
    </style:style>
    <style:style style:name="P131" style:family="paragraph" style:parent-style-name="Standard" style:list-style-name="WWNum22">
      <style:paragraph-properties fo:margin-top="0cm" fo:margin-bottom="0.071cm" style:contextual-spacing="false"/>
    </style:style>
    <style:style style:name="P132" style:family="paragraph" style:parent-style-name="Standard" style:list-style-name="WWNum23">
      <style:paragraph-properties fo:margin-top="0cm" fo:margin-bottom="0.071cm" style:contextual-spacing="false"/>
    </style:style>
    <style:style style:name="P133" style:family="paragraph" style:parent-style-name="Standard" style:list-style-name="WWNum24">
      <style:paragraph-properties fo:margin-top="0cm" fo:margin-bottom="0.071cm" style:contextual-spacing="false"/>
    </style:style>
    <style:style style:name="P134" style:family="paragraph" style:parent-style-name="Standard" style:list-style-name="WWNum25">
      <style:paragraph-properties fo:margin-top="0cm" fo:margin-bottom="0.071cm" style:contextual-spacing="false"/>
    </style:style>
    <style:style style:name="P135" style:family="paragraph" style:parent-style-name="Standard" style:list-style-name="WWNum26">
      <style:paragraph-properties fo:margin-top="0cm" fo:margin-bottom="0.071cm" style:contextual-spacing="false"/>
    </style:style>
    <style:style style:name="P136" style:family="paragraph" style:parent-style-name="Standard" style:list-style-name="WWNum27">
      <style:paragraph-properties fo:margin-top="0cm" fo:margin-bottom="0.071cm" style:contextual-spacing="false"/>
    </style:style>
    <style:style style:name="P137" style:family="paragraph" style:parent-style-name="Standard" style:list-style-name="WWNum28">
      <style:paragraph-properties fo:margin-top="0cm" fo:margin-bottom="0.071cm" style:contextual-spacing="false"/>
    </style:style>
    <style:style style:name="P138" style:family="paragraph" style:parent-style-name="Standard" style:list-style-name="WWNum29">
      <style:paragraph-properties fo:margin-top="0cm" fo:margin-bottom="0.071cm" style:contextual-spacing="false"/>
    </style:style>
    <style:style style:name="T1" style:family="text">
      <style:text-properties style:font-name="Tahoma" fo:font-size="16pt" style:font-size-asian="16pt"/>
    </style:style>
    <style:style style:name="T2" style:family="text">
      <style:text-properties style:font-name="Tahoma" fo:font-size="28pt" style:font-size-asian="28pt"/>
    </style:style>
    <style:style style:name="T3" style:family="text">
      <style:text-properties style:font-name="Tahoma" fo:font-size="10pt" style:font-size-asian="10pt" style:font-size-complex="10pt"/>
    </style:style>
    <style:style style:name="T4" style:family="text">
      <style:text-properties style:font-name="Tahoma" fo:font-size="22pt" fo:language="en" fo:country="US" style:font-size-asian="22pt"/>
    </style:style>
    <style:style style:name="T5" style:family="text">
      <style:text-properties style:font-name="Tahoma" fo:font-size="28pt" fo:language="en" fo:country="US" style:font-size-asian="28pt"/>
    </style:style>
    <style:style style:name="T6" style:family="text">
      <style:text-properties style:font-name="Tahoma" fo:font-size="14pt" fo:language="en" fo:country="US" style:font-size-asian="14pt"/>
    </style:style>
    <style:style style:name="T7" style:family="text">
      <style:text-properties fo:language="en" fo:country="US"/>
    </style:style>
    <style:style style:name="T8" style:family="text">
      <style:text-properties style:font-name="Tahoma" fo:font-size="20pt" fo:font-weight="bold" style:font-size-asian="20pt" style:font-weight-asian="bold"/>
    </style:style>
    <style:style style:name="T9" style:family="text">
      <style:text-properties style:font-name="Tahoma" fo:font-size="20pt" fo:font-weight="bold" officeooo:rsid="00072de8" style:font-size-asian="20pt" style:font-weight-asian="bold"/>
    </style:style>
    <style:style style:name="T10" style:family="text">
      <style:text-properties style:font-name="Tahoma" fo:font-size="20pt" fo:font-style="italic" style:font-size-asian="20pt" style:font-style-asian="italic"/>
    </style:style>
    <style:style style:name="T11" style:family="text">
      <style:text-properties style:text-position="super 58%" style:font-name="Tahoma" fo:font-size="20pt" fo:font-style="italic" style:font-size-asian="20pt" style:font-style-asian="italic"/>
    </style:style>
    <style:style style:name="T12" style:family="text">
      <style:text-properties style:font-name="Tahoma" fo:font-size="14pt" style:font-size-asian="14pt"/>
    </style:style>
    <style:style style:name="T13" style:family="text">
      <style:text-properties text:display="true"/>
    </style:style>
    <style:style style:name="T14" style:family="text">
      <style:text-properties style:font-name-asian="F"/>
    </style:style>
    <style:style style:name="T15" style:family="text">
      <style:text-properties fo:font-family="Calibri" style:font-family-generic="roman" style:font-pitch="variable" fo:font-size="11pt" style:font-name-asian="F" style:font-size-asian="11pt" style:font-name-complex="F" style:font-size-complex="11pt"/>
    </style:style>
    <style:style style:name="T16" style:family="text">
      <style:text-properties fo:font-family="Calibri" style:font-family-generic="roman" style:font-pitch="variable" fo:font-size="11pt" style:font-name-asian="F" style:font-size-asian="11pt" style:font-name-complex="F" style:font-size-complex="11pt" text:display="true"/>
    </style:style>
    <style:style style:name="T17" style:family="text">
      <style:text-properties fo:font-family="Calibri" style:font-family-generic="roman" style:font-pitch="variable" fo:font-size="11pt" fo:font-weight="normal" style:font-name-asian="F" style:font-size-asian="11pt" style:font-weight-asian="normal" style:font-name-complex="F" style:font-size-complex="11pt"/>
    </style:style>
    <style:style style:name="T18" style:family="text">
      <style:text-properties fo:font-family="Calibri" style:font-family-generic="roman" style:font-pitch="variable" fo:font-size="11pt" fo:font-weight="normal" style:font-name-asian="F" style:font-size-asian="11pt" style:font-weight-asian="normal" style:font-name-complex="F" style:font-size-complex="11pt" text:display="true"/>
    </style:style>
    <style:style style:name="T19" style:family="text">
      <style:text-properties fo:font-size="18pt" style:font-size-asian="18pt"/>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font-name-complex="Arial1"/>
    </style:style>
    <style:style style:name="T23" style:family="text">
      <style:text-properties fo:font-size="6pt" style:font-size-asian="6pt" style:font-size-complex="6pt"/>
    </style:style>
    <style:style style:name="T24" style:family="text">
      <style:text-properties fo:font-weight="bold" style:font-weight-asian="bold"/>
    </style:style>
    <style:style style:name="T25" style:family="text">
      <style:text-properties style:font-name="Times New Roman"/>
    </style:style>
    <style:style style:name="T26" style:family="text">
      <style:text-properties style:font-name="Arial" fo:font-size="11pt" fo:font-weight="bold" style:font-size-asian="11pt" style:font-weight-asian="bold" style:font-size-complex="11pt" style:font-weight-complex="bold"/>
    </style:style>
    <style:style style:name="T27" style:family="text">
      <style:text-properties fo:font-size="4pt" style:font-size-asian="4pt" style:font-size-complex="4pt"/>
    </style:style>
    <style:style style:name="T28" style:family="text">
      <style:text-properties fo:color="#c0a000" loext:opacity="100%" style:font-name="Lucida Console" fo:font-size="9pt" style:font-size-asian="9pt"/>
    </style:style>
    <style:style style:name="T29" style:family="text">
      <style:text-properties fo:color="#1ca800" loext:opacity="100%" style:font-name="Lucida Console" fo:font-size="9pt" style:font-size-asian="9pt"/>
    </style:style>
    <style:style style:name="T30" style:family="text">
      <style:text-properties fo:color="#b148c6" loext:opacity="100%" style:font-name="Lucida Console" fo:font-size="9pt" style:font-size-asian="9pt"/>
    </style:style>
    <style:style style:name="T31" style:family="text">
      <style:text-properties style:use-window-font-color="true" loext:opacity="0%" style:font-name="Lucida Console" fo:font-size="9pt" style:font-size-asian="9pt"/>
    </style:style>
    <style:style style:name="T32" style:family="text">
      <style:text-properties style:text-position="super 58%"/>
    </style:style>
    <style:style style:name="T33" style:family="text">
      <style:text-properties officeooo:rsid="000a176a"/>
    </style:style>
    <style:style style:name="T34" style:family="text">
      <style:text-properties fo:color="#1ca800" loext:opacity="100%" style:font-name="Lucida Console" fo:font-size="9pt" officeooo:rsid="000f919f" style:font-size-asian="9pt"/>
    </style:style>
    <style:style style:name="T35" style:family="text">
      <style:text-properties style:font-weight-complex="bold"/>
    </style:style>
    <style:style style:name="T36" style:family="text">
      <style:text-properties style:use-window-font-color="true" loext:opacity="0%" style:font-name="Lucida Console" fo:font-size="9pt" officeooo:rsid="0010dd06" style:font-size-asian="9pt"/>
    </style:style>
    <style:style style:name="T37" style:family="text">
      <style:text-properties style:use-window-font-color="true" loext:opacity="0%" style:font-name="Lucida Console" fo:font-size="9pt" fo:font-weight="normal" style:font-size-asian="9pt" style:font-weight-asian="normal"/>
    </style:style>
    <style:style style:name="T38" style:family="text">
      <style:text-properties fo:color="#7d97ff" loext:opacity="100%" style:font-name="Lucida Console" fo:font-size="9pt" fo:font-weight="bold" style:font-size-asian="9pt" style:font-weight-asian="bold"/>
    </style:style>
    <style:style style:name="T39" style:family="text">
      <style:text-properties fo:color="#00a89a" loext:opacity="100%" style:font-name="Lucida Console" fo:font-size="9pt" style:font-size-asian="9pt"/>
    </style:style>
    <style:style style:name="T40" style:family="text">
      <style:text-properties style:font-name="Arial" fo:font-size="11pt" fo:font-weight="bold" style:font-size-asian="11pt" style:font-weight-asian="bold" style:font-name-complex="Arial1" style:font-size-complex="11pt" style:font-weight-complex="bold"/>
    </style:style>
    <style:style style:name="T41" style:family="text">
      <style:text-properties fo:font-size="3pt" style:font-size-asian="3pt" style:font-size-complex="3pt"/>
    </style:style>
    <style:style style:name="T42" style:family="text">
      <style:text-properties style:font-name="Consolas" fo:font-size="10pt" style:font-size-asian="10pt" style:font-size-complex="10pt"/>
    </style:style>
    <style:style style:name="T43" style:family="text">
      <style:text-properties fo:color="#00b050" loext:opacity="100%" style:font-name="Consolas" fo:font-size="10pt" style:font-size-asian="10pt" style:font-size-complex="10pt"/>
    </style:style>
    <style:style style:name="T44" style:family="text">
      <style:text-properties fo:color="#00b050" loext:opacity="100%" style:font-name="Consolas" fo:font-size="8pt" style:font-size-asian="8pt" style:font-size-complex="8pt"/>
    </style:style>
    <style:style style:name="T45" style:family="text">
      <style:text-properties fo:color="#ff0000" loext:opacity="100%"/>
    </style:style>
    <style:style style:name="T46" style:family="text">
      <style:text-properties fo:color="#ff0000" loext:opacity="100%" fo:font-weight="bold" style:font-weight-asian="bold" style:font-weight-complex="bold"/>
    </style:style>
    <style:style style:name="T47" style:family="text">
      <style:text-properties officeooo:rsid="00129e0f"/>
    </style:style>
    <style:style style:name="T48" style:family="text">
      <style:text-properties fo:color="#c0a000" loext:opacity="100%" style:font-name="Lucida Console" fo:font-size="9pt" fo:font-weight="normal" style:font-size-asian="9pt" style:font-weight-asian="normal"/>
    </style:style>
    <style:style style:name="T49" style:family="text">
      <style:text-properties fo:color="#00f0f0" loext:opacity="100%" style:font-name="Lucida Console" fo:font-size="9pt" fo:font-weight="bold" style:font-size-asian="9pt" style:font-weight-asian="bold"/>
    </style:style>
    <style:style style:name="T50" style:family="text">
      <style:text-properties fo:color="#00f200" loext:opacity="100%" style:font-name="Lucida Console" fo:font-size="9pt" fo:font-weight="bold" style:font-size-asian="9pt" style:font-weight-asian="bold"/>
    </style:style>
    <style:style style:name="T51" style:family="text">
      <style:text-properties fo:color="#4472c4" loext:opacity="100%" style:font-name="Arial" fo:font-size="11pt" fo:font-weight="bold" style:font-size-asian="11pt" style:font-weight-asian="bold" style:font-name-complex="Arial1" style:font-size-complex="11pt" style:font-weight-complex="bold">
        <loext:char-complex-color loext:theme-type="accent5" loext:color-type="theme"/>
      </style:text-properties>
    </style:style>
    <style:style style:name="T52" style:family="text">
      <style:text-properties fo:color="#00b050" loext:opacity="100%" style:font-name="Arial" fo:font-size="11pt" fo:font-weight="bold" style:font-size-asian="11pt" style:font-weight-asian="bold" style:font-name-complex="Arial1" style:font-size-complex="11pt" style:font-weight-complex="bold"/>
    </style:style>
    <style:style style:name="T53" style:family="text">
      <style:text-properties style:font-name="Arial" fo:font-size="11pt" fo:font-weight="bold" officeooo:rsid="00129e0f" style:font-size-asian="11pt" style:font-weight-asian="bold" style:font-size-complex="11pt" style:font-weight-complex="bold"/>
    </style:style>
    <style:style style:name="T54" style:family="text">
      <style:text-properties officeooo:rsid="00134e00"/>
    </style:style>
    <style:style style:name="T55" style:family="text">
      <style:text-properties fo:color="#ff7676" loext:opacity="100%" style:font-name="Lucida Console" fo:font-size="9pt" fo:font-weight="bold" style:font-size-asian="9pt" style:font-weight-asian="bold"/>
    </style:style>
    <style:style style:name="T56" style:family="text">
      <style:text-properties fo:color="#1ca800" loext:opacity="100%" style:font-name="Lucida Console" fo:font-size="9pt" fo:font-weight="normal" style:font-size-asian="9pt" style:font-weight-asian="normal"/>
    </style:style>
    <style:style style:name="T57" style:family="text">
      <style:text-properties fo:color="#b148c6" loext:opacity="100%" style:font-name="Lucida Console" fo:font-size="9pt" fo:font-weight="normal" style:font-size-asian="9pt" style:font-weight-asian="normal"/>
    </style:style>
    <style:style style:name="T58" style:family="text">
      <style:text-properties officeooo:rsid="0014ebc6"/>
    </style:style>
    <style:style style:name="T59" style:family="text">
      <style:text-properties officeooo:rsid="0015b95b"/>
    </style:style>
    <style:style style:name="T60" style:family="text">
      <style:text-properties officeooo:rsid="0017b808"/>
    </style:style>
    <style:style style:name="T61" style:family="text">
      <style:text-properties style:use-window-font-color="true" loext:opacity="0%" style:font-name="Lucida Console" fo:font-size="9pt" fo:font-weight="bold" style:font-size-asian="9pt" style:font-weight-asian="bold"/>
    </style:style>
    <style:style style:name="T62" style:family="text">
      <style:text-properties fo:color="#00a89a" loext:opacity="100%" style:font-name="Lucida Console" fo:font-size="9pt" fo:font-weight="normal" style:font-size-asian="9pt" style:font-weight-asian="normal"/>
    </style:style>
    <style:style style:name="T63" style:family="text">
      <style:text-properties fo:color="#d42c3a" loext:opacity="100%" style:font-name="Lucida Console" fo:font-size="9pt" fo:font-weight="normal" style:font-size-asian="9pt" style:font-weight-asian="normal"/>
    </style:style>
    <style:style style:name="T64" style:family="text">
      <style:text-properties fo:color="#d42c3a" loext:opacity="100%" style:font-name="Lucida Console" fo:font-size="9pt" style:font-size-asian="9pt"/>
    </style:style>
    <style:style style:name="T65" style:family="text">
      <style:text-properties officeooo:rsid="00180f8c"/>
    </style:style>
    <style:style style:name="T66" style:family="text">
      <style:text-properties fo:font-size="20pt" officeooo:rsid="00180f8c" style:font-size-asian="20pt" style:font-size-complex="20pt"/>
    </style:style>
    <style:style style:name="T67" style:family="text">
      <style:text-properties style:font-name="Arial" fo:font-size="11pt" fo:font-weight="normal" style:font-size-asian="11pt" style:font-weight-asian="normal" style:font-size-complex="11pt" style:font-weight-complex="normal"/>
    </style:style>
    <style:style style:name="T68" style:family="text">
      <style:text-properties style:font-name="Arial" fo:font-size="11pt" fo:font-weight="normal" officeooo:rsid="00180f8c" style:font-size-asian="11pt" style:font-weight-asian="normal" style:font-size-complex="11pt" style:font-weight-complex="normal"/>
    </style:style>
    <style:style style:name="T69" style:family="text">
      <style:text-properties officeooo:rsid="001830b3"/>
    </style:style>
    <style:style style:name="T70" style:family="text">
      <style:text-properties style:font-name="Arial" fo:font-size="11pt" style:font-size-asian="11pt" style:font-size-complex="11pt"/>
    </style:style>
    <style:style style:name="T71" style:family="text">
      <style:text-properties officeooo:rsid="00193417"/>
    </style:style>
    <style:style style:name="T72" style:family="text">
      <style:text-properties style:font-name="Consolas" fo:font-size="11pt" fo:font-weight="bold" style:font-size-asian="11pt" style:font-weight-asian="bold" style:font-size-complex="11pt" style:font-weight-complex="bold"/>
    </style:style>
    <style:style style:name="T73" style:family="text">
      <style:text-properties fo:color="#00b050" loext:opacity="100%" style:font-name="Consolas" fo:font-size="11pt" fo:font-weight="bold" style:font-size-asian="11pt" style:font-weight-asian="bold" style:font-size-complex="11pt" style:font-weight-complex="bold"/>
    </style:style>
    <style:style style:name="T74" style:family="text">
      <style:text-properties fo:color="#7030a0" loext:opacity="100%" style:font-name="Consolas" fo:font-size="11pt" fo:font-weight="bold" style:font-size-asian="11pt" style:font-weight-asian="bold" style:font-size-complex="11pt" style:font-weight-complex="bold"/>
    </style:style>
    <style:style style:name="T75" style:family="text">
      <style:text-properties fo:color="#bf8f00" loext:opacity="100%" style:font-name="Consolas" fo:font-size="11pt" fo:font-weight="bold" style:font-size-asian="11pt" style:font-weight-asian="bold" style:font-size-complex="11pt" style:font-weight-complex="bold">
        <loext:char-complex-color loext:theme-type="accent4" loext:color-type="theme">
          <loext:transformation loext:type="shade" loext:value="2509"/>
        </loext:char-complex-color>
      </style:text-properties>
    </style:style>
    <style:style style:name="T76" style:family="text">
      <style:text-properties fo:color="#2e74b5" loext:opacity="100%" style:font-name="Consolas" fo:font-size="11pt" fo:font-weight="bold" style:font-size-asian="11pt" style:font-weight-asian="bold" style:font-size-complex="11pt" style:font-weight-complex="bold">
        <loext:char-complex-color loext:theme-type="accent1" loext:color-type="theme">
          <loext:transformation loext:type="shade" loext:value="2509"/>
        </loext:char-complex-color>
      </style:text-properties>
    </style:style>
    <style:style style:name="T77" style:family="text">
      <style:text-properties fo:color="#00b0f0" loext:opacity="100%" style:font-name="Consolas" fo:font-size="11pt" fo:font-weight="bold" style:font-size-asian="11pt" style:font-weight-asian="bold" style:font-size-complex="11pt" style:font-weight-complex="bold"/>
    </style:style>
    <style:style style:name="T78" style:family="text">
      <style:text-properties fo:color="#00ff00" loext:opacity="100%" style:font-name="Consolas" fo:font-size="11pt" fo:font-weight="bold" style:font-size-asian="11pt" style:font-weight-asian="bold" style:font-size-complex="11pt" style:font-weight-complex="bold"/>
    </style:style>
    <style:style style:name="T79" style:family="text">
      <style:text-properties fo:color="#ff0000" loext:opacity="100%" style:font-name="Consolas" fo:font-size="11pt" fo:font-weight="bold" style:font-size-asian="11pt" style:font-weight-asian="bold" style:font-size-complex="11pt" style:font-weight-complex="bold"/>
    </style:style>
    <style:style style:name="T80" style:family="text">
      <style:text-properties fo:color="#bf8f00" loext:opacity="100%" style:font-name="Consolas" fo:font-size="11pt" fo:font-weight="bold" style:font-size-asian="11pt" style:font-weight-asian="bold" style:font-name-complex="Arial1" style:font-size-complex="11pt" style:font-weight-complex="bold">
        <loext:char-complex-color loext:theme-type="accent4" loext:color-type="theme">
          <loext:transformation loext:type="shade" loext:value="2509"/>
        </loext:char-complex-color>
      </style:text-properties>
    </style:style>
    <style:style style:name="T81" style:family="text">
      <style:text-properties fo:color="#00ff00" loext:opacity="100%" style:font-name="Consolas" fo:font-size="11pt" fo:font-weight="bold" style:font-size-asian="11pt" style:font-weight-asian="bold" style:font-name-complex="Arial1" style:font-size-complex="11pt" style:font-weight-complex="bold"/>
    </style:style>
    <style:style style:name="T82" style:family="text">
      <style:text-properties fo:color="#00b0f0" loext:opacity="100%" style:font-name="Consolas" fo:font-size="11pt" fo:font-weight="bold" style:font-size-asian="11pt" style:font-weight-asian="bold" style:font-name-complex="Arial1" style:font-size-complex="11pt" style:font-weight-complex="bold"/>
    </style:style>
    <style:style style:name="T83" style:family="text">
      <style:text-properties officeooo:rsid="001cc11e"/>
    </style:style>
    <style:style style:name="T84" style:family="text">
      <style:text-properties officeooo:rsid="001d153a"/>
    </style:style>
    <style:style style:name="T85" style:family="text">
      <style:text-properties officeooo:rsid="001e9282"/>
    </style:style>
    <style:style style:name="T86" style:family="text">
      <style:text-properties officeooo:rsid="001eaab9"/>
    </style:style>
    <style:style style:name="T87" style:family="text">
      <style:text-properties officeooo:rsid="00208eaf"/>
    </style:style>
    <style:style style:name="T88" style:family="text">
      <style:text-properties officeooo:rsid="002196b0"/>
    </style:style>
    <style:style style:name="T89" style:family="text">
      <style:text-properties officeooo:rsid="0023599a"/>
    </style:style>
    <style:style style:name="T90" style:family="text">
      <style:text-properties officeooo:rsid="0023c712"/>
    </style:style>
    <style:style style:name="T91" style:family="text">
      <style:text-properties officeooo:rsid="002674e1"/>
    </style:style>
    <style:style style:name="T92" style:family="text">
      <style:text-properties style:font-name="Consolas" fo:font-size="11pt" style:font-size-asian="11pt" style:font-size-complex="11pt"/>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fo:color="#2e74b5" loext:opacity="100%">
        <loext:char-complex-color loext:theme-type="accent1" loext:color-type="theme">
          <loext:transformation loext:type="shade" loext:value="2509"/>
        </loext:char-complex-color>
      </style:text-properties>
    </style:style>
    <style:style style:name="T95" style:family="text">
      <style:text-properties officeooo:rsid="00281e2d"/>
    </style:style>
    <style:style style:name="T96" style:family="text">
      <style:text-properties fo:color="#00ff00" loext:opacity="100%" style:font-name="Consolas" fo:font-size="11pt" fo:font-weight="bold" style:font-size-asian="11pt" style:font-weight-asian="bold" style:font-name-complex="Arial1" style:font-size-complex="11pt" style:font-weight-complex="bold">
        <loext:char-complex-color loext:theme-type="accent1" loext:color-type="theme">
          <loext:transformation loext:type="shade" loext:value="2509"/>
        </loext:char-complex-color>
      </style:text-properties>
    </style:style>
    <style:style style:name="T97" style:family="text">
      <style:text-properties fo:color="#c91ba4" loext:opacity="100%" style:font-name="Consolas" fo:font-size="11pt" fo:font-weight="bold" style:font-size-asian="11pt" style:font-weight-asian="bold" style:font-size-complex="11pt" style:font-weight-complex="bold"/>
    </style:style>
    <style:style style:name="T98" style:family="text">
      <style:text-properties fo:font-family="Calibri" style:font-family-generic="roman" style:font-pitch="variable" style:font-family-complex="Calibri" style:font-family-generic-complex="system" style:font-pitch-complex="variable"/>
    </style:style>
    <style:style style:name="T99" style:family="text">
      <style:text-properties style:use-window-font-color="true" loext:opacity="0%" style:font-name="Lucida Console"/>
    </style:style>
    <style:style style:name="T100" style:family="text">
      <style:text-properties fo:font-family="Calibri" style:font-family-generic="roman" style:font-pitch="variable" fo:font-weight="bold" style:font-weight-asian="bold" style:font-family-complex="Calibri" style:font-family-generic-complex="system" style:font-pitch-complex="variable" style:font-weight-complex="bold"/>
    </style:style>
    <style:style style:name="T101" style:family="text">
      <style:text-properties fo:color="#2e74b5" loext:opacity="100%" style:font-name="Arial" fo:font-size="11pt" fo:font-weight="bold" style:font-size-asian="11pt" style:font-weight-asian="bold" style:font-size-complex="11pt" style:font-weight-complex="bold">
        <loext:char-complex-color loext:theme-type="accent1" loext:color-type="theme">
          <loext:transformation loext:type="shade" loext:value="2509"/>
        </loext:char-complex-color>
      </style:text-properties>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loext:decorative="false" fo:margin-left="0cm" fo:margin-right="0.026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3" style:family="graphic">
      <style:graphic-properties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5" style:family="graphic">
      <style:graphic-properties style:writing-mode="lr-tb" loext:decorative="false" fo:margin-left="0cm" fo:margin-right="0.026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35cm" svg:stroke-color="#ff0000" draw:stroke-linejoin="miter" svg:stroke-linecap="butt" draw:fill="none" loext:fill-use-slide-background="false" draw:textarea-vertical-align="middle" draw:auto-grow-height="false" fo:min-height="0.381cm" fo:min-width="0.656cm" fo:padding-top="0.127cm" fo:padding-bottom="0.127cm" fo:padding-left="0.254cm" fo:padding-right="0.254cm" fo:wrap-option="wrap" loext:decorative="false" style:run-through="foreground"/>
    </style:style>
    <style:style style:name="gr7" style:family="graphic">
      <style:graphic-properties style:writing-mode="lr-tb"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018cm" draw:fill="none" loext:fill-use-slide-background="false" draw:textarea-vertical-align="top" draw:auto-grow-height="false" fo:min-height="0.561cm" fo:min-width="0.81cm" fo:padding-top="0.127cm" fo:padding-bottom="0.127cm" fo:padding-left="0.254cm" fo:padding-right="0.254cm" fo:wrap-option="wrap" loext:decorative="false" style:run-through="foreground"/>
    </style:style>
    <style:style style:name="gr9" style:family="graphic" style:parent-style-name="Frame">
      <style:graphic-properties draw:stroke="none" svg:stroke-width="0.018cm" draw:fill="none" loext:fill-use-slide-background="false" draw:textarea-vertical-align="top" draw:auto-grow-height="false" fo:min-height="0.561cm" fo:min-width="1.48cm" fo:padding-top="0.127cm" fo:padding-bottom="0.127cm" fo:padding-left="0.254cm" fo:padding-right="0.254cm" fo:wrap-option="wrap" loext:decorative="false" style:run-through="foreground"/>
    </style:style>
    <style:style style:name="gr10" style:family="graphic" style:parent-style-name="Frame">
      <style:graphic-properties draw:stroke="none" svg:stroke-width="0.018cm" draw:fill="none" loext:fill-use-slide-background="false" draw:textarea-vertical-align="top" draw:auto-grow-height="false" fo:min-height="0.561cm" fo:min-width="1.242cm" fo:padding-top="0.127cm" fo:padding-bottom="0.127cm" fo:padding-left="0.254cm" fo:padding-right="0.254cm" fo:wrap-option="wrap" loext:decorative="false" style:run-through="foreground"/>
    </style:style>
    <style:style style:name="gr11" style:family="graphic" style:parent-style-name="Frame">
      <style:graphic-properties draw:stroke="none" svg:stroke-width="0.018cm" draw:fill="none" loext:fill-use-slide-background="false" draw:textarea-vertical-align="top" draw:auto-grow-height="false" fo:min-height="0.561cm" fo:min-width="0.603cm" fo:padding-top="0.127cm" fo:padding-bottom="0.127cm" fo:padding-left="0.254cm" fo:padding-right="0.254cm" fo:wrap-option="wrap" loext:decorative="false" style:run-through="foreground"/>
    </style:style>
    <style:style style:name="gr12" style:family="graphic">
      <style:graphic-properties draw:stroke="solid" svg:stroke-width="0.035cm" svg:stroke-color="#4472c4" draw:stroke-linejoin="miter" svg:stroke-linecap="butt" draw:fill="none" loext:fill-use-slide-background="false" draw:textarea-vertical-align="middle" draw:auto-grow-height="false" fo:min-height="0.947cm" fo:min-width="0cm" fo:padding-top="0.127cm" fo:padding-bottom="0.127cm" fo:padding-left="0.254cm" fo:padding-right="0.254cm" fo:wrap-option="wrap" loext:decorative="false" style:run-through="foreground">
        <loext:stroke-complex-color loext:theme-type="accent5" loext:color-type="theme"/>
      </style:graphic-properties>
    </style:style>
    <style:style style:name="gr13" style:family="graphic">
      <style:graphic-properties style:writing-mode="lr-tb" loext:decorative="false" fo:margin-left="0cm" fo:margin-right="0.002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018cm" draw:fill="none" loext:fill-use-slide-background="false" draw:textarea-vertical-align="top" draw:auto-grow-height="false" fo:min-height="0.559cm" fo:min-width="0.81cm" fo:padding-top="0.127cm" fo:padding-bottom="0.127cm" fo:padding-left="0.254cm" fo:padding-right="0.254cm" fo:wrap-option="wrap" loext:decorative="false" style:run-through="foreground"/>
    </style:style>
    <style:style style:name="gr15" style:family="graphic" style:parent-style-name="Frame">
      <style:graphic-properties draw:stroke="none" svg:stroke-width="0.018cm" draw:fill="none" loext:fill-use-slide-background="false" draw:textarea-vertical-align="top" draw:auto-grow-height="false" fo:min-height="0.559cm" fo:min-width="1.24cm" fo:padding-top="0.127cm" fo:padding-bottom="0.127cm" fo:padding-left="0.254cm" fo:padding-right="0.254cm" fo:wrap-option="wrap" loext:decorative="false" style:run-through="foreground"/>
    </style:style>
    <style:style style:name="gr16" style:family="graphic" style:parent-style-name="Frame">
      <style:graphic-properties draw:stroke="none" svg:stroke-width="0.018cm" draw:fill="none" loext:fill-use-slide-background="false" draw:textarea-vertical-align="top" draw:auto-grow-height="false" fo:min-height="0.561cm" fo:min-width="0.601cm" fo:padding-top="0.127cm" fo:padding-bottom="0.127cm" fo:padding-left="0.254cm" fo:padding-right="0.254cm" fo:wrap-option="wrap" loext:decorative="false" style:run-through="foreground"/>
    </style:style>
    <style:style style:name="gr17" style:family="graphic" style:parent-style-name="Frame">
      <style:graphic-properties draw:stroke="none" svg:stroke-width="0.018cm" draw:fill="none" loext:fill-use-slide-background="false" draw:textarea-vertical-align="top" draw:auto-grow-height="false" fo:min-height="0.559cm" fo:min-width="1.48cm" fo:padding-top="0.127cm" fo:padding-bottom="0.127cm" fo:padding-left="0.254cm" fo:padding-right="0.254cm" fo:wrap-option="wrap" loext:decorative="false" style:run-through="foreground"/>
    </style:style>
    <style:style style:name="gr18" style:family="graphic" style:parent-style-name="Frame">
      <style:graphic-properties draw:stroke="none" svg:stroke-width="0.018cm" draw:fill="none" loext:fill-use-slide-background="false" draw:textarea-vertical-align="top" draw:auto-grow-height="false" fo:min-height="0.559cm" fo:min-width="1.046cm" fo:padding-top="0.127cm" fo:padding-bottom="0.127cm" fo:padding-left="0.254cm" fo:padding-right="0.254cm" fo:wrap-option="wrap" loext:decorative="false" style:run-through="foreground"/>
    </style:style>
    <style:style style:name="gr19" style:family="graphic">
      <style:graphic-properties style:writing-mode="lr-tb" loext:decorative="false" fo:margin-left="0cm" fo:margin-right="0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53cm" svg:stroke-color="#ff0000" draw:stroke-linejoin="miter" svg:stroke-linecap="butt" draw:fill="none" loext:fill-use-slide-background="false" draw:textarea-vertical-align="middle" draw:auto-grow-height="false" fo:min-height="0.296cm" fo:min-width="5.23cm" fo:padding-top="0.127cm" fo:padding-bottom="0.127cm" fo:padding-left="0.254cm" fo:padding-right="0.254cm" fo:wrap-option="wrap" loext:decorative="false" style:run-through="foreground"/>
    </style:style>
    <style:style style:name="gr21" style:family="graphic">
      <style:graphic-properties draw:stroke="solid" svg:stroke-width="0.053cm" svg:stroke-color="#ff0000" draw:stroke-linejoin="miter" svg:stroke-linecap="butt"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22" style:family="graphic">
      <style:graphic-properties style:writing-mode="lr-tb" loext:decorative="false" fo:margin-left="0cm" fo:margin-right="0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53cm" svg:stroke-color="#ff0000" draw:stroke-linejoin="miter" svg:stroke-linecap="butt" draw:fill="none" loext:fill-use-slide-background="false" draw:textarea-vertical-align="middle" draw:auto-grow-height="false" fo:min-height="0.533cm" fo:min-width="3.694cm" fo:padding-top="0.127cm" fo:padding-bottom="0.127cm" fo:padding-left="0.254cm" fo:padding-right="0.254cm" fo:wrap-option="wrap" loext:decorative="false" style:run-through="foreground"/>
    </style:style>
    <style:style style:name="gr24" style:family="graphic">
      <style:graphic-properties draw:stroke="solid" svg:stroke-width="0.053cm" svg:stroke-color="#ff0000" draw:stroke-linejoin="miter" svg:stroke-linecap="butt" draw:fill="none" loext:fill-use-slide-background="false" draw:textarea-vertical-align="middle" draw:auto-grow-height="false" fo:min-height="0.533cm" fo:min-width="1.602cm" fo:padding-top="0.127cm" fo:padding-bottom="0.127cm" fo:padding-left="0.254cm" fo:padding-right="0.254cm" fo:wrap-option="wrap" loext:decorative="false" style:run-through="foreground"/>
    </style:style>
    <style:style style:name="gr25" style:family="graphic">
      <style:graphic-properties draw:stroke="solid" svg:stroke-width="0.053cm" svg:stroke-color="#0070c0" draw:stroke-linejoin="miter" svg:stroke-linecap="butt" draw:fill="none" loext:fill-use-slide-background="false" draw:textarea-vertical-align="middle" draw:auto-grow-height="false" fo:min-height="0.533cm" fo:min-width="3.321cm" fo:padding-top="0.127cm" fo:padding-bottom="0.127cm" fo:padding-left="0.254cm" fo:padding-right="0.254cm" fo:wrap-option="wrap" loext:decorative="false" style:run-through="foreground"/>
    </style:style>
    <style:style style:name="gr26" style:family="graphic">
      <style:graphic-properties style:writing-mode="lr-tb" loext:decorative="false" fo:margin-left="0cm" fo:margin-right="0.026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parent-style-name="Frame">
      <style:graphic-properties draw:stroke="none" svg:stroke-width="0.018cm" draw:fill="none" loext:fill-use-slide-background="false" draw:textarea-vertical-align="top" draw:auto-grow-height="false" fo:min-height="0.561cm" fo:min-width="1.418cm" fo:padding-top="0.127cm" fo:padding-bottom="0.127cm" fo:padding-left="0.254cm" fo:padding-right="0.254cm" fo:wrap-option="wrap" loext:decorative="false" style:run-through="foreground"/>
    </style:style>
    <style:style style:name="gr28" style:family="graphic">
      <style:graphic-properties style:writing-mode="lr-tb" loext:decorative="false" style:run-through="foreground"/>
    </style:style>
    <style:style style:name="gr29" style:family="graphic">
      <style:graphic-properties draw:stroke="solid" svg:stroke-width="0.053cm" svg:stroke-color="#0070c0" draw:stroke-linejoin="miter" svg:stroke-linecap="butt" draw:fill="solid" draw:fill-color="#00b0f0" draw:textarea-vertical-align="middle" draw:auto-grow-height="false" fo:min-height="0.626cm" fo:min-width="0.445cm" fo:padding-top="0.127cm" fo:padding-bottom="0.127cm" fo:padding-left="0.254cm" fo:padding-right="0.254cm" fo:wrap-option="wrap" loext:decorative="false" style:run-through="foreground"/>
    </style:style>
    <style:style style:name="gr30" style:family="graphic" style:parent-style-name="Frame">
      <style:graphic-properties draw:stroke="none" svg:stroke-width="0.018cm" draw:fill="none" loext:fill-use-slide-background="false" draw:textarea-vertical-align="top" draw:auto-grow-height="false" fo:min-height="1.039cm" fo:min-width="1.635cm" fo:padding-top="0.127cm" fo:padding-bottom="0.127cm" fo:padding-left="0.254cm" fo:padding-right="0.254cm" fo:wrap-option="wrap" loext:decorative="false" style:run-through="foreground"/>
    </style:style>
    <style:style style:name="gr31" style:family="graphic" style:parent-style-name="Frame">
      <style:graphic-properties draw:stroke="none" svg:stroke-width="0.018cm" draw:fill="none" loext:fill-use-slide-background="false" draw:textarea-vertical-align="top" draw:auto-grow-height="false" fo:min-height="1.189cm" fo:min-width="3.191cm" fo:padding-top="0.127cm" fo:padding-bottom="0.127cm" fo:padding-left="0.254cm" fo:padding-right="0.254cm" fo:wrap-option="wrap" loext:decorative="false" style:run-through="foreground"/>
    </style:style>
    <style:style style:name="gr32" style:family="graphic" style:parent-style-name="Frame">
      <style:graphic-properties draw:stroke="none" svg:stroke-width="0.018cm" draw:fill="none" loext:fill-use-slide-background="false" draw:textarea-vertical-align="top" draw:auto-grow-height="false" fo:min-height="0cm" fo:min-width="0cm" fo:padding-top="0.127cm" fo:padding-bottom="0.127cm" fo:padding-left="0.254cm" fo:padding-right="0.254cm" fo:wrap-option="wrap" loext:decorative="false" style:run-through="foreground"/>
    </style:style>
    <style:style style:name="gr33" style:family="graphic">
      <style:graphic-properties draw:stroke="solid" svg:stroke-width="0.053cm" svg:stroke-color="#0070c0" draw:stroke-linejoin="miter" svg:stroke-linecap="butt" draw:fill="none" loext:fill-use-slide-background="false" draw:textarea-vertical-align="middle" draw:auto-grow-height="false" fo:min-height="0cm" fo:min-width="0cm" fo:padding-top="0.127cm" fo:padding-bottom="0.127cm" fo:padding-left="0.254cm" fo:padding-right="0.254cm" fo:wrap-option="wrap" loext:decorative="false" style:run-through="foreground"/>
    </style:style>
    <style:style style:name="gr34" style:family="graphic">
      <style:graphic-properties draw:stroke="solid" svg:stroke-width="0.053cm" svg:stroke-color="#0070c0" draw:stroke-linejoin="miter" svg:stroke-linecap="butt" draw:fill="solid" draw:fill-color="#00b0f0" draw:textarea-vertical-align="middle" draw:auto-grow-height="false" fo:min-height="0cm" fo:min-width="0cm" fo:padding-top="0.127cm" fo:padding-bottom="0.127cm" fo:padding-left="0.254cm" fo:padding-right="0.254cm" fo:wrap-option="wrap" loext:decorative="false" style:run-through="foreground"/>
    </style:style>
    <style:style style:name="gr35" style:family="graphic">
      <style:graphic-properties draw:stroke="solid" svg:stroke-width="0.053cm" svg:stroke-color="#00b0f0" draw:marker-end="msArrowEnd_20_5" draw:marker-end-width="0.21cm" draw:marker-end-center="false" draw:stroke-linejoin="miter" svg:stroke-linecap="butt"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36" style:family="graphic">
      <style:graphic-properties draw:stroke="solid" svg:stroke-width="0.035cm" svg:stroke-color="#000000" draw:marker-end="msArrowEnd_20_5" draw:marker-end-width="0.21cm" draw:marker-end-center="false" draw:stroke-linejoin="miter" svg:stroke-linecap="butt" draw:fill="none" loext:fill-use-slide-background="false" draw:textarea-vertical-align="top" draw:auto-grow-height="false" fo:min-height="0cm" fo:min-width="0cm" fo:padding-top="0cm" fo:padding-bottom="0cm" fo:padding-left="0cm" fo:padding-right="0cm" fo:wrap-option="wrap" loext:decorative="false" style:run-through="foreground">
        <loext:stroke-complex-color loext:theme-type="dark1" loext:color-type="theme"/>
      </style:graphic-properties>
    </style:style>
    <style:style style:name="gr37" style:family="graphic" style:parent-style-name="Frame">
      <style:graphic-properties draw:stroke="none" svg:stroke-width="0.018cm" draw:fill="none" loext:fill-use-slide-background="false" draw:textarea-vertical-align="top" draw:auto-grow-height="false" fo:min-height="1.189cm" fo:min-width="3.193cm" fo:padding-top="0.127cm" fo:padding-bottom="0.127cm" fo:padding-left="0.254cm" fo:padding-right="0.254cm" fo:wrap-option="wrap" loext:decorative="false" style:run-through="foreground"/>
    </style:style>
    <style:style style:name="gr38" style:family="graphic">
      <style:graphic-properties draw:stroke="solid" svg:stroke-width="0.053cm" svg:stroke-color="#0070c0" draw:stroke-linejoin="miter" svg:stroke-linecap="butt" draw:fill="none" loext:fill-use-slide-background="false" draw:textarea-vertical-align="top" draw:auto-grow-height="false" fo:min-height="0.628cm" fo:min-width="0.453cm" fo:padding-top="0.125cm" fo:padding-bottom="0.125cm" fo:padding-left="0.25cm" fo:padding-right="0.25cm" fo:wrap-option="wrap" loext:decorative="false" fo:margin-left="0cm" fo:margin-right="0.079cm" fo:margin-top="0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style:writing-mode="lr-tb" loext:decorative="false" fo:margin-left="0cm" fo:margin-right="0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style:writing-mode="lr-tb" loext:decorative="false" fo:margin-left="0cm" fo:margin-right="0cm" fo:margin-top="0.106cm" fo:margin-bottom="0.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stroke="solid" svg:stroke-width="0.035cm" svg:stroke-color="#000000" draw:marker-end="msArrowEnd_20_5" draw:marker-end-width="0.21cm" draw:marker-end-center="false" draw:stroke-linejoin="miter" svg:stroke-linecap="butt" draw:fill="none" loext:fill-use-slide-background="false" draw:textarea-vertical-align="top" draw:auto-grow-height="false" fo:min-height="1.217cm" fo:min-width="0.004cm" fo:padding-top="0cm" fo:padding-bottom="0cm" fo:padding-left="0cm" fo:padding-right="0cm" fo:wrap-option="wrap" loext:decorative="false" style:run-through="foreground">
        <loext:stroke-complex-color loext:theme-type="dark1" loext:color-type="theme"/>
      </style:graphic-properties>
    </style:style>
    <style:style style:name="gr42" style:family="graphic" style:parent-style-name="Frame">
      <style:graphic-properties draw:stroke="none" svg:stroke-width="0.018cm" draw:fill="none" loext:fill-use-slide-background="false" draw:textarea-vertical-align="top" draw:auto-grow-height="false" fo:min-height="0.407cm" fo:min-width="0.923cm" fo:padding-top="0.127cm" fo:padding-bottom="0.127cm" fo:padding-left="0.254cm" fo:padding-right="0.254cm" fo:wrap-option="wrap" loext:decorative="false" style:run-through="foreground"/>
    </style:style>
    <style:style style:name="gr43" style:family="graphic">
      <style:graphic-properties style:writing-mode="lr-tb" loext:decorative="false" fo:margin-left="0cm" fo:margin-right="0cm" fo:margin-top="0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4" style:family="graphic">
      <style:graphic-properties draw:stroke="solid" svg:stroke-width="0.053cm" svg:stroke-color="#ff0000" draw:stroke-linejoin="miter" svg:stroke-linecap="butt" draw:fill="none" loext:fill-use-slide-background="false" draw:textarea-vertical-align="middle" draw:auto-grow-height="false" fo:min-height="0.342cm" fo:min-width="2.498cm" fo:padding-top="0.127cm" fo:padding-bottom="0.127cm" fo:padding-left="0.254cm" fo:padding-right="0.254cm" fo:wrap-option="wrap" loext:decorative="false" style:run-through="foreground"/>
    </style:style>
    <style:style style:name="gr45" style:family="graphic">
      <style:graphic-properties draw:stroke="solid" svg:stroke-width="0.053cm" svg:stroke-color="#ff0000" draw:stroke-linejoin="miter" svg:stroke-linecap="butt" draw:fill="none" loext:fill-use-slide-background="false" draw:textarea-vertical-align="middle" draw:auto-grow-height="false" fo:min-height="0.342cm" fo:min-width="1.596cm" fo:padding-top="0.127cm" fo:padding-bottom="0.127cm" fo:padding-left="0.254cm" fo:padding-right="0.254cm" fo:wrap-option="wrap" loext:decorative="false" style:run-through="foreground"/>
    </style:style>
    <style:style style:name="gr46" style:family="graphic">
      <style:graphic-properties loext:decorative="false" style:run-through="foreground"/>
    </style:style>
    <style:style style:name="gr47" style:family="graphic" style:parent-style-name="Frame">
      <style:graphic-properties draw:stroke="none" svg:stroke-width="0.018cm" draw:fill="none" loext:fill-use-slide-background="false" draw:textarea-vertical-align="top" draw:auto-grow-height="false" fo:min-height="0.559cm" fo:min-width="0.601cm" fo:padding-top="0.127cm" fo:padding-bottom="0.127cm" fo:padding-left="0.254cm" fo:padding-right="0.254cm" fo:wrap-option="wrap" loext:decorative="false" style:run-through="foreground"/>
    </style:style>
    <style:style style:name="gr48" style:family="graphic" style:parent-style-name="Frame">
      <style:graphic-properties draw:stroke="none" svg:stroke-width="0.018cm" draw:fill="none" loext:fill-use-slide-background="false" draw:textarea-vertical-align="top" draw:auto-grow-height="false" fo:min-height="0.559cm" fo:min-width="1.048cm" fo:padding-top="0.127cm" fo:padding-bottom="0.127cm" fo:padding-left="0.254cm" fo:padding-right="0.254cm" fo:wrap-option="wrap" loext:decorative="false" style:run-through="foreground"/>
    </style:style>
    <style:style style:name="gr49" style:family="graphic" style:parent-style-name="Frame">
      <style:graphic-properties draw:stroke="none" svg:stroke-width="0.018cm" draw:fill="none" loext:fill-use-slide-background="false" draw:textarea-vertical-align="top" draw:auto-grow-height="false" fo:min-height="1.028cm" fo:min-width="1.393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0" style:family="graphic">
      <style:graphic-properties style:writing-mode="lr-tb" loext:decorative="false" fo:margin-left="0cm" fo:margin-right="0.055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draw:stroke="solid" svg:stroke-width="0.053cm" svg:stroke-color="#00b050" draw:stroke-linejoin="miter" svg:stroke-linecap="butt" draw:fill="solid" draw:fill-color="#00fa71" draw:textarea-vertical-align="middle" draw:auto-grow-height="false" fo:min-height="0.624cm" fo:min-width="0.445cm" fo:padding-top="0.127cm" fo:padding-bottom="0.127cm" fo:padding-left="0.254cm" fo:padding-right="0.254cm" fo:wrap-option="wrap" loext:decorative="false" style:run-through="foreground"/>
    </style:style>
    <style:style style:name="gr52" style:family="graphic">
      <style:graphic-properties draw:stroke="solid" svg:stroke-width="0.053cm" svg:stroke-color="#385623" draw:marker-end="msArrowEnd_20_5" draw:marker-end-width="0.21cm" draw:marker-end-center="false" draw:stroke-linejoin="miter" svg:stroke-linecap="butt" draw:fill="none" loext:fill-use-slide-background="false" draw:textarea-vertical-align="middle" draw:auto-grow-height="false" fo:min-height="1.743cm" fo:min-width="1.378cm" fo:padding-top="0.127cm" fo:padding-bottom="0.127cm" fo:padding-left="0.254cm" fo:padding-right="0.254cm" fo:wrap-option="wrap" loext:decorative="false" style:run-through="foreground">
        <loext:stroke-complex-color loext:theme-type="accent6" loext:color-type="theme">
          <loext:transformation loext:type="lummod" loext:value="5000"/>
        </loext:stroke-complex-color>
      </style:graphic-properties>
    </style:style>
    <style:style style:name="gr53" style:family="graphic" style:parent-style-name="Frame">
      <style:graphic-properties draw:stroke="none" svg:stroke-width="0.018cm" draw:fill="none" loext:fill-use-slide-background="false" draw:textarea-vertical-align="top" draw:auto-grow-height="false" fo:min-height="0.464cm" fo:min-width="1.635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4" style:family="graphic" style:parent-style-name="Frame">
      <style:graphic-properties draw:stroke="none" svg:stroke-width="0.018cm" draw:fill="none" loext:fill-use-slide-background="false" draw:textarea-vertical-align="top" draw:auto-grow-height="false" fo:min-height="0.586cm" fo:min-width="1.266cm" fo:padding-top="0.127cm" fo:padding-bottom="0.127cm" fo:padding-left="0.254cm" fo:padding-right="0.254cm" fo:wrap-option="wrap" loext:decorative="false" fo:margin-left="0cm" fo:margin-right="0cm" fo:margin-top="0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5" style:family="graphic">
      <style:graphic-properties style:writing-mode="lr-tb" loext:decorative="false" fo:margin-left="0cm" fo:margin-right="0cm" fo:margin-top="0.106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6" style:family="graphic">
      <style:graphic-properties draw:stroke="solid" svg:stroke-width="0.035cm" svg:stroke-color="#000000" draw:marker-end="msArrowEnd_20_5" draw:marker-end-width="0.21cm" draw:marker-end-center="false" draw:stroke-linejoin="miter" svg:stroke-linecap="butt" draw:fill="none" loext:fill-use-slide-background="false" draw:textarea-vertical-align="top" draw:auto-grow-height="false" fo:min-height="1.217cm" fo:min-width="0.005cm" fo:padding-top="0cm" fo:padding-bottom="0cm" fo:padding-left="0cm" fo:padding-right="0cm" fo:wrap-option="wrap" loext:decorative="false" style:run-through="foreground">
        <loext:stroke-complex-color loext:theme-type="dark1" loext:color-type="theme"/>
      </style:graphic-properties>
    </style:style>
    <style:style style:name="gr57" style:family="graphic" style:parent-style-name="Frame">
      <style:graphic-properties draw:stroke="none" svg:stroke-width="0.018cm" draw:fill="none" loext:fill-use-slide-background="false" draw:textarea-vertical-align="top" draw:auto-grow-height="false" fo:min-height="0.407cm" fo:min-width="0.921cm" fo:padding-top="0.127cm" fo:padding-bottom="0.127cm" fo:padding-left="0.254cm" fo:padding-right="0.254cm" fo:wrap-option="wrap" loext:decorative="false" style:run-through="foreground"/>
    </style:style>
    <style:style style:name="gr58" style:family="graphic" style:parent-style-name="Frame">
      <style:graphic-properties draw:stroke="none" svg:stroke-width="0.018cm" draw:fill="none" loext:fill-use-slide-background="false" draw:textarea-vertical-align="top" draw:auto-grow-height="false" fo:min-height="1.028cm" fo:min-width="1.392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graphic-properties style:writing-mode="lr-tb" loext:decorative="false" fo:margin-left="0cm" fo:margin-right="0.078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0" style:family="graphic">
      <style:graphic-properties draw:stroke="solid" svg:stroke-width="0.053cm" svg:stroke-color="#00b050" draw:stroke-linejoin="miter" svg:stroke-linecap="butt" draw:fill="solid" draw:fill-color="#00fa71" draw:textarea-vertical-align="middle" draw:auto-grow-height="false" fo:min-height="0cm" fo:min-width="0cm" fo:padding-top="0.127cm" fo:padding-bottom="0.127cm" fo:padding-left="0.254cm" fo:padding-right="0.254cm" fo:wrap-option="wrap" loext:decorative="false" style:run-through="foreground"/>
    </style:style>
    <style:style style:name="gr61" style:family="graphic">
      <style:graphic-properties draw:stroke="solid" svg:stroke-width="0.053cm" svg:stroke-color="#385623" draw:marker-end="msArrowEnd_20_5" draw:marker-end-width="0.21cm" draw:marker-end-center="false" draw:stroke-linejoin="miter" svg:stroke-linecap="butt" draw:fill="none" loext:fill-use-slide-background="false" draw:textarea-horizontal-align="center" draw:textarea-vertical-align="top" draw:auto-grow-height="false" fo:padding-top="0cm" fo:padding-bottom="0cm" fo:padding-left="0cm" fo:padding-right="0cm" fo:wrap-option="wrap" loext:decorative="false" style:run-through="foreground">
        <loext:stroke-complex-color loext:theme-type="accent6" loext:color-type="theme">
          <loext:transformation loext:type="lummod" loext:value="5000"/>
        </loext:stroke-complex-color>
      </style:graphic-properties>
    </style:style>
    <style:style style:name="gr62" style:family="graphic">
      <style:graphic-properties draw:stroke="solid" svg:stroke-width="0.053cm" svg:stroke-color="#00b050" draw:stroke-linejoin="miter" svg:stroke-linecap="butt" draw:fill="none" loext:fill-use-slide-background="false" draw:textarea-vertical-align="middle" draw:auto-grow-height="false" fo:min-height="0cm" fo:min-width="0cm" fo:padding-top="0.127cm" fo:padding-bottom="0.127cm" fo:padding-left="0.254cm" fo:padding-right="0.254cm" fo:wrap-option="wrap" loext:decorative="false" style:run-through="foreground"/>
    </style:style>
    <style:style style:name="gr63" style:family="graphic">
      <style:graphic-properties draw:stroke="solid" svg:stroke-width="0.053cm" svg:stroke-color="#385623" draw:marker-end="msArrowEnd_20_5" draw:marker-end-width="0.21cm" draw:marker-end-center="false" draw:stroke-linejoin="miter" svg:stroke-linecap="butt" draw:fill="none" loext:fill-use-slide-background="false" draw:textarea-vertical-align="middle" draw:auto-grow-height="false" fo:min-height="0cm" fo:min-width="0cm" fo:padding-top="0.127cm" fo:padding-bottom="0.127cm" fo:padding-left="0.254cm" fo:padding-right="0.254cm" fo:wrap-option="wrap" loext:decorative="false" style:run-through="foreground">
        <loext:stroke-complex-color loext:theme-type="accent6" loext:color-type="theme">
          <loext:transformation loext:type="lummod" loext:value="5000"/>
        </loext:stroke-complex-color>
      </style:graphic-properties>
    </style:style>
    <style:style style:name="gr64" style:family="graphic" style:parent-style-name="Frame">
      <style:graphic-properties draw:stroke="none" svg:stroke-width="0.018cm" draw:fill="none" loext:fill-use-slide-background="false" draw:textarea-vertical-align="top" draw:auto-grow-height="false" fo:min-height="0.587cm" fo:min-width="1.266cm" fo:padding-top="0.127cm" fo:padding-bottom="0.127cm" fo:padding-left="0.254cm" fo:padding-right="0.254cm" fo:wrap-option="wrap" loext:decorative="false" fo:margin-left="0cm" fo:margin-right="0cm" fo:margin-top="0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5" style:family="graphic">
      <style:graphic-properties style:writing-mode="lr-tb" loext:decorative="false" fo:margin-left="0cm" fo:margin-right="0cm" fo:margin-top="0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g text:anchor-type="char" draw:z-index="55" draw:name="Groupe 3" draw:style-name="gr1"><draw:frame draw:name="Image 52" draw:style-name="gr2" draw:text-style-name="P1" svg:width="3.269cm" svg:height="1.084cm" svg:x="1.085cm" svg:y="3.254cm"><draw:image xlink:href="Pictures/10000000000000CA0000004375E9E637.png" xlink:type="simple" xlink:show="embed" xlink:actuate="onLoad" draw:mime-type="image/png"><text:p/></draw:image></draw:frame><draw:frame draw:name="Image 35" draw:style-name="gr2" draw:text-style-name="P1" svg:width="5.425cm" svg:height="3.26cm" svg:x="0cm" svg:y="-0.002cm"><draw:image xlink:href="Pictures/10000001000001D60000011AF0F607A8.png" xlink:type="simple" xlink:show="embed" xlink:actuate="onLoad" draw:mime-type="image/png"><text:p/></draw:image></draw:frame></draw:g></text:p>
      <text:p text:style-name="P2" loext:marker-style-name="T1"><text:span text:style-name="T1">Université de Toulouse</text:span><text:span text:style-name="T1"/></text:p>
      <text:p text:style-name="P2" loext:marker-style-name="T1"><text:span text:style-name="T1">IUT de Blagnac <text:s text:c="19"/></text:span><text:span text:style-name="T1"/></text:p>
      <text:p text:style-name="P2" loext:marker-style-name="T1"><text:span text:style-name="T1">Département Réseaux et Télécoms</text:span><text:span text:style-name="T1"/></text:p>
      <text:p text:style-name="P3"/>
      <text:p text:style-name="P3"/>
      <text:p text:style-name="P3"/>
      <text:p text:style-name="P3"/>
      <text:p text:style-name="Standard"/>
      <text:p text:style-name="P3"/>
      <text:p text:style-name="P3" loext:marker-style-name="T2"><text:span text:style-name="T2">Mettre en place une solution informatique pour l’entreprise</text:span><text:span text:style-name="T2"/></text:p>
      <text:p text:style-name="P4" loext:marker-style-name="T3"/>
      <text:p text:style-name="P5" loext:marker-style-name="T2"><draw:g text:anchor-type="char" draw:z-index="1" draw:name="Group 1008" draw:style-name="gr3"><draw:line draw:name="Line 1009" draw:style-name="gr4" draw:text-style-name="P6" svg:x1="4.132cm" svg:y1="0.905cm" svg:x2="11.752cm" svg:y2="0.906cm"><text:p/></draw:line><draw:line draw:name="Line 1010" draw:style-name="gr4" draw:text-style-name="P6" svg:x1="4.122cm" svg:y1="2.543cm" svg:x2="11.742cm" svg:y2="2.544cm"><text:p/></draw:line></draw:g></text:p>
      <text:p text:style-name="P3" loext:marker-style-name="T4"><text:span text:style-name="T4">Travaux Pratiques SAé23</text:span><text:span text:style-name="T4"/></text:p>
      <text:p text:style-name="P7" loext:marker-style-name="T5"/>
      <text:p text:style-name="P8" loext:marker-style-name="T6"><draw:frame draw:style-name="fr1" draw:name="Image 9" text:anchor-type="char" svg:x="0.201cm" svg:y="0.018cm" svg:width="16.002cm" svg:height="9.957cm" draw:z-index="2"><draw:image xlink:href="Pictures/100000000000038400000230CE0D33C7.png" xlink:type="simple" xlink:show="embed" xlink:actuate="onLoad" draw:mime-type="image/png"/><svg:desc>Les commandes GIT que vous devez absolument connaître !</svg:desc></draw:frame></text:p>
      <text:p text:style-name="P8" loext:marker-style-name="T6"/>
      <text:p text:style-name="P8" loext:marker-style-name="T6"/>
      <text:p text:style-name="P8" loext:marker-style-name="T6"/>
      <text:p text:style-name="P9" loext:marker-style-name="T6"/>
      <text:p text:style-name="P10" loext:marker-style-name="T7"/>
      <text:p text:style-name="P10" loext:marker-style-name="T7"/>
      <text:p text:style-name="P10" loext:marker-style-name="T7"/>
      <text:p text:style-name="P10" loext:marker-style-name="T7"/>
      <text:p text:style-name="P10" loext:marker-style-name="T7"/>
      <text:p text:style-name="P10" loext:marker-style-name="T7"/>
      <text:p text:style-name="P10" loext:marker-style-name="T7"/>
      <text:p text:style-name="P10" loext:marker-style-name="T7"/>
      <text:p text:style-name="P10" loext:marker-style-name="T7"/>
      <text:p text:style-name="P10" loext:marker-style-name="T7"/>
      <text:p text:style-name="P10" loext:marker-style-name="T7"/>
      <text:p text:style-name="P10" loext:marker-style-name="T7"/>
      <text:p text:style-name="P10" loext:marker-style-name="T7"/>
      <text:p text:style-name="P10" loext:marker-style-name="T7"/>
      <text:p text:style-name="P10" loext:marker-style-name="T7"/>
      <text:p text:style-name="P10" loext:marker-style-name="T7"/>
      <text:p text:style-name="P11" loext:marker-style-name="T8"><text:span text:style-name="T8">Nom: </text:span><text:span text:style-name="T9">GASSANT MICHAEL LORVINS</text:span></text:p>
      <text:p text:style-name="P11"/>
      <text:p text:style-name="P11"/>
      <text:p text:style-name="P3" loext:marker-style-name="T10"><text:span text:style-name="T10">Réseaux &amp; Télécoms 1</text:span><text:span text:style-name="T11">ière</text:span><text:span text:style-name="T10"> Année </text:span></text:p>
      <text:p text:style-name="Standard"><text:soft-page-break/></text:p>
      <text:p text:style-name="Standard"/>
      <text:p text:style-name="Standard"/>
      <text:p text:style-name="P12"/>
      <text:p text:style-name="P13" loext:marker-style-name="T12"/>
      <text:p text:style-name="P14" loext:marker-style-name="T12"/>
      <text:p text:style-name="P14" loext:marker-style-name="T12"/>
      <text:p text:style-name="P14" loext:marker-style-name="T12"/>
      <text:p text:style-name="P3" loext:marker-style-name="T12"><text:span text:style-name="T12">Table des matières</text:span><text:span text:style-name="T12"/></text:p>
      <text:p text:style-name="Standard"/>
      <text:p text:style-name="Standard"/>
      <text:p text:style-name="Standard"/>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Internet link"><text:a xlink:type="simple" xlink:href="#_Toc166434093" text:style-name="Index_20_Link" text:visited-style-name="Index_20_Link">1 - Principe de la gestion de version<text:span text:style-name="T13"><text:tab/>2</text:span></text:a></text:p>
          <text:p text:style-name="P15" loext:marker-style-name="T14"/>
          <text:p text:style-name="Contents_20_1"><text:a xlink:type="simple" xlink:href="#_Toc166434094" text:style-name="Index_20_Link" text:visited-style-name="Index_20_Link">2 - Gestion de version d’un site web existant<text:span text:style-name="T13"><text:tab/>4</text:span></text:a></text:p>
          <text:p text:style-name="P15" loext:marker-style-name="T14"/>
          <text:p text:style-name="Contents_20_2" loext:marker-style-name="T15"><text:a xlink:type="simple" xlink:href="#_Toc166434095" text:style-name="Index_20_Link" text:visited-style-name="Index_20_Link">2.1 - Utilisation d’un site web existant<text:span text:style-name="T13"><text:tab/>4</text:span></text:a><text:span text:style-name="T16"/></text:p>
          <text:p text:style-name="Contents_20_2" loext:marker-style-name="T15"><text:a xlink:type="simple" xlink:href="#_Toc166434096" text:style-name="Index_20_Link" text:visited-style-name="Index_20_Link">2.2 - Création d’un compte GitHub<text:span text:style-name="T13"><text:tab/>4</text:span></text:a><text:span text:style-name="T16"/></text:p>
          <text:p text:style-name="Contents_20_2" loext:marker-style-name="T15"><text:a xlink:type="simple" xlink:href="#_Toc166434097" text:style-name="Index_20_Link" text:visited-style-name="Index_20_Link">2.3 - Installation et configuration de Git<text:span text:style-name="T13"><text:tab/>6</text:span></text:a><text:span text:style-name="T16"/></text:p>
          <text:p text:style-name="Contents_20_2" loext:marker-style-name="T15"><text:a xlink:type="simple" xlink:href="#_Toc166434098" text:style-name="Index_20_Link" text:visited-style-name="Index_20_Link">2.4 - Création d’un dépôt Git pour le site web<text:span text:style-name="T13"><text:tab/>8</text:span></text:a><text:span text:style-name="T16"/></text:p>
          <text:p text:style-name="Contents_20_2" loext:marker-style-name="T15"><text:a xlink:type="simple" xlink:href="#_Toc166434099" text:style-name="Index_20_Link" text:visited-style-name="Index_20_Link">2.5 - Création d’un dépôt distant sur GitHub pour le site web<text:span text:style-name="T13"><text:tab/>12</text:span></text:a><text:span text:style-name="T16"/></text:p>
          <text:p text:style-name="Contents_20_2"><text:a xlink:type="simple" xlink:href="#_Toc166434100" text:style-name="Index_20_Link" text:visited-style-name="Index_20_Link">2.6 - Bilan<text:span text:style-name="T13"><text:tab/>15</text:span></text:a></text:p>
          <text:p text:style-name="P15" loext:marker-style-name="T14"/>
          <text:p text:style-name="Contents_20_1" loext:marker-style-name="T17"><text:a xlink:type="simple" xlink:href="#_Toc166434101" text:style-name="Index_20_Link" text:visited-style-name="Index_20_Link">3 - Récupération d’une version et gestion avancée des versions<text:span text:style-name="T13"><text:tab/>16</text:span></text:a><text:span text:style-name="T18"/></text:p>
          <text:p text:style-name="Contents_20_2" loext:marker-style-name="T15"><text:a xlink:type="simple" xlink:href="#_Toc166434102" text:style-name="Index_20_Link" text:visited-style-name="Index_20_Link">3.1 - Clonage d’un dépôt<text:span text:style-name="T13"><text:tab/>16</text:span></text:a><text:span text:style-name="T16"/></text:p>
          <text:p text:style-name="Contents_20_2" loext:marker-style-name="T15"><text:a xlink:type="simple" xlink:href="#_Toc166434103" text:style-name="Index_20_Link" text:visited-style-name="Index_20_Link">3.2 - Gestion de version<text:span text:style-name="T13"><text:tab/>17</text:span></text:a><text:span text:style-name="T16"/></text:p>
          <text:p text:style-name="Contents_20_2" loext:marker-style-name="T15"><text:a xlink:type="simple" xlink:href="#_Toc166434104" text:style-name="Index_20_Link" text:visited-style-name="Index_20_Link">3.3 - Gestion de l’historique<text:span text:style-name="T13"><text:tab/>21</text:span></text:a><text:span text:style-name="T16"/></text:p>
          <text:p text:style-name="Contents_20_2" loext:marker-style-name="T15"><text:a xlink:type="simple" xlink:href="#_Toc166434105" text:style-name="Index_20_Link" text:visited-style-name="Index_20_Link">3.4 - Exploitation des branches de l’historique<text:span text:style-name="T13"><text:tab/>27</text:span></text:a><text:span text:style-name="T16"/></text:p>
          <text:p text:style-name="Contents_20_2"><text:a xlink:type="simple" xlink:href="#_Toc166434106" text:style-name="Index_20_Link" text:visited-style-name="Index_20_Link">3.5 - Gestion et visualisation avancées des branches<text:span text:style-name="T13"><text:tab/>33</text:span></text:a></text:p>
          <text:p text:style-name="P15" loext:marker-style-name="T14"/>
          <text:p text:style-name="Contents_20_1"><text:a xlink:type="simple" xlink:href="#_Toc166434107" text:style-name="Index_20_Link" text:visited-style-name="Index_20_Link">4 - Formation complémentaire<text:span text:style-name="T13"><text:tab/>37</text:span></text:a></text:p>
          <text:p text:style-name="P15" loext:marker-style-name="T14"/>
          <text:p text:style-name="Contents_20_1" loext:marker-style-name="T17"><text:a xlink:type="simple" xlink:href="#_Toc166434108" text:style-name="Index_20_Link" text:visited-style-name="Index_20_Link">5 - Aide-mémoire Git<text:span text:style-name="T13"><text:tab/>37</text:span></text:a><text:span text:style-name="T18"/></text:p>
          <text:p text:style-name="Contents_20_2" loext:marker-style-name="T15"><text:a xlink:type="simple" xlink:href="#_Toc166434109" text:style-name="Index_20_Link" text:visited-style-name="Index_20_Link">5.1 - Initialisation d’un dépôt Git<text:span text:style-name="T13"><text:tab/>37</text:span></text:a><text:span text:style-name="T16"/></text:p>
          <text:p text:style-name="Contents_20_2" loext:marker-style-name="T15"><text:a xlink:type="simple" xlink:href="#_Toc166434110" text:style-name="Index_20_Link" text:visited-style-name="Index_20_Link">5.2 - Gestion des branches Git<text:span text:style-name="T13"><text:tab/>38</text:span></text:a><text:span text:style-name="T16"/></text:p>
          <text:p text:style-name="Contents_20_2" loext:marker-style-name="T15"><text:a xlink:type="simple" xlink:href="#_Toc166434111" text:style-name="Index_20_Link" text:visited-style-name="Index_20_Link">5.3 - Gestion des commits Git<text:span text:style-name="T13"><text:tab/>38</text:span></text:a><text:span text:style-name="T16"/></text:p>
          <text:p text:style-name="Contents_20_2" loext:marker-style-name="T15"><text:a xlink:type="simple" xlink:href="#_Toc166434112" text:style-name="Index_20_Link" text:visited-style-name="Index_20_Link">5.4 - Gestion des conflits de fusion<text:span text:style-name="T13"><text:tab/>38</text:span></text:a><text:span text:style-name="T16"/></text:p>
          <text:p text:style-name="Contents_20_2" loext:marker-style-name="T15"><text:a xlink:type="simple" xlink:href="#_Toc166434113" text:style-name="Index_20_Link" text:visited-style-name="Index_20_Link">5.5 - Gestion des tags Git<text:span text:style-name="T13"><text:tab/>39</text:span></text:a></text:p>
        </text:index-body>
      </text:table-of-content>
      <text:p text:style-name="Standard"/>
      <text:p text:style-name="P11"/>
      <text:p text:style-name="P16"/>
      <text:p text:style-name="Standard"/>
      <text:h text:style-name="Heading_20_1" text:outline-level="1" loext:marker-style-name="T19"><text:bookmark-start text:name="_Toc166434093"/><text:span text:style-name="T19">Principe de la gestion de version</text:span><text:bookmark-end text:name="_Toc166434093"/><text:span text:style-name="T19"/></text:h>
      <text:p text:style-name="Standard"/>
      <text:p text:style-name="Mon_5f_texte">En entreprise, seule une petite minorité de solutions informatiques (logiciels, applications, sites Web…) sont conçues par un seul développeur. La grande majorité des projets est réalisée et/ou maintenue par une équipe de plusieurs personnes travaillant sur la même base de fichiers. Ce travail en parallèle est source de complexité :</text:p>
      <text:list text:style-name="WWNum4">
        <text:list-item>
          <text:p text:style-name="P17">Comment récupérer le travail d'un autre membre de l'équipe ?</text:p>
        </text:list-item>
        <text:list-item>
          <text:p text:style-name="P17">Comment publier/partager ses propres modifications ?</text:p>
        </text:list-item>
        <text:list-item>
          <text:p text:style-name="P17">Comment faire en cas de modifications conflictuelles (travail sur le même fichier d'un ou plusieurs collègues) ?</text:p>
        </text:list-item>
        <text:list-item>
          <text:p text:style-name="P17">Comment accéder/revenir à une version précédente ?</text:p>
        </text:list-item>
      </text:list>
      <text:p text:style-name="P18"/>
      <text:p text:style-name="Mon_5f_texte">Pour les raisons précédentes, toute solution informatique d'entreprise (même mono-développeur) doit faire l'objet d'une gestion des versions (<text:span text:style-name="T20">V</text:span>ersion <text:span text:style-name="T20">C</text:span>ontrol <text:span text:style-name="T20">S</text:span>ystem ou versioning en anglais). </text:p>
      <text:p text:style-name="Mon_5f_texte"/>
      <text:p text:style-name="Mon_5f_texte">La gestion des versions vise les objectifs suivants :</text:p>
      <text:list text:continue-numbering="true" text:style-name="WWNum4">
        <text:list-item>
          <text:p text:style-name="P17">assurer la pérennité des projets/solutions informatiques.</text:p>
        </text:list-item>
        <text:list-item>
          <text:p text:style-name="P17">permettre le travail collaboratif.</text:p>
        </text:list-item>
        <text:list-item>
          <text:p text:style-name="P17">fournir une gestion de l'historique des projets/solutions informatiques.</text:p>
        </text:list-item>
        <text:list-item>
          <text:p text:style-name="P17">fournir une information sur la nature des modifications réalisées.</text:p>
        </text:list-item>
      </text:list>
      <text:p text:style-name="Mon_5f_texte"/>
      <text:p text:style-name="Mon_5f_texte">La gestion des versions la plus basique consiste à déposer les fichiers sur un <text:span text:style-name="T20">dossier partagé</text:span> par l'équipe de développement et à créer des copies dans un autre dossier, pour assurer une sauvegarde en cas d’incidents. Si elle permet à tous de récupérer les fichiers, elle n'offre aucune solution aux autres complexités du développement en équipe et n'autorise pas la gestion simple des versions. Enfin elle n’est absolument pas à l’abri d’une erreur humaine (suppression de fichiers, suppression de répertoire, modification accidentelle de fichiers…).</text:p>
      <text:p text:style-name="Mon_5f_texte"/>
      <text:p text:style-name="Mon_5f_texte">Dans ce TP, vous allez apprendre à utiliser le gestionnaire de versions <text:span text:style-name="T20">Git </text:span>et le service<text:span text:style-name="T20"> GitHub</text:span>, afin de pouvoir gérer au mieux votre travail de groupe lors de cette SAé. Ils vous seront également utiles pour les futures SAé des futurs semestres.</text:p>
      <text:p text:style-name="Mon_5f_texte"/>
      <text:p text:style-name="Mon_5f_texte">Git (qui signifie <text:span text:style-name="T20">idiot</text:span> en argot américain) est le système de contrôle de version le plus largement utilisé aujourd'hui. A l’origine, il a été créé, par Linus Torvalds en 2005, pour être un outil simple afin de faciliter le développement du noyau Linux. </text:p>
      <text:p text:style-name="Mon_5f_texte">C’est un outil que vous utiliserez <text:span text:style-name="T20">pour créer un dépôt local (</text:span>c’est-à-dire un espace de stockage, "repository" ou même "repo" en anglais) et<text:span text:style-name="T20"> pour gérer les versions des fichiers</text:span>.<text:span text:style-name="T20"> </text:span>Cet outil possède les caractéristiques suivantes :</text:p>
      <text:list text:continue-numbering="true" text:style-name="WWNum4">
        <text:list-item>
          <text:p text:style-name="P17">utilisation de la ligne de commande, qui est le seul moyen d’accès à toutes les commandes Git.</text:p>
        </text:list-item>
        <text:list-item>
          <text:p text:style-name="P17">disponible sur toutes les plates-formes (GNU/Linux, Windows, Solaris et Mac).</text:p>
        </text:list-item>
        <text:list-item>
          <text:p text:style-name="P17"><text:soft-page-break/>structure décentralisée : l’historique complet des fichiers n’est pas conservé dans un unique emplacement. Chaque copie d’un fichier correspond à un nouveau dépôt dans lequel est conservé l’historique des modifications.</text:p>
        </text:list-item>
        <text:list-item>
          <text:p text:style-name="P17">logiciel libre / open source.</text:p>
        </text:list-item>
      </text:list>
      <text:p text:style-name="Mon_5f_texte"/>
      <text:p text:style-name="Mon_5f_texte"><text:span text:style-name="T20">GitHub est un service en ligne</text:span> qui héberge votre dépôt initialement local dans le cloud. Dans ce cas, on parle <text:span text:style-name="T20">de dépôt distant</text:span> puisqu’il n’est pas stocké sur votre machine. C’est le plus grand hébergeur de dépôts Git du monde.</text:p>
      <text:p text:style-name="Mon_5f_texte">Une grande partie des dépôts hébergés sur GitHub sont publics. Ce qui signifie que n’importe qui peut télécharger les fichiers de ces dépôts et contribuer éventuellement à leur développement en proposant de nouvelles fonctionnalités (sauf si le propriétaire du projet ne le permet pas, bien entendu).</text:p>
      <text:p text:style-name="Mon_5f_texte">Ainsi à partir de GitHub, vous allez pouvoir cloner des projets (dépôts) publics, dupliquer ("fork") des projets ou encore contribuer à des projets en proposant des modifications ("pull request").</text:p>
      <text:p text:style-name="Mon_5f_texte"/>
      <text:p text:style-name="Mon_5f_texte">Pour information :</text:p>
      <text:list text:continue-numbering="true" text:style-name="WWNum4">
        <text:list-item>
          <text:p text:style-name="P17">GitHub a été racheté par Microsoft en 2018</text:p>
        </text:list-item>
        <text:list-item>
          <text:p text:style-name="P17">Différentes offres GitHub : <text:a xlink:type="simple" xlink:href="https://fr.github.com/pricing.html" text:style-name="Internet_20_link" text:visited-style-name="Visited_20_Internet_20_Link"><text:span text:style-name="Internet_20_link">https://fr.github.com/pricing.html</text:span></text:a> </text:p>
        </text:list-item>
        <text:list-item>
          <text:p text:style-name="P17">GitLab et Bitbucket sont des alternatives à GitHub</text:p>
        </text:list-item>
      </text:list>
      <text:p text:style-name="Mon_5f_texte"><draw:frame draw:style-name="fr1" draw:name="Image 124" text:anchor-type="char" svg:x="-0.064cm" svg:y="0.326cm" svg:width="16.002cm" svg:height="6.209cm" draw:z-index="10"><draw:image xlink:href="Pictures/100000000000056B0000021A2AE39FD5.png" xlink:type="simple" xlink:show="embed" xlink:actuate="onLoad" draw:mime-type="image/png"/></draw:frame></text:p>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text:span text:style-name="T21">En résumé</text:span> :</text:p>
      <text:list xml:id="list181001881063846" text:continue-numbering="true" text:style-name="WWNum4">
        <text:list-item>
          <text:p text:style-name="P17">Un <text:span text:style-name="T20">dépôt</text:span> ("<text:span text:style-name="T20">repository</text:span>" ou même "repo") est comme un dossier qui conserve un historique des versions et des modifications d’un projet. Il est essentiel pour travailler en équipe ou collaborer à un projet open source déjà existant.</text:p>
        </text:list-item>
        <text:list-item>
          <text:p text:style-name="P17">Un dépôt local est l’endroit où l’on stocke, sur sa machine, une copie d’un projet, ses différentes versions et l’historique des modifications.</text:p>
        </text:list-item>
        <text:list-item>
          <text:p text:style-name="P17">Un dépôt distant est une version dématérialisée du dépôt local. Il permet de centraliser le travail des développeurs dans un projet collectif.</text:p>
        </text:list-item>
        <text:list-item>
          <text:p text:style-name="P17">Il existe plusieurs services en ligne pour héberger un dépôt distant, GitHub étant l’un des plus populaires.</text:p>
        </text:list-item>
      </text:list>
      <text:p text:style-name="P19" loext:marker-style-name="T22"/>
      <text:p text:style-name="P20"/>
      <text:h text:style-name="Heading_20_1" text:outline-level="1" loext:marker-style-name="T19"><text:bookmark-start text:name="_Toc166434094"/><text:span text:style-name="T19">Gestion de version d’un site web existant</text:span><text:bookmark-end text:name="_Toc166434094"/><text:span text:style-name="T19"/></text:h>
      <text:p text:style-name="Standard"/>
      <text:h text:style-name="P21" text:outline-level="2"><text:bookmark-start text:name="_Toc166434095"/>Utilisation d’un site web existant<text:bookmark-end text:name="_Toc166434095"/></text:h>
      <text:p text:style-name="P22" loext:marker-style-name="T23"/>
      <text:p text:style-name="Mon_5f_texte">Démarrez votre poste de travail sous Windows (à l’aide de vos identifiants personnels si possible).</text:p>
      <text:p text:style-name="Mon_5f_texte">Copiez sur votre Bureau Windows le dossier <text:span text:style-name="T24">36th_americas_cup</text:span> à partir du serveur de fichiers <text:span text:style-name="T20">S2022</text:span> (<text:a xlink:type="simple" xlink:href="../../../../..//192.168.100.1/Public/BUT1/SAé23" text:style-name="Internet_20_link" text:visited-style-name="Visited_20_Internet_20_Link"><text:span text:style-name="Internet_20_link">\\192.168.100.1\Public\BUT1\SAé23</text:span></text:a>) ou de la version zippée disponible sur Iris. Ouvrez ensuite la page <text:span text:style-name="T20">index.html</text:span> dans un navigateur et validez le bon accès aux différentes pages du site web.</text:p>
      <text:p text:style-name="P23" loext:marker-style-name="T25"/>
      <text:p text:style-name="P24" loext:marker-style-name="T25"><text:span text:style-name="T25">Vous devez obtenir une page d’accueil qui ressemble à celle-ci : </text:span><text:span text:style-name="T25"/></text:p>
      <text:p text:style-name="P23" loext:marker-style-name="T25"><draw:frame draw:style-name="fr1" draw:name="Image 10" text:anchor-type="char" svg:x="-0.208cm" svg:y="0.376cm" svg:width="16.485cm" svg:height="13.127cm" draw:z-index="3"><draw:image xlink:href="Pictures/10000000000004BC000003C68FAF1FA9.png" xlink:type="simple" xlink:show="embed" xlink:actuate="onLoad" draw:mime-type="image/png"/></draw:frame></text:p>
      <text:p text:style-name="P23" loext:marker-style-name="T25"/>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
      <text:h text:style-name="P21" text:outline-level="2"><text:bookmark-start text:name="_Toc166434096"/>Création d’un compte GitHub<text:bookmark-end text:name="_Toc166434096"/></text:h>
      <text:p text:style-name="P25" loext:marker-style-name="T23"/>
      <text:p text:style-name="Mon_5f_texte">Accédez à la page d’accueil de GitHub (<text:a xlink:type="simple" xlink:href="https://github.com/" text:style-name="Internet_20_link" text:visited-style-name="Visited_20_Internet_20_Link"><text:span text:style-name="Internet_20_link">https://github.com</text:span></text:a>) et cliquez sur <text:span text:style-name="T26">Sign up </text:span>en haut à droite de l’écran :</text:p>
      <text:p text:style-name="Mon_5f_texte"><draw:g text:anchor-type="char" draw:z-index="56" draw:name="Groupe 48" draw:style-name="gr5"><draw:frame draw:name="Image 46" draw:style-name="gr2" draw:text-style-name="P1" svg:width="16.961cm" svg:height="8.706cm" svg:x="-0.249cm" svg:y="0.011cm"><draw:image xlink:href="Pictures/100000000000058B000002D744B9A33C.png" xlink:type="simple" xlink:show="embed" xlink:actuate="onLoad" draw:mime-type="image/png"><text:p/></draw:image></draw:frame><draw:custom-shape draw:name="Rectangle 47" draw:style-name="gr6" draw:text-style-name="P6" svg:width="1.163cm" svg:height="0.634cm" svg:x="15.39cm" svg:y="0.0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p>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Complétez le formulaire proposé par un e-mail, un mot de passe et un nom d’utilisateur pour vous inscrire. Un code de vérification vous sera envoyé sur votre adresse e-mail afin de confirmer votre identité. Vous pouvez ensuite sauter la personnalisation en cliquant sur <text:span text:style-name="T26">Skip personalization</text:span>.</text:p>
      <text:p text:style-name="Mon_5f_texte"/>
      <text:p text:style-name="Mon_5f_texte"><draw:frame draw:style-name="fr1" draw:name="Image 925" text:anchor-type="char" svg:x="0.088cm" svg:y="0.66cm" svg:width="16.002cm" svg:height="10.292cm" draw:z-index="4"><draw:image xlink:href="Pictures/100000000000040D0000029B0F7472CE.png" xlink:type="simple" xlink:show="embed" xlink:actuate="onLoad" draw:mime-type="image/png"/></draw:frame>Vous pouvez découvrir cette interface assez facile à prendre en main et simple d’utilisation :</text:p>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Vous reviendrez par la suite sur votre compte GitHub.</text:p>
      <text:p text:style-name="Mon_5f_texte"/>
      <text:h text:style-name="P21" text:outline-level="2"><text:bookmark-start text:name="_Toc166434097"/><draw:frame draw:style-name="fr1" draw:name="Image 111" text:anchor-type="char" svg:x="10.56cm" svg:y="-0.323cm" svg:width="5.655cm" svg:height="2.708cm" draw:z-index="5"><draw:image xlink:href="Pictures/10000000000000D600000066A56B1D87.png" xlink:type="simple" xlink:show="embed" xlink:actuate="onLoad" draw:mime-type="image/png"/></draw:frame><text:soft-page-break/>Installation et configuration de Git<text:bookmark-end text:name="_Toc166434097"/></text:h>
      <text:p text:style-name="P26" loext:marker-style-name="T23"/>
      <text:p text:style-name="P27">Pour assurer la gestion de version du projet en cours <text:line-break/>(et des futurs projets par la suite), il faut installer Git sur <text:line-break/>votre machine.</text:p>
      <text:p text:style-name="Mon_5f_texte"/>
      <text:p text:style-name="Mon_5f_texte">A partir de la page de téléchargement de Git (<text:a xlink:type="simple" xlink:href="https://git-scm.com/downloads" text:style-name="Internet_20_link" text:visited-style-name="Visited_20_Internet_20_Link"><text:span text:style-name="Internet_20_link">https://git-scm.com/downloads</text:span></text:a>), téléchargez la dernière version de Git (actuellement version : 2.54.0).</text:p>
      <text:p text:style-name="Mon_5f_texte"><draw:frame draw:style-name="fr1" draw:name="Image 4" text:anchor-type="char" svg:x="0.386cm" svg:y="0.072cm" svg:width="16.002cm" svg:height="6.428cm" draw:z-index="154"><draw:image xlink:href="Pictures/10000000000002A00000010EA319C734.png" xlink:type="simple" xlink:show="embed" xlink:actuate="onLoad" draw:mime-type="image/png"/></draw:frame></text:p>
      <text:p text:style-name="Mon_5f_texte"/>
      <text:p text:style-name="Mon_5f_texte"/>
      <text:p text:style-name="Mon_5f_texte"/>
      <text:p text:style-name="Mon_5f_texte"/>
      <text:p text:style-name="Mon_5f_texte"/>
      <text:p text:style-name="Mon_5f_texte"/>
      <text:p text:style-name="Mon_5f_texte"/>
      <text:p text:style-name="Mon_5f_texte"/>
      <text:p text:style-name="P26" loext:marker-style-name="T23"/>
      <text:p text:style-name="Mon_5f_texte"/>
      <text:p text:style-name="Mon_5f_texte"><draw:frame draw:style-name="fr1" draw:name="Image 1" text:anchor-type="char" svg:x="7.08cm" svg:y="1.593cm" svg:width="9.019cm" svg:height="6.999cm" draw:z-index="155"><draw:image xlink:href="Pictures/1000000000000256000001D04B058882.png" xlink:type="simple" xlink:show="embed" xlink:actuate="onLoad" draw:mime-type="image/png"/></draw:frame>Exécutez le fichier que vous venez de télécharger. Lors de l’installation, laissez toutes <text:span text:style-name="T20">les options par défaut</text:span>, elles conviennent bien, en cliquant sur <text:span text:style-name="T26">Next </text:span>à chaque fenêtre puis sur <text:span text:style-name="T26">Install</text:span>. </text:p>
      <text:p text:style-name="Mon_5f_texte"/>
      <text:p text:style-name="Mon_5f_texte"/>
      <text:p text:style-name="Mon_5f_texte"/>
      <text:p text:style-name="P27"/>
      <text:p text:style-name="P27">Cochez ensuite <text:span text:style-name="T26">Launch Git Bash</text:span>,<text:line-break/>et cliquez sur <text:span text:style-name="T26">Finish</text:span>. </text:p>
      <text:p text:style-name="Mon_5f_texte"/>
      <text:p text:style-name="Mon_5f_texte"/>
      <text:p text:style-name="P28" loext:marker-style-name="T27"/>
      <text:p text:style-name="Mon_5f_texte"/>
      <text:p text:style-name="P18"/>
      <text:p text:style-name="Mon_5f_texte"/>
      <text:p text:style-name="Mon_5f_texte">Git Bash est l’interface permettant d’utiliser Git en ligne de commande. Comme son nom l’indique, vous devrez utiliser les commandes usuelles Bash. </text:p>
      <text:p text:style-name="Mon_5f_texte"/>
      <text:p text:style-name="Mon_5f_texte">Lancez la commande <text:span text:style-name="T26">git --version</text:span></text:p>
      <text:p text:style-name="Standard">Résultat :</text:p>
      <text:p text:style-name="Standard" loext:marker-style-name="T28"><text:span text:style-name="T29">michael.gassant@RT-E208-PC14 </text:span><text:span text:style-name="T30">MINGW64 </text:span><text:span text:style-name="T28">~</text:span></text:p>
      <text:p text:style-name="Standard" loext:marker-style-name="T31"><text:span text:style-name="T31">$ git --version</text:span><text:span text:style-name="T31"/></text:p>
      <text:p text:style-name="Standard" loext:marker-style-name="T31"><text:span text:style-name="T31">git version 2.54.0.windows.1</text:span></text:p>
      <text:p text:style-name="Mon_5f_texte"/>
      <text:p text:style-name="Mon_5f_texte"><text:soft-page-break/>Vous disposez d’une aide distante complète (https://git-scm.com/book/fr/v2), mais également d’une aide locale détaillée accessible par les commandes <text:span text:style-name="T26">git help &lt;commande&gt;</text:span> et <text:span text:style-name="T26">git &lt;commande&gt; --help</text:span></text:p>
      <text:p text:style-name="Standard"/>
      <text:p text:style-name="Mon_5f_texte">Lancez par exemple la commande <text:span text:style-name="T26">git config --help</text:span></text:p>
      <text:p text:style-name="Standard">Résultat :</text:p>
      <text:p text:style-name="P29">Redirection vers la page help de git :</text:p>
      <text:p text:style-name="P29"/>
      <text:p text:style-name="P30"><draw:frame draw:style-name="fr2" draw:name="Image3" text:anchor-type="char" svg:x="0cm" svg:y="0.333cm" svg:width="16cm" svg:height="14.774cm" draw:z-index="156"><draw:image xlink:href="Pictures/10000001000003EE000003A1AE679998.png" xlink:type="simple" xlink:show="embed" xlink:actuate="onLoad" draw:mime-type="image/png"/></draw:frame></text:p>
      <text:p text:style-name="Standard"/>
      <text:p text:style-name="Mon_5f_texte">Lancez ensuite la commande <text:span text:style-name="T26">git config -h</text:span></text:p>
      <text:p text:style-name="Standard">Résultat et différence par rapport aux cas précédents :</text:p>
      <text:p text:style-name="Standard"/>
      <text:p text:style-name="P31" loext:marker-style-name="T28"><text:span text:style-name="T29">michael.gassant@RT-E208-PC14 </text:span><text:span text:style-name="T30">MINGW64 </text:span><text:span text:style-name="T28">~</text:span></text:p>
      <text:p text:style-name="P31" loext:marker-style-name="T31"><text:span text:style-name="T31">$ git config -h</text:span></text:p>
      <text:p text:style-name="P31" loext:marker-style-name="T31"><text:span text:style-name="T31">usage: git config list [&lt;file-option&gt;] [&lt;display-option&gt;] [--includes]</text:span></text:p>
      <text:p text:style-name="P31" loext:marker-style-name="T31"><text:span text:style-name="T31"><text:s text:c="3"/>or: git config get [&lt;file-option&gt;] [&lt;display-option&gt;] [--includes] [--all] [--regexp] [--value=&lt;pattern&gt;] [--fixed-value] [--default=&lt;default&gt;] [--url=&lt;url&gt;] &lt;name&gt;</text:span></text:p>
      <text:p text:style-name="P31" loext:marker-style-name="T31"><text:span text:style-name="T31"><text:s text:c="3"/>or: git config set [&lt;file-option&gt;] [--type=&lt;type&gt;] [--all] [--value=&lt;pattern&gt;] [--fixed-value] &lt;name&gt; &lt;value&gt;</text:span></text:p>
      <text:p text:style-name="P31" loext:marker-style-name="T31"><text:span text:style-name="T31"><text:s text:c="3"/>or: git config unset [&lt;file-option&gt;] [--all] [--value=&lt;pattern&gt;] [--fixed-value] &lt;name&gt;</text:span></text:p>
      <text:p text:style-name="P31" loext:marker-style-name="T31"><text:soft-page-break/><text:span text:style-name="T31"><text:s text:c="3"/>or: git config rename-section [&lt;file-option&gt;] &lt;old-name&gt; &lt;new-name&gt;</text:span></text:p>
      <text:p text:style-name="P31" loext:marker-style-name="T31"><text:span text:style-name="T31"><text:s text:c="3"/>or: git config remove-section [&lt;file-option&gt;] &lt;name&gt;</text:span></text:p>
      <text:p text:style-name="P31" loext:marker-style-name="T31"><text:span text:style-name="T31"><text:s text:c="3"/>or: git config edit [&lt;file-option&gt;]</text:span></text:p>
      <text:p text:style-name="P31" loext:marker-style-name="T31"><text:span text:style-name="T31"><text:s text:c="3"/>or: git config [&lt;file-option&gt;] --get-colorbool &lt;name&gt; [&lt;stdout-is-tty&gt;]</text:span></text:p>
      <text:p text:style-name="Réponse"/>
      <text:p text:style-name="Réponse"/>
      <text:p text:style-name="P18"/>
      <text:p text:style-name="Mon_5f_texte">Maintenant que Git est installé, vous pouvez personnaliser votre environnement Git. Vous ne devriez avoir à réaliser ces réglages qu’une seule fois ; ils persisteront lors des mises à jour. Cependant, si nécessaire, vous pourrez les changer à tout instant en relançant les mêmes commandes. </text:p>
      <text:p text:style-name="Mon_5f_texte">La première chose à faire après l’installation de Git est de renseigner votre nom et votre adresse de courriel. Il est important (surtout en équipe) de savoir qui a fait quoi, tapez alors les commandes suivantes :</text:p>
      <text:list text:continue-numbering="true" text:style-name="WWNum4">
        <text:list-item>
          <text:p text:style-name="P17"><text:span text:style-name="T26">git config --global user.name "Votre Nom"</text:span></text:p>
        </text:list-item>
        <text:list-item>
          <text:p text:style-name="P17"><text:span text:style-name="T26">git config --global user.email votre.nom@email.com</text:span></text:p>
        </text:list-item>
      </text:list>
      <text:p text:style-name="Mon_5f_texte"/>
      <text:p text:style-name="Mon_5f_texte">Puis, finissez la première configuration de Git par les commandes suivantes  :</text:p>
      <text:list text:continue-numbering="true" text:style-name="WWNum4">
        <text:list-item>
          <text:p text:style-name="P17" loext:marker-style-name="T26"><text:span text:style-name="T26">git config --global color.diff auto </text:span><text:span text:style-name="T26"/></text:p>
        </text:list-item>
        <text:list-item>
          <text:p text:style-name="P17" loext:marker-style-name="T26"><text:span text:style-name="T26">git config --global color.status auto </text:span><text:span text:style-name="T26"/></text:p>
        </text:list-item>
        <text:list-item>
          <text:p text:style-name="P17" loext:marker-style-name="T26"><text:span text:style-name="T26">git config --global color.branch auto</text:span><text:span text:style-name="T26"/></text:p>
        </text:list-item>
        <text:list-item>
          <text:p text:style-name="P17" loext:marker-style-name="T26"><text:span text:style-name="T26">git config --global init.defaultBranch main</text:span><text:span text:style-name="T26"/></text:p>
        </text:list-item>
        <text:list-item>
          <text:p text:style-name="P17" loext:marker-style-name="T26"><text:span text:style-name="T26">git config --global core.editor nano</text:span><text:span text:style-name="T26"/></text:p>
        </text:list-item>
        <text:list-item>
          <text:p text:style-name="P32" loext:marker-style-name="T26"><text:span text:style-name="T26">git config --global merge.tool vimdiff</text:span><text:span text:style-name="T26"/></text:p>
        </text:list-item>
        <text:list-item>
          <text:p text:style-name="P32" loext:marker-style-name="T26"><text:span text:style-name="T26">git config --global push.default simple</text:span><text:span text:style-name="T26"/></text:p>
        </text:list-item>
      </text:list>
      <text:p text:style-name="Mon_5f_texte"/>
      <text:p text:style-name="Standard">En vous aidant de la documentation, précisez le rôle de ces commandes :</text:p>
      <text:p text:style-name="Réponse"/>
      <text:p text:style-name="P33">1<text:span text:style-name="T32">er</text:span> partie :</text:p>
      <text:p text:style-name="P33">git config –global user.name → permet definir le nom d’utilisateur</text:p>
      <text:p text:style-name="P33">git config –global user.mail → permet de contacter la personnels</text:p>
      <text:p text:style-name="P33"/>
      <text:p text:style-name="P33">color.diff → defini la couleur de diffusion</text:p>
      <text:p text:style-name="P33">color.status → l’environnement decide de manière automatique les defferents status de l’opération</text:p>
      <text:p text:style-name="P33">color.branch → couleur de la branches</text:p>
      <text:p text:style-name="P33">init.defaultBranch main → initialise par défaut la branch principalement</text:p>
      <text:p text:style-name="P33">cored.editor nano → defini l’editeur principale pour les modifications</text:p>
      <text:p text:style-name="P33">merge.tool vimdiff → defini l’outil de diffusion</text:p>
      <text:p text:style-name="P34"><text:span text:style-name="T33">push.default simple</text:span></text:p>
      <text:p text:style-name="Mon_5f_texte"/>
      <text:p text:style-name="Mon_5f_texte">Enfin, vérifiez que ces commandes ont bien été prises en compte, par :</text:p>
      <text:list xml:id="list181000801107885" text:continue-numbering="true" text:style-name="WWNum4">
        <text:list-item>
          <text:p text:style-name="P17"><text:span text:style-name="T26">git config --list</text:span></text:p>
        </text:list-item>
      </text:list>
      <text:p text:style-name="Mon_5f_texte"/>
      <text:p text:style-name="Standard" loext:marker-style-name="T28"><text:span text:style-name="T34">m</text:span><text:span text:style-name="T29">ichael.gassant@RT-E208-PC14 </text:span><text:span text:style-name="T30">MINGW64 </text:span><text:span text:style-name="T28">~</text:span></text:p>
      <text:p text:style-name="Standard" loext:marker-style-name="T31"><text:span text:style-name="T31">$ git config --list</text:span><text:span text:style-name="T31"/></text:p>
      <text:p text:style-name="Standard" loext:marker-style-name="T31"><text:span text:style-name="T31">diff.astextplain.textconv=astextplain</text:span><text:span text:style-name="T31"/></text:p>
      <text:p text:style-name="Standard" loext:marker-style-name="T31"><text:span text:style-name="T31">filter.lfs.clean=git-lfs clean -- %f</text:span><text:span text:style-name="T31"/></text:p>
      <text:p text:style-name="Standard" loext:marker-style-name="T31"><text:span text:style-name="T31">filter.lfs.smudge=git-lfs smudge -- %f</text:span><text:span text:style-name="T31"/></text:p>
      <text:p text:style-name="Standard" loext:marker-style-name="T31"><text:span text:style-name="T31">filter.lfs.process=git-lfs filter-process</text:span><text:span text:style-name="T31"/></text:p>
      <text:p text:style-name="Standard" loext:marker-style-name="T31"><text:span text:style-name="T31">filter.lfs.required=true</text:span><text:span text:style-name="T31"/></text:p>
      <text:p text:style-name="Standard" loext:marker-style-name="T31"><text:span text:style-name="T31">http.sslbackend=schannel</text:span><text:span text:style-name="T31"/></text:p>
      <text:p text:style-name="Standard" loext:marker-style-name="T31"><text:soft-page-break/><text:span text:style-name="T31">core.autocrlf=true</text:span><text:span text:style-name="T31"/></text:p>
      <text:p text:style-name="Standard" loext:marker-style-name="T31"><text:span text:style-name="T31">core.fscache=true</text:span><text:span text:style-name="T31"/></text:p>
      <text:p text:style-name="Standard" loext:marker-style-name="T31"><text:span text:style-name="T31">core.symlinks=false</text:span><text:span text:style-name="T31"/></text:p>
      <text:p text:style-name="Standard" loext:marker-style-name="T31"><text:span text:style-name="T31">pull.rebase=false</text:span><text:span text:style-name="T31"/></text:p>
      <text:p text:style-name="Standard" loext:marker-style-name="T31"><text:span text:style-name="T31">credential.helper=manager</text:span><text:span text:style-name="T31"/></text:p>
      <text:p text:style-name="Standard" loext:marker-style-name="T31"><text:span text:style-name="T31">credential.https://dev.azure.com.usehttppath=true</text:span><text:span text:style-name="T31"/></text:p>
      <text:p text:style-name="Standard" loext:marker-style-name="T31"><text:span text:style-name="T31">init.defaultbranch=master</text:span><text:span text:style-name="T31"/></text:p>
      <text:p text:style-name="Standard" loext:marker-style-name="T31"><text:span text:style-name="T31">user.name=Gassant</text:span><text:span text:style-name="T31"/></text:p>
      <text:p text:style-name="Standard" loext:marker-style-name="T31"><text:span text:style-name="T31">user.email=michael.gassant@ikmail.com</text:span><text:span text:style-name="T31"/></text:p>
      <text:p text:style-name="Standard" loext:marker-style-name="T31"><text:span text:style-name="T31">color.diff=auto</text:span><text:span text:style-name="T31"/></text:p>
      <text:p text:style-name="Standard" loext:marker-style-name="T31"><text:span text:style-name="T31">color.status=auto</text:span><text:span text:style-name="T31"/></text:p>
      <text:p text:style-name="Standard" loext:marker-style-name="T31"><text:span text:style-name="T31">color.branch=auto</text:span><text:span text:style-name="T31"/></text:p>
      <text:p text:style-name="Standard" loext:marker-style-name="T31"><text:span text:style-name="T31">init.defaultbranch=main</text:span><text:span text:style-name="T31"/></text:p>
      <text:p text:style-name="Standard" loext:marker-style-name="T31"><text:span text:style-name="T31">core.editor=nano</text:span><text:span text:style-name="T31"/></text:p>
      <text:p text:style-name="Standard" loext:marker-style-name="T31"><text:span text:style-name="T31">merge.tool=vimdiff</text:span><text:span text:style-name="T31"/></text:p>
      <text:p text:style-name="Standard" loext:marker-style-name="T31"><text:span text:style-name="T31">push.default=simple</text:span><text:span text:style-name="T31"/></text:p>
      <text:p text:style-name="Standard"/>
      <text:p text:style-name="Mon_5f_texte"/>
      <text:h text:style-name="P21" text:outline-level="2"><text:bookmark-start text:name="_Toc166434098"/>Création d’un dépôt Git pour le site web<text:bookmark-end text:name="_Toc166434098"/></text:h>
      <text:p text:style-name="P26" loext:marker-style-name="T23"/>
      <text:p text:style-name="Mon_5f_texte">Depuis la console Git Bash, identifiez le dossier actuellement en cours, par la commande Bash <text:span text:style-name="T26">pwd</text:span></text:p>
      <text:p text:style-name="Standard">Résultat :</text:p>
      <text:p text:style-name="Standard"/>
      <text:p text:style-name="Standard" loext:marker-style-name="T28"><text:span text:style-name="T29">michael.gassant@RT-E208-PC14 </text:span><text:span text:style-name="T30">MINGW64 </text:span><text:span text:style-name="T28">~</text:span></text:p>
      <text:p text:style-name="Standard" loext:marker-style-name="T31"><text:span text:style-name="T31">$ pwd</text:span><text:span text:style-name="T31"/></text:p>
      <text:p text:style-name="Standard" loext:marker-style-name="T31"><text:span text:style-name="T31">/z/</text:span><text:span text:style-name="T31"/></text:p>
      <text:p text:style-name="Standard"/>
      <text:p text:style-name="Mon_5f_texte" loext:marker-style-name="T35">Déplacez-vous dans le dossier <text:span text:style-name="T24">36th_americas_cup </text:span><text:span text:style-name="T35">et lister de manière détaillée son contenu.</text:span></text:p>
      <text:p text:style-name="Standard">Reportez les commandes utilisées :</text:p>
      <text:p text:style-name="P35">cd 36th_americas_cup</text:p>
      <text:p text:style-name="Standard" loext:marker-style-name="T28"><text:span text:style-name="T29">michael.gassant@RT-E208-PC14 </text:span><text:span text:style-name="T30">MINGW64 </text:span><text:span text:style-name="T28">~</text:span></text:p>
      <text:p text:style-name="Standard" loext:marker-style-name="T31"><text:span text:style-name="T31">$ cd </text:span><text:span text:style-name="T36">c:/user/michael.gassant/Destop/</text:span><text:span text:style-name="T31">36th_americas_cup</text:span></text:p>
      <text:p text:style-name="P36" loext:marker-style-name="T31"/>
      <text:p text:style-name="Standard" loext:marker-style-name="T28"><text:span text:style-name="T29">michael.gassant@RT-E208-PC14 </text:span><text:span text:style-name="T30">MINGW64 </text:span><text:span text:style-name="T28">/z/36th_americas_cup</text:span></text:p>
      <text:p text:style-name="Standard" loext:marker-style-name="T31"><text:span text:style-name="T31">$ ls</text:span><text:span text:style-name="T31"/></text:p>
      <text:p text:style-name="Standard" loext:marker-style-name="T37"><text:span text:style-name="T38">challenger</text:span><text:span text:style-name="T37">/ <text:s/></text:span><text:span text:style-name="T38">images</text:span><text:span text:style-name="T37">/ <text:s/>index.html <text:s/></text:span><text:span text:style-name="T38">styles</text:span><text:span text:style-name="T37">/</text:span></text:p>
      <text:p text:style-name="P37"/>
      <text:p text:style-name="Mon_5f_texte"/>
      <text:p text:style-name="Mon_5f_texte">Dans le dossier <text:span text:style-name="T24">36th_americas_cup</text:span>, initialisez le dépôt Git par la commande <text:span text:style-name="T26">git init</text:span></text:p>
      <text:p text:style-name="Standard">Que signifie la réponse de cette commande ? <text:s/>Et quel dossier caché a été créé ?</text:p>
      <text:p text:style-name="P35">Git init veut dire intialisation, il crée un fichier avec une extension .git</text:p>
      <text:p text:style-name="P35"/>
      <text:p text:style-name="P35"/>
      <text:p text:style-name="Réponse"/>
      <text:p text:style-name="Réponse"/>
      <text:p text:style-name="Mon_5f_texte"/>
      <text:p text:style-name="Standard">Reportez la commande Bash qui permet de vérifier la présence de ce dossier caché :</text:p>
      <text:p text:style-name="Standard"/>
      <text:p text:style-name="Standard" loext:marker-style-name="T39"><text:span text:style-name="T29">michael.gassant@RT-E208-PC14 </text:span><text:span text:style-name="T30">MINGW64 </text:span><text:span text:style-name="T28">/z/36th_americas_cup</text:span><text:span text:style-name="T39"> (main)</text:span></text:p>
      <text:p text:style-name="P38" loext:marker-style-name="T39"/>
      <text:p text:style-name="Standard" loext:marker-style-name="T31"><text:span text:style-name="T31">$ ls -a</text:span><text:span text:style-name="T31"/></text:p>
      <text:p text:style-name="Standard" loext:marker-style-name="T37"><text:span text:style-name="T38">.</text:span><text:span text:style-name="T37">/ <text:s/></text:span><text:span text:style-name="T38">..</text:span><text:span text:style-name="T37">/ <text:s/></text:span><text:span text:style-name="T38">.git</text:span><text:span text:style-name="T37">/ <text:s/></text:span><text:span text:style-name="T38">challenger</text:span><text:span text:style-name="T37">/ <text:s/></text:span><text:span text:style-name="T38">images</text:span><text:span text:style-name="T37">/ <text:s/>index.html <text:s/></text:span><text:span text:style-name="T38">styles</text:span><text:span text:style-name="T37">/</text:span></text:p>
      <text:p text:style-name="Mon_5f_texte"/>
      <text:p text:style-name="Mon_5f_texte">Vous remarquerez aussi le terme <text:span text:style-name="T20">main</text:span> entre parenthèse et en bleu. Il s’agit de la branche de dépôt qui est actuellement utilisée. Nous y reviendrons ultérieurement.</text:p>
      <text:p text:style-name="Mon_5f_texte"/>
      <text:p text:style-name="Mon_5f_texte"><text:soft-page-break/>Regardez l'état du dépôt par la commande <text:span text:style-name="T26">git status</text:span></text:p>
      <text:p text:style-name="P18">Vous devriez obtenir ceci :</text:p>
      <text:p text:style-name="Réponse">$ git status</text:p>
      <text:p text:style-name="Réponse">On branch main</text:p>
      <text:p text:style-name="Réponse"/>
      <text:p text:style-name="Réponse">No commits yet</text:p>
      <text:p text:style-name="Réponse"/>
      <text:p text:style-name="Réponse">Untracked files:</text:p>
      <text:p text:style-name="Réponse"><text:s text:c="2"/>(use "git add &lt;file&gt;..." to include in what will be committed)</text:p>
      <text:p text:style-name="Réponse"><text:s text:c="8"/>challenger/</text:p>
      <text:p text:style-name="Réponse"><text:s text:c="8"/>images/</text:p>
      <text:p text:style-name="Réponse"><text:s text:c="8"/>index.html</text:p>
      <text:p text:style-name="Réponse"><text:s text:c="8"/>styles/</text:p>
      <text:p text:style-name="Réponse"/>
      <text:p text:style-name="Réponse">nothing added to commit but untracked files present (use "git add" to track)</text:p>
      <text:p text:style-name="Réponse"/>
      <text:p text:style-name="Mon_5f_texte"/>
      <text:p text:style-name="Mon_5f_texte">Ici, <text:span text:style-name="T26">git status</text:span> nous informe que le projet possède des fichiers et dossiers qui ne sont pas <text:span text:style-name="T20">suivis</text:span> ("<text:span text:style-name="T20">untracked</text:span>"), qu’aucun fichier/dossier n’a été <text:span text:style-name="T20">validé </text:span>[on dit également<text:span text:style-name="T20"> consigné</text:span>] ("<text:span text:style-name="T20">commit</text:span>") pour le moment ni ajouté ("<text:span text:style-name="T20">nothing added</text:span>") pour validation. La commande git statuts nous informe également sur la branche sur laquelle on se trouve ("<text:span text:style-name="T20">main</text:span>", dans le cas présent). </text:p>
      <text:p text:style-name="Mon_5f_texte">Vous pouvez à tout moment utiliser cette commande <text:span text:style-name="T20">pour voir où vous en êtes.</text:span> Connaissant l'état courant de vos manipulations, cette commande donne des indications contextualisées sur ce que vous pouvez (ou devez) faire. Ici par exemple, elle vous invite à ajouter ces fichiers/dossiers dans l'index (cf. ci-dessous) avant leur validation.</text:p>
      <text:p text:style-name="Mon_5f_texte">Les états des fichiers sont liés à des zones de travail dans Git. En fonction de son état, un fichier va pouvoir apparaitre dans telle ou telle zone de travail. Tout projet Git est composé de trois sections : le répertoire de travail (<text:span text:style-name="T20">Working directory</text:span>), la zone d’index (<text:span text:style-name="T20">staging area</text:span> ou simplement <text:span text:style-name="T20">Stage</text:span>) et le répertoire Git (<text:span text:style-name="T20">Repository</text:span>). L’ensemble constituant le dépôt local.</text:p>
      <text:p text:style-name="Mon_5f_texte"><draw:g text:anchor-type="char" draw:z-index="6" draw:name="Groupe 117" draw:style-name="gr7"><draw:frame draw:name="Image 114" draw:style-name="gr2" draw:text-style-name="P1" svg:width="13.669cm" svg:height="6.638cm" svg:x="1.289cm" svg:y="0.019cm"><draw:image xlink:href="Pictures/10000000000002F00000016DACB12D65.png" xlink:type="simple" xlink:show="embed" xlink:actuate="onLoad" draw:mime-type="image/png"><text:p/></draw:image></draw:frame><draw:custom-shape draw:name="Zone de texte 115" draw:style-name="gr8" draw:text-style-name="P39" svg:width="1.317cm" svg:height="0.814cm" svg:x="2.654cm" svg:y="1.961cm"><text:p text:style-name="Standard" loext:marker-style-name="T40"><text:span text:style-name="T40">ad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16" draw:style-name="gr9" draw:text-style-name="P39" svg:width="1.987cm" svg:height="0.814cm" svg:x="8.934cm" svg:y="3.855cm"><text:p text:style-name="Standard" loext:marker-style-name="T40"><text:span text:style-name="T40">comm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L’étape suivante consiste donc à indexer nos fichiers (dans le jargon informatique, on dit parfois que l’on <text:span text:style-name="T20">stage les fichiers</text:span>) afin qu’ils puissent ensuite être validés, c’est-à-dire ajoutés au premier historique de version du projet.</text:p>
      <text:p text:style-name="Mon_5f_texte"/>
      <text:p text:style-name="Mon_5f_texte"><draw:frame draw:style-name="fr1" draw:name="Image 118" text:anchor-type="char" svg:x="0.266cm" svg:y="0.669cm" svg:width="1.148cm" svg:height="1.215cm" draw:z-index="9"><draw:image xlink:href="Pictures/100000010000002B0000002E081B07BE.png" xlink:type="simple" xlink:show="embed" xlink:actuate="onLoad" draw:mime-type="image/png"/><svg:desc>warning</svg:desc></draw:frame>Pour indexer l’ensemble du projet courant, lancez la commande <text:span text:style-name="T26">git add .</text:span> <text:s text:c="3"/></text:p>
      <text:p text:style-name="Mon_5f_texte" loext:marker-style-name="T41"><text:tab/> <text:s/><text:span text:style-name="T41"/></text:p>
      <text:p text:style-name="P40"><text:soft-page-break/><text:s text:c="4"/>Il faut bien écrire le point en fin de commande !</text:p>
      <text:p text:style-name="Mon_5f_texte"/>
      <text:p text:style-name="Mon_5f_texte">Regardez de nouveau l'état du répertoire de travail et de la zone d’index par la commande <text:span text:style-name="T26">git status</text:span></text:p>
      <text:p text:style-name="P18">Vous devriez obtenir ceci :</text:p>
      <text:p text:style-name="P41" loext:marker-style-name="T42"><text:span text:style-name="T42">$ git status</text:span><text:span text:style-name="T42"/></text:p>
      <text:p text:style-name="P41" loext:marker-style-name="T42"><text:span text:style-name="T42">On branch main</text:span><text:span text:style-name="T42"/></text:p>
      <text:p text:style-name="P42" loext:marker-style-name="T42"/>
      <text:p text:style-name="P41" loext:marker-style-name="T42"><text:span text:style-name="T42">No commits yet</text:span><text:span text:style-name="T42"/></text:p>
      <text:p text:style-name="P42" loext:marker-style-name="T42"/>
      <text:p text:style-name="P41" loext:marker-style-name="T42"><text:span text:style-name="T42">Changes to be committed:</text:span><text:span text:style-name="T42"/></text:p>
      <text:p text:style-name="P41" loext:marker-style-name="T42"><text:span text:style-name="T42"><text:s text:c="2"/>(use "git rm --cached &lt;file&gt;..." to unstage)</text:span><text:span text:style-name="T42"/></text:p>
      <text:p text:style-name="P41" loext:marker-style-name="T43"><text:span text:style-name="T42"><text:s text:c="8"/></text:span><text:span text:style-name="T43">new file: <text:s text:c="2"/>challenger/luna_rossa.html</text:span></text:p>
      <text:p text:style-name="P41" loext:marker-style-name="T43"><text:span text:style-name="T43"><text:s text:c="8"/>new file: <text:s text:c="2"/>images/36th.ico</text:span><text:span text:style-name="T43"/></text:p>
      <text:p text:style-name="P41" loext:marker-style-name="T43"><text:span text:style-name="T43"><text:s text:c="8"/>new file: <text:s text:c="2"/>images/AC75_Defiant1.jpg</text:span><text:span text:style-name="T43"/></text:p>
      <text:p text:style-name="P41" loext:marker-style-name="T43"><text:span text:style-name="T43"><text:s text:c="8"/>new file: <text:s text:c="2"/>images/AC75_Defiant2.jpg</text:span><text:span text:style-name="T43"/></text:p>
      <text:p text:style-name="P41" loext:marker-style-name="T43"><text:span text:style-name="T43"><text:s text:c="8"/>. . .</text:span><text:span text:style-name="T43"/></text:p>
      <text:p text:style-name="P43" loext:marker-style-name="T44"/>
      <text:p text:style-name="Mon_5f_texte"/>
      <text:p text:style-name="Mon_5f_texte">Cela indique que les fichiers sont prêts à être ajoutés au premier historique de version du projet et que l’on peut revenir en arrière si nécessaire par la commande <text:span text:style-name="T26">git rm</text:span></text:p>
      <text:p text:style-name="Mon_5f_texte"/>
      <text:p text:style-name="Mon_5f_texte">Maintenant que les fichiers sont indexés, vous pouvez créer une version, c'est-à-dire archiver le projet web en l’état. Il suffit de lancer la commande :</text:p>
      <text:p text:style-name="Mon_5f_texte"><text:span text:style-name="T26">git commit -m "Premiere version du projet"</text:span><text:tab/><text:tab/></text:p>
      <text:p text:style-name="Mon_5f_texte"/>
      <text:p text:style-name="Mon_5f_texte"><text:span text:style-name="T26">-m</text:span> (comme message) est ce qu'on appelle un argument, qui est ajouté à la commande principale. Il permet de définir un message particulier rattaché au commit effectué. Si vous n’utilisez pas cet argument, la commande <text:span text:style-name="T26">git commit </text:span>ouvrira un éditeur de texte (en l’occurrence nano – cf. Configuration) dans lequel vous pourrez saisir le message de commit.</text:p>
      <text:p text:style-name="Mon_5f_texte"/>
      <text:p text:style-name="Mon_5f_texte">Le message de description est très important pour retrouver le fil des <text:span text:style-name="T20">commits</text:span>, et revenir sur un <text:span text:style-name="T20">commit</text:span> en particulier. </text:p>
      <text:p text:style-name="Mon_5f_texte" loext:marker-style-name="T45"><text:span text:style-name="T46">Ne le négligez pas !</text:span><text:span text:style-name="T45"> </text:span></text:p>
      <text:p text:style-name="Mon_5f_texte">Il ne serait pas pratique de nommer des<text:span text:style-name="T20"> commits</text:span> d’un fichier du type "version 1", "version 2", "version 2.1", car vous seriez alors obligé de lire le contenu du fichier pour connaître les modifications réalisées. Avec un message clair, vous pouvez tout de suite identifier les modifications effectuées sur le fichier.</text:p>
      <text:p text:style-name="Mon_5f_texte"/>
      <text:p text:style-name="Mon_5f_texte">Regardez de nouveau l'état du répertoire de travail et de la zone d’index.</text:p>
      <text:p text:style-name="P18">Qu’obtenez-vous ? </text:p>
      <text:p text:style-name="Standard" loext:marker-style-name="T39"><text:span text:style-name="T29">michael.gassant@RT-E208-PC14 </text:span><text:span text:style-name="T30">MINGW64 </text:span><text:span text:style-name="T28">/z/36th_americas_cup</text:span><text:span text:style-name="T39"> (main)</text:span></text:p>
      <text:p text:style-name="Standard" loext:marker-style-name="T31"><text:span text:style-name="T31">$ git status</text:span><text:span text:style-name="T31"/></text:p>
      <text:p text:style-name="Standard" loext:marker-style-name="T31"><text:span text:style-name="T31">On branch main</text:span><text:span text:style-name="T31"/></text:p>
      <text:p text:style-name="Standard" loext:marker-style-name="T31"><text:span text:style-name="T31">nothing to commit, working tree clean</text:span><text:span text:style-name="T31"/></text:p>
      <text:p text:style-name="Standard"/>
      <text:p text:style-name="P44"><text:span text:style-name="T47">On peut constater que tout les as été archiver avec succès.</text:span></text:p>
      <text:p text:style-name="Mon_5f_texte"/>
      <text:p text:style-name="Mon_5f_texte"><text:soft-page-break/>Enfin, vérifiez les informations sur la version du projet par la commande <text:span text:style-name="T26">git log</text:span></text:p>
      <text:p text:style-name="P18">Quelles sont les informations qui apparaissent actuellement :</text:p>
      <text:p text:style-name="Standard" loext:marker-style-name="T39"><text:span text:style-name="T29">michael.gassant@RT-E208-PC14 </text:span><text:span text:style-name="T30">MINGW64 </text:span><text:span text:style-name="T28">/z/36th_americas_cup</text:span><text:span text:style-name="T39"> (main)</text:span></text:p>
      <text:p text:style-name="Standard" loext:marker-style-name="T31"><text:span text:style-name="T31">$ git log</text:span><text:span text:style-name="T31"/></text:p>
      <text:p text:style-name="Standard" loext:marker-style-name="T48"><text:span text:style-name="T28">commit a3c9c99e4f8b0c56a07c266ad1b3778cbebaa6d1 (</text:span><text:span text:style-name="T49">HEAD</text:span><text:span text:style-name="T48"> -&gt; </text:span><text:span text:style-name="T50">main</text:span><text:span text:style-name="T48">)</text:span></text:p>
      <text:p text:style-name="Standard" loext:marker-style-name="T37"><text:span text:style-name="T37">Author: Gassant &lt;michael.gassant@ikmail.com&gt;</text:span><text:span text:style-name="T37"/></text:p>
      <text:p text:style-name="Standard" loext:marker-style-name="T37"><text:span text:style-name="T37">Date: <text:s text:c="2"/>Mon May 18 15:46:10 2026 +0200</text:span><text:span text:style-name="T37"/></text:p>
      <text:p text:style-name="P45" loext:marker-style-name="T37"/>
      <text:p text:style-name="Standard" loext:marker-style-name="T37"><text:span text:style-name="T37"><text:s text:c="4"/>Première version du projet</text:span><text:span text:style-name="T37"/></text:p>
      <text:p text:style-name="Standard"/>
      <text:p text:style-name="P46">Les informations indiqués sont l’auteur de l’action du commit et l’indication de la version du commit. On passe d’un repertoire de travaille à la publication du rendu finale à « Repository »</text:p>
      <text:p text:style-name="Mon_5f_texte"/>
      <text:p text:style-name="Mon_5f_texte">Alors que <text:span text:style-name="T26">git status</text:span> vous permet d'inspecter le répertoire de travail et la section d’index, <text:span text:style-name="T26">git log</text:span> fonctionne uniquement sur la version "commitée" (zone Repository).</text:p>
      <text:p text:style-name="P18"><draw:g text:anchor-type="char" draw:z-index="9" draw:name="Groupe 153" draw:style-name="gr7"><draw:frame draw:name="Image 126" draw:style-name="gr2" draw:text-style-name="P1" svg:width="13.669cm" svg:height="6.638cm" svg:x="-0.016cm" svg:y="0.647cm"><draw:image xlink:href="Pictures/10000000000002F00000016DACB12D65.png" xlink:type="simple" xlink:show="embed" xlink:actuate="onLoad" draw:mime-type="image/png"><text:p/></draw:image></draw:frame><draw:custom-shape draw:name="Zone de texte 127" draw:style-name="gr8" draw:text-style-name="P39" svg:width="1.317cm" svg:height="0.814cm" svg:x="1.355cm" svg:y="2.594cm"><text:p text:style-name="Standard" loext:marker-style-name="T40"><text:span text:style-name="T40">ad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73" draw:style-name="gr10" draw:text-style-name="P39" svg:width="1.749cm" svg:height="0.814cm" svg:x="8.876cm" svg:y="2.478cm"><text:p text:style-name="Standard" loext:marker-style-name="T51"><text:span text:style-name="T51">stat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28" draw:style-name="gr9" draw:text-style-name="P39" svg:width="1.987cm" svg:height="0.814cm" svg:x="7.639cm" svg:y="4.492cm"><text:p text:style-name="Standard" loext:marker-style-name="T40"><text:span text:style-name="T40">comm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75" draw:style-name="gr11" draw:text-style-name="P39" svg:width="1.11cm" svg:height="0.814cm" svg:x="0.975cm" svg:y="5.432cm"><text:p text:style-name="Standard" loext:marker-style-name="T51"><text:span text:style-name="T51">lo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ccolade fermante 131" draw:style-name="gr12" draw:text-style-name="P6" svg:width="0.608cm" svg:height="1.23cm" svg:x="8.366cm" svg:y="2.264cm"><text:p/><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position-x="?f17" draw:handle-position-y="?f7" draw:handle-range-y-maximum="?f5" draw:handle-range-y-minimum="0"/><draw:handle draw:handle-position="?f18 ?f8" draw:handle-position-x="?f18" draw:handle-position-y="?f8" draw:handle-range-y-maximum="100000" draw:handle-range-y-minimum="0"/></draw:enhanced-geometry></draw:custom-shape></draw:g></text:p>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P19" loext:marker-style-name="T22"/>
      <text:p text:style-name="P47"/>
      <text:h text:style-name="P21" text:outline-level="2"><text:bookmark-start text:name="_Toc166434099"/>Création d’un dépôt distant sur GitHub pour le site web<text:bookmark-end text:name="_Toc166434099"/></text:h>
      <text:p text:style-name="P26" loext:marker-style-name="T23"/>
      <text:p text:style-name="Mon_5f_texte">Maintenant que la version du projet est réalisée sur le dépôt local, vous allez publier une copie sur votre compte GitHub. On dit que l’on va pousser ("<text:span text:style-name="T20">push</text:span>") ce dépôt local vers le dépôt distant.</text:p>
      <text:p text:style-name="Mon_5f_texte"><draw:g text:anchor-type="char" draw:z-index="13" draw:name="Groupe 155" draw:style-name="gr13"><draw:frame draw:name="Image 119" draw:style-name="gr2" draw:text-style-name="P1" svg:width="14.339cm" svg:height="11.03cm" svg:x="0.002cm" svg:y="0.228cm"><draw:image xlink:href="Pictures/10000000000003140000025E47901519.png" xlink:type="simple" xlink:show="embed" xlink:actuate="onLoad" draw:mime-type="image/png"><text:p/></draw:image></draw:frame><draw:custom-shape draw:name="Zone de texte 148" draw:style-name="gr14" draw:text-style-name="P39" svg:width="1.317cm" svg:height="0.812cm" svg:x="1.618cm" svg:y="2.174cm"><text:p text:style-name="Standard" loext:marker-style-name="T40"><text:span text:style-name="T40">ad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49" draw:style-name="gr15" draw:text-style-name="P39" svg:width="1.747cm" svg:height="0.812cm" svg:x="9.141cm" svg:y="2.059cm"><text:p text:style-name="Standard" loext:marker-style-name="T51"><text:span text:style-name="T51">stat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50" draw:style-name="gr16" draw:text-style-name="P39" svg:width="1.108cm" svg:height="0.814cm" svg:x="1.238cm" svg:y="5.01cm"><text:p text:style-name="Standard" loext:marker-style-name="T51"><text:span text:style-name="T51">lo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51" draw:style-name="gr17" draw:text-style-name="P39" svg:width="1.987cm" svg:height="0.812cm" svg:x="7.887cm" svg:y="4.07cm"><text:p text:style-name="Standard" loext:marker-style-name="T40"><text:span text:style-name="T40">comm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ccolade fermante 152" draw:style-name="gr12" draw:text-style-name="P6" svg:width="0.608cm" svg:height="1.23cm" svg:x="8.613cm" svg:y="1.844cm"><text:p/><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position-x="?f17" draw:handle-position-y="?f7" draw:handle-range-y-maximum="?f5" draw:handle-range-y-minimum="0"/><draw:handle draw:handle-position="?f18 ?f8" draw:handle-position-x="?f18" draw:handle-position-y="?f8" draw:handle-range-y-maximum="100000" draw:handle-range-y-minimum="0"/></draw:enhanced-geometry></draw:custom-shape><draw:custom-shape draw:name="Zone de texte 154" draw:style-name="gr18" draw:text-style-name="P39" svg:width="1.553cm" svg:height="0.812cm" svg:x="2.179cm" svg:y="6.811cm"><text:p text:style-name="Standard" loext:marker-style-name="T52"><text:span text:style-name="T52">pus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Connectez-vous à votre compte GitHub. </text:p>
      <text:p text:style-name="Mon_5f_texte"/>
      <text:p text:style-name="Mon_5f_texte"/>
      <text:p text:style-name="Mon_5f_texte"><draw:frame draw:style-name="fr1" draw:name="Image 138" text:anchor-type="char" svg:x="8.588cm" svg:y="0.487cm" svg:width="7.488cm" svg:height="6.033cm" draw:z-index="16"><draw:image xlink:href="Pictures/100000000000011B000000E4F079B019.png" xlink:type="simple" xlink:show="embed" xlink:actuate="onLoad" draw:mime-type="image/png"/></draw:frame></text:p>
      <text:p text:style-name="P18"/>
      <text:p text:style-name="P27">Créez un dépôt distant en cliquant <text:line-break/>sur <text:span text:style-name="T26">New repository</text:span></text:p>
      <text:p text:style-name="Mon_5f_texte"/>
      <text:p text:style-name="P27">Donnez le nom <text:span text:style-name="T20">ACwebProjet</text:span> <text:line-break/>à votre dépôt ainsi que la description <text:line-break/><text:span text:style-name="T20">Site web 36th America's Cup</text:span></text:p>
      <text:p text:style-name="P27"/>
      <text:p text:style-name="P27">Cliquez ensuite sur le bouton <text:line-break/><text:span text:style-name="T26">Create repository</text:span></text:p>
      <text:p text:style-name="Mon_5f_texte"/>
      <text:p text:style-name="Mon_5f_texte"/>
      <text:p text:style-name="Mon_5f_texte"><draw:g text:anchor-type="char" draw:z-index="11" draw:name="Groupe 145" draw:style-name="gr19"><draw:frame draw:name="Image 141" draw:style-name="gr2" draw:text-style-name="P1" svg:width="18.543cm" svg:height="14.368cm" svg:x="-1.66cm" svg:y="0.873cm"><draw:image xlink:href="Pictures/100000000000049D00000393F0993E54.png" xlink:type="simple" xlink:show="embed" xlink:actuate="onLoad" draw:mime-type="image/png"><text:p/></draw:image></draw:frame><draw:custom-shape draw:name="Rectangle : coins arrondis 142" draw:style-name="gr20" draw:text-style-name="P6" svg:width="5.795cm" svg:height="0.608cm" svg:x="3.928cm" svg:y="4.815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line draw:name="Connecteur droit 144" draw:style-name="gr21" draw:text-style-name="P6" svg:x1="-0.907cm" svg:y1="11.237cm" svg:x2="7.692cm" svg:y2="11.238cm"><text:p/></draw:line></draw:g><text:soft-page-break/>Vous devriez avoir un écran comme celui-ci :</text:p>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Cet écran vous donne les différentes commandes utiles en fonction de l’avancée de votre projet de "versioning".</text:p>
      <text:p text:style-name="P18"/>
      <text:p text:style-name="Mon_5f_texte">Maintenant, retournez sur Git Bash car il faut indiquer à Git de créer un lien vers le dépôt géré par le serveur GitHub. Suivez pour cela l'instruction que vous donne GitHub. Elle ressemble à :</text:p>
      <text:p text:style-name="Mon_5f_texte" loext:marker-style-name="T26"><text:span text:style-name="T26">git <text:s/>remote <text:s/>add <text:s/>origin <text:s/>https://github.com/</text:span><text:span text:style-name="T53">LORVINS</text:span><text:span text:style-name="T26">/ACwebProjet.git</text:span></text:p>
      <text:p text:style-name="Mon_5f_texte"/>
      <text:p text:style-name="Mon_5f_texte">Cette commande crée en local un lien ("<text:span text:style-name="T26">remote add</text:span>") nommé '<text:span text:style-name="T26">origin</text:span>' vers l'URL du dépôt stocké sur le serveur GitHub.</text:p>
      <text:p text:style-name="Mon_5f_texte">Le nom '<text:span text:style-name="T26">origin</text:span>' est celui donné usuellement, vous pouvez en choisir un autre si vraiment vous le désirez. Vous pouvez vérifier les liens distants enregistrés, avec la commande :</text:p>
      <text:p text:style-name="Mon_5f_texte" loext:marker-style-name="T26"><text:span text:style-name="T26">git <text:s/>remote <text:s/>-v</text:span><text:span text:style-name="T26"/></text:p>
      <text:p text:style-name="Mon_5f_texte"/>
      <text:p text:style-name="Mon_5f_texte">Pour envoyer la version actuelle de dépôt local sur le dépôt distant, utilisez :</text:p>
      <text:p text:style-name="Mon_5f_texte"><text:span text:style-name="T26">git <text:s/>push <text:s/>-u <text:s/>origin <text:s/>main</text:span></text:p>
      <text:p text:style-name="P18"><text:soft-page-break/>Précisez ce qui se passe alors :</text:p>
      <text:p text:style-name="P48"><text:span text:style-name="T54">Ce qui se passe, c’est que après l’action de la commande, il a « push » notre repetory vers la plateforme github, tout le dossier AcwebProjet est maintenant disponible à distance.</text:span></text:p>
      <text:p text:style-name="Mon_5f_texte"/>
      <text:p text:style-name="Mon_5f_texte">Cette commande signifie : synchroniser le dépôt distant dont le nom est '<text:span text:style-name="T26">origin</text:span>' avec mon dépôt local dont la tête est '<text:span text:style-name="T26">main</text:span>'. Le dépôt distant étant pour l'instant vide, tout votre dépôt local va être recopié sur le serveur.</text:p>
      <text:p text:style-name="Mon_5f_texte"/>
      <text:p text:style-name="P18">Après l’exécution de la commande, précisez le nombre de fichiers transmis et à quelle vitesse :</text:p>
      <text:p text:style-name="Standard" loext:marker-style-name="T39"><text:span text:style-name="T29">michael.gassant@RT-E208-PC14 </text:span><text:span text:style-name="T30">MINGW64 </text:span><text:span text:style-name="T28">/z/36th_americas_cup</text:span><text:span text:style-name="T39"> (main)</text:span></text:p>
      <text:p text:style-name="Standard" loext:marker-style-name="T31"><text:span text:style-name="T31">$ git push -u origin main</text:span><text:span text:style-name="T31"/></text:p>
      <text:p text:style-name="Standard" loext:marker-style-name="T31"><text:span text:style-name="T31">info: please complete authentication in your browser...</text:span><text:span text:style-name="T31"/></text:p>
      <text:p text:style-name="Standard" loext:marker-style-name="T31"><text:span text:style-name="T31">Enumerating objects: 21, done.</text:span><text:span text:style-name="T31"/></text:p>
      <text:p text:style-name="Standard" loext:marker-style-name="T31"><text:span text:style-name="T31">Counting objects: 100% (21/21), done.</text:span><text:span text:style-name="T31"/></text:p>
      <text:p text:style-name="Standard" loext:marker-style-name="T31"><text:span text:style-name="T31">Delta compression using up to 20 threads</text:span><text:span text:style-name="T31"/></text:p>
      <text:p text:style-name="Standard" loext:marker-style-name="T31"><text:span text:style-name="T31">Compressing objects: 100% (19/19), done.</text:span><text:span text:style-name="T31"/></text:p>
      <text:p text:style-name="Standard" loext:marker-style-name="T31"><text:span text:style-name="T31">Writing objects: 100% (21/21), 5.35 MiB | 2.01 MiB/s, done.</text:span><text:span text:style-name="T31"/></text:p>
      <text:p text:style-name="Standard" loext:marker-style-name="T31"><text:span text:style-name="T31">Total 21 (delta 0), reused 0 (delta 0), pack-reused 0 (from 0)</text:span><text:span text:style-name="T31"/></text:p>
      <text:p text:style-name="Standard" loext:marker-style-name="T31"><text:span text:style-name="T31">To https://github.com/LORVINS/ACwebProjet.git</text:span><text:span text:style-name="T31"/></text:p>
      <text:p text:style-name="Standard" loext:marker-style-name="T31"><text:span text:style-name="T31"><text:s/>* [new branch] <text:s text:c="5"/>main -&gt; main</text:span><text:span text:style-name="T31"/></text:p>
      <text:p text:style-name="Standard" loext:marker-style-name="T31"><text:span text:style-name="T31">branch 'main' set up to track 'origin/main'.</text:span></text:p>
      <text:p text:style-name="P18"/>
      <text:p text:style-name="P18">Quelles sont les informations produites par les commandes <text:span text:style-name="T26">git status</text:span> et <text:span text:style-name="T26">git log</text:span> ?</text:p>
      <text:p text:style-name="Standard" loext:marker-style-name="T39"><text:span text:style-name="T29">michael.gassant@RT-E208-PC14 </text:span><text:span text:style-name="T30">MINGW64 </text:span><text:span text:style-name="T28">/z/36th_americas_cup</text:span><text:span text:style-name="T39"> (main)</text:span></text:p>
      <text:p text:style-name="Standard" loext:marker-style-name="T31"><text:span text:style-name="T31">$ git log</text:span><text:span text:style-name="T31"/></text:p>
      <text:p text:style-name="Standard" loext:marker-style-name="T48"><text:span text:style-name="T28">commit a3c9c99e4f8b0c56a07c266ad1b3778cbebaa6d1 (</text:span><text:span text:style-name="T49">HEAD</text:span><text:span text:style-name="T48"> -&gt; </text:span><text:span text:style-name="T50">main</text:span><text:span text:style-name="T48">, </text:span><text:span text:style-name="T55">origin/main</text:span><text:span text:style-name="T48">)</text:span></text:p>
      <text:p text:style-name="Standard" loext:marker-style-name="T37"><text:span text:style-name="T37">Author: Gassant &lt;michael.gassant@ikmail.com&gt;</text:span><text:span text:style-name="T37"/></text:p>
      <text:p text:style-name="Standard" loext:marker-style-name="T37"><text:span text:style-name="T37">Date: <text:s text:c="2"/>Mon May 18 15:46:10 2026 +0200</text:span><text:span text:style-name="T37"/></text:p>
      <text:p text:style-name="P45" loext:marker-style-name="T37"/>
      <text:p text:style-name="Standard" loext:marker-style-name="T37"><text:span text:style-name="T37"><text:s text:c="4"/>Première version du projet</text:span><text:span text:style-name="T37"/></text:p>
      <text:p text:style-name="Standard"/>
      <text:p text:style-name="Standard" loext:marker-style-name="T39"><text:span text:style-name="T29">michael.gassant@RT-E208-PC14 </text:span><text:span text:style-name="T30">MINGW64 </text:span><text:span text:style-name="T28">/z/36th_americas_cup</text:span><text:span text:style-name="T39"> (main)</text:span></text:p>
      <text:p text:style-name="Standard" loext:marker-style-name="T31"><text:span text:style-name="T31">$ git status</text:span><text:span text:style-name="T31"/></text:p>
      <text:p text:style-name="Standard" loext:marker-style-name="T31"><text:span text:style-name="T31">On branch main</text:span><text:span text:style-name="T31"/></text:p>
      <text:p text:style-name="Standard" loext:marker-style-name="T31"><text:span text:style-name="T31">Your branch is up to date with 'origin/main'.</text:span><text:span text:style-name="T31"/></text:p>
      <text:p text:style-name="P36" loext:marker-style-name="T31"/>
      <text:p text:style-name="Standard" loext:marker-style-name="T31"><text:span text:style-name="T31">nothing to commit, working tree clean</text:span></text:p>
      <text:p text:style-name="P18"/>
      <text:p text:style-name="Mon_5f_texte">De plus, vérifiez sur l'interface Web du serveur GitHub que votre projet contient bien votre projet web au complet. Vous devez retrouver le message précédemment fourni à la création du dépôt local. Vous pouvez également constater que GitHub a réalisé une analyse des types de fichiers utilisés. Enfin, cliquez sur <text:span text:style-name="T26">Add a README</text:span> pour créer un descriptif de votre projet.</text:p>
      <text:p text:style-name="Mon_5f_texte"/>
      <text:p text:style-name="Mon_5f_texte">Au final, vous devriez obtenir ceci :</text:p>
      <text:p text:style-name="Mon_5f_texte"/>
      <text:p text:style-name="Mon_5f_texte"><draw:frame draw:style-name="fr1" draw:name="Image 147" text:anchor-type="char" svg:x="-1.625cm" svg:y="0.011cm" svg:width="18.42cm" svg:height="9.472cm" draw:z-index="18"><draw:image xlink:href="Pictures/100000000000046200000241D5C29588.png" xlink:type="simple" xlink:show="embed" xlink:actuate="onLoad" draw:mime-type="image/png"/></draw:frame></text:p>
      <text:p text:style-name="Mon_5f_texte"/>
      <text:p text:style-name="Mon_5f_texte"/>
      <text:p text:style-name="Mon_5f_texte"/>
      <text:p text:style-name="Mon_5f_texte"/>
      <text:p text:style-name="Mon_5f_texte"/>
      <text:p text:style-name="Mon_5f_texte"/>
      <text:p text:style-name="Mon_5f_texte"><text:soft-page-break/></text:p>
      <text:p text:style-name="Mon_5f_texte"/>
      <text:p text:style-name="Mon_5f_texte"/>
      <text:p text:style-name="Mon_5f_texte"/>
      <text:p text:style-name="Mon_5f_texte"/>
      <text:p text:style-name="Mon_5f_texte"/>
      <text:p text:style-name="Mon_5f_texte"/>
      <text:p text:style-name="Mon_5f_texte"/>
      <text:p text:style-name="Mon_5f_texte">Maintenant que votre dépôt est enregistré sur le serveur GitHub, il est possible à tous les membres de votre projet d'en créer une copie locale, un clone… Pour le moment, fermez Git Bash.</text:p>
      <text:p text:style-name="P18"/>
      <text:h text:style-name="P21" text:outline-level="2"><text:bookmark-start text:name="_Toc166434100"/>Bilan<text:bookmark-end text:name="_Toc166434100"/></text:h>
      <text:p text:style-name="P25" loext:marker-style-name="T23"/>
      <text:p text:style-name="Mon_5f_texte">Globalement, un gestionnaire de versions permet de conserver un historique, revenir en arrière en cas de problème, collaborer, et suivre les modifications de chaque fichier.</text:p>
      <text:p text:style-name="Mon_5f_texte"/>
      <text:p text:style-name="Mon_5f_texte">Git gère les versions de vos travaux localement à travers 3 zones majeures :</text:p>
      <text:list xml:id="list181000903087292" text:continue-numbering="true" text:style-name="WWNum4">
        <text:list-item>
          <text:p text:style-name="P17" loext:marker-style-name="T20">le répertoire de travail<text:span text:style-name="T20"> </text:span>(<text:span text:style-name="T20">Working directory</text:span>) qui désigne l'arborescence de vos fichiers, c'est-à-dire tous vos fichiers et dossiers qui constituent votre projet initial </text:p>
        </text:list-item>
        <text:list-item>
          <text:p text:style-name="P17" loext:marker-style-name="T20">l’index (<text:span text:style-name="T20">Stage</text:span>)<text:span text:style-name="T20"> </text:span>qui<text:span text:style-name="T20"> </text:span>désigne tous les fichiers que vous souhaitez voir apparaître dans votre prochain historique du projet (c’est-à-dire la prochaine version du projet). Pour réaliser cela, la principale commande est <text:span text:style-name="T26">git add</text:span></text:p>
        </text:list-item>
        <text:list-item>
          <text:p text:style-name="P17">le dépôt (<text:span text:style-name="T20">Repository</text:span>) qui contient l'ensemble de vos actions (configurations, commits...). Pour créer une nouvelle version, la principale commande est <text:span text:style-name="T26">git commit</text:span></text:p>
        </text:list-item>
      </text:list>
      <text:p text:style-name="Mon_5f_texte"/>
      <text:p text:style-name="Mon_5f_texte">Un dépôt distant (GitHub, par exemple) permet de stocker une copie de votre dépôt local dans le cloud, principalement grâce à la commande <text:span text:style-name="T26">git push</text:span>. Cela permet de travailler en équipe et/ou de contribuer à des projets open source déjà existants. </text:p>
      <text:p text:style-name="Normal_20__28_Web_29_"/>
      <text:p text:style-name="P19" loext:marker-style-name="T22"/>
      <text:p text:style-name="P47"/>
      <text:h text:style-name="Heading_20_1" text:outline-level="1"><text:bookmark-start text:name="_Toc166434101"/>Récupération d’une version et gestion avancée des versions<text:bookmark-end text:name="_Toc166434101"/></text:h>
      <text:p text:style-name="Standard"/>
      <text:h text:style-name="P21" text:outline-level="2"><text:bookmark-start text:name="_Toc166434102"/>Clonage d’un dépôt<text:bookmark-end text:name="_Toc166434102"/></text:h>
      <text:p text:style-name="P25" loext:marker-style-name="T23"/>
      <text:p text:style-name="Mon_5f_texte">Imaginons que vous avez accidentellement effacé localement votre projet ou que vous êtes un nouveau collaborateur d’un projet existant. Dans les 2 cas, vous devez récupérer le dépôt distant hébergé sur le serveur GitHub.</text:p>
      <text:p text:style-name="Mon_5f_texte" loext:marker-style-name="T35">Commencez par mettre à la poubelle votre dossier <text:span text:style-name="T24">36th_americas_cup </text:span><text:span text:style-name="T35">!</text:span></text:p>
      <text:p text:style-name="Mon_5f_texte"/>
      <text:p text:style-name="Mon_5f_texte">Lancez Git Bash et placez-vous sur votre Bureau Windows. Pour cloner le projet depuis votre dépôt distant, utilisez la commande :</text:p>
      <text:p text:style-name="Mon_5f_texte"><text:span text:style-name="T26">git clone <text:s/>https://github.com/votre_nom/ACwebProjet.git</text:span></text:p>
      <text:p text:style-name="Mon_5f_texte"/>
      <text:p text:style-name="P18">Après l’exécution de la commande, précisez le nombre de fichiers reçus et à quelle vitesse :</text:p>
      <text:p text:style-name="Standard" loext:marker-style-name="T28"><text:span text:style-name="T29">michael.gassant@RT-E208-PC14 </text:span><text:span text:style-name="T30">MINGW64 </text:span><text:span text:style-name="T28">/c/users/michael.gassant/Desktop</text:span></text:p>
      <text:p text:style-name="Standard" loext:marker-style-name="T31"><text:span text:style-name="T31">$ git clone https://github.com/LORVINS/ACwebProjet.git</text:span><text:span text:style-name="T31"/></text:p>
      <text:p text:style-name="Standard" loext:marker-style-name="T31"><text:span text:style-name="T31">Cloning into 'ACwebProjet'...</text:span><text:span text:style-name="T31"/></text:p>
      <text:p text:style-name="Standard" loext:marker-style-name="T31"><text:span text:style-name="T31">remote: Enumerating objects: 24, done.</text:span><text:span text:style-name="T31"/></text:p>
      <text:p text:style-name="Standard" loext:marker-style-name="T31"><text:span text:style-name="T31">remote: Counting objects: 100% (24/24), done.</text:span><text:span text:style-name="T31"/></text:p>
      <text:p text:style-name="Standard" loext:marker-style-name="T31"><text:span text:style-name="T31">remote: Compressing objects: 100% (21/21), done.</text:span><text:span text:style-name="T31"/></text:p>
      <text:p text:style-name="Standard" loext:marker-style-name="T31"><text:span text:style-name="T31">remote: Total 24 (delta 1), reused 20 (delta 0), pack-reused 0 (from 0)</text:span><text:span text:style-name="T31"/></text:p>
      <text:p text:style-name="Standard" loext:marker-style-name="T31"><text:span text:style-name="T31">Receiving objects: 100% (24/24), 5.35 MiB | 31.67 MiB/s, done.</text:span><text:span text:style-name="T31"/></text:p>
      <text:p text:style-name="Standard" loext:marker-style-name="T31"><text:span text:style-name="T31">Resolving deltas: 100% (1/1), done.</text:span><text:span text:style-name="T31"/></text:p>
      <text:p text:style-name="Standard"/>
      <text:p text:style-name="Standard"/>
      <text:p text:style-name="P18"/>
      <text:p text:style-name="Mon_5f_texte">Une copie du dépôt distant <text:span text:style-name="T20">ACwebProjet</text:span> du serveur GitHub est alors créée sur votre Bureau Windows dans le dossier <text:span text:style-name="T20">ACwebProjet</text:span> (par défaut, Git crée un répertoire en réutilisant le nom du dépôt mais sans le suffixe .git). Par la commande<text:span text:style-name="T26"> ls -al</text:span> vérifiez que le dossier est bien présent sur votre Bureau Windows et renommez-le <text:span text:style-name="T24">36th_americas_cup</text:span> par la commande Bash<text:span text:style-name="T20"> </text:span><text:span text:style-name="T26">mv</text:span>. <text:s/></text:p>
      <text:p text:style-name="P18">Reportez la commande complète :</text:p>
      <text:p text:style-name="Standard" loext:marker-style-name="T28"><text:span text:style-name="T29">michael.gassant@RT-E208-PC14 </text:span><text:span text:style-name="T30">MINGW64 </text:span><text:span text:style-name="T28">/c/users/michael.gassant/Desktop</text:span></text:p>
      <text:p text:style-name="Standard" loext:marker-style-name="T31"><text:span text:style-name="T31">$ ls -al</text:span><text:span text:style-name="T31"/></text:p>
      <text:p text:style-name="Standard" loext:marker-style-name="T31"><text:span text:style-name="T31">total 25</text:span><text:span text:style-name="T31"/></text:p>
      <text:p text:style-name="Standard" loext:marker-style-name="T37"><text:span text:style-name="T31">drwxr-xr-x 1 michael.gassant 1049089 <text:s text:c="3"/>0 May 18 16:21 <text:s/></text:span><text:span text:style-name="T38">.</text:span><text:span text:style-name="T37">/</text:span></text:p>
      <text:p text:style-name="Standard" loext:marker-style-name="T37"><text:span text:style-name="T37">drwxr-xr-x 1 michael.gassant 1049089 <text:s text:c="3"/>0 May 18 14:38 <text:s/></text:span><text:span text:style-name="T38">..</text:span><text:span text:style-name="T37">/</text:span></text:p>
      <text:p text:style-name="Standard" loext:marker-style-name="T37"><text:span text:style-name="T37">drwxr-xr-x 1 michael.gassant 1049089 <text:s text:c="3"/>0 May 18 16:21 <text:s/></text:span><text:span text:style-name="T38">ACwebProjet</text:span><text:span text:style-name="T37">/</text:span></text:p>
      <text:p text:style-name="Standard" loext:marker-style-name="T37"><text:span text:style-name="T37">-rwxr-xr-x 1 michael.gassant 1049089 2276 May 18 14:40 </text:span><text:span text:style-name="T50">'Google Chrome.lnk'</text:span><text:span text:style-name="T37">*</text:span></text:p>
      <text:p text:style-name="Standard" loext:marker-style-name="T37"><text:span text:style-name="T37">-rwxr-xr-x 1 michael.gassant 1049089 2352 May 18 14:37 </text:span><text:span text:style-name="T50">'Microsoft Edge.lnk'</text:span><text:span text:style-name="T37">*</text:span></text:p>
      <text:p text:style-name="Standard" loext:marker-style-name="T37"><text:span text:style-name="T37">-rw-r--r-- 1 michael.gassant 1049089 <text:s/>282 May 18 14:37 <text:s/>desktop.ini</text:span><text:span text:style-name="T37"/></text:p>
      <text:p text:style-name="P45" loext:marker-style-name="T37"/>
      <text:p text:style-name="Standard" loext:marker-style-name="T48"><text:span text:style-name="T56">michael.gassant@RT-E208-PC14 </text:span><text:span text:style-name="T57">MINGW64 </text:span><text:span text:style-name="T48">/c/users/michael.gassant/Desktop</text:span></text:p>
      <text:p text:style-name="Standard" loext:marker-style-name="T37"><text:span text:style-name="T37">$ mv ACwebPRojet 36th_americas_cup</text:span><text:span text:style-name="T37"/></text:p>
      <text:p text:style-name="P45" loext:marker-style-name="T37"/>
      <text:p text:style-name="Standard" loext:marker-style-name="T48"><text:span text:style-name="T56">michael.gassant@RT-E208-PC14 </text:span><text:span text:style-name="T57">MINGW64 </text:span><text:span text:style-name="T48">/c/users/michael.gassant/Desktop</text:span></text:p>
      <text:p text:style-name="Standard" loext:marker-style-name="T37"><text:span text:style-name="T37">$ ls -al</text:span><text:span text:style-name="T37"/></text:p>
      <text:p text:style-name="Standard" loext:marker-style-name="T37"><text:span text:style-name="T37">total 25</text:span><text:span text:style-name="T37"/></text:p>
      <text:p text:style-name="Standard" loext:marker-style-name="T37"><text:span text:style-name="T37">drwxr-xr-x 1 michael.gassant 1049089 <text:s text:c="3"/>0 May 18 16:23 <text:s/></text:span><text:span text:style-name="T38">.</text:span><text:span text:style-name="T37">/</text:span></text:p>
      <text:p text:style-name="Standard" loext:marker-style-name="T37"><text:span text:style-name="T37">drwxr-xr-x 1 michael.gassant 1049089 <text:s text:c="3"/>0 May 18 14:38 <text:s/></text:span><text:span text:style-name="T38">..</text:span><text:span text:style-name="T37">/</text:span></text:p>
      <text:p text:style-name="Standard" loext:marker-style-name="T37"><text:span text:style-name="T37">drwxr-xr-x 1 michael.gassant 1049089 <text:s text:c="3"/>0 May 18 16:21 <text:s/></text:span><text:span text:style-name="T38">36th_americas_cup</text:span><text:span text:style-name="T37">/</text:span></text:p>
      <text:p text:style-name="Standard" loext:marker-style-name="T37"><text:span text:style-name="T37">-rwxr-xr-x 1 michael.gassant 1049089 2276 May 18 14:40 </text:span><text:span text:style-name="T50">'Google Chrome.lnk'</text:span><text:span text:style-name="T37">*</text:span></text:p>
      <text:p text:style-name="Standard" loext:marker-style-name="T37"><text:span text:style-name="T37">-rwxr-xr-x 1 michael.gassant 1049089 2352 May 18 14:37 </text:span><text:span text:style-name="T50">'Microsoft Edge.lnk'</text:span><text:span text:style-name="T37">*</text:span></text:p>
      <text:p text:style-name="Standard" loext:marker-style-name="T37"><text:span text:style-name="T37">-rw-r--r-- 1 michael.gassant 1049089 <text:s/>282 May 18 14:37 <text:s/>desktop.ini</text:span><text:span text:style-name="T37"/></text:p>
      <text:p text:style-name="P49"/>
      <text:p text:style-name="Mon_5f_texte"><text:soft-page-break/></text:p>
      <text:p text:style-name="Mon_5f_texte">Entrez dans le répertoire <text:span text:style-name="T24">36th_americas_cup</text:span> et vérifiez avec <text:span text:style-name="T26">git log</text:span> que tout l'historique est bien présent sur votre machine.</text:p>
      <text:p text:style-name="P18">Combien de version (commit) apparaissent et quels sont les messages associés ?</text:p>
      <text:p text:style-name="P50">Il y a 2 versions commit dont la première est github et le deuxième est celui de la première version du projet</text:p>
      <text:p text:style-name="Mon_5f_texte"/>
      <text:p text:style-name="Mon_5f_texte">Vérifiez qu'un lien, nommé par défaut '<text:span text:style-name="T26">origin</text:span>', vers le dépôt distant a été créé, par la commande <text:span text:style-name="T26">git remote -v</text:span></text:p>
      <text:p text:style-name="P18"/>
      <text:p text:style-name="Mon_5f_texte">Voilà, votre projet local est sain et sauf. Vous pouvez vous en convaincre en utilisant l’explorateur de fichiers Windows pour constater que les fichiers/dossiers sont bien là !</text:p>
      <text:p text:style-name="Mon_5f_texte">Notez également, la présence du fichier texte README.md (que vous aviez créé sur GitHub).</text:p>
      <text:p text:style-name="P18">Ouvrez le fichier avec Notepad++ et précisez ce qu’il contient :</text:p>
      <text:p text:style-name="P51"><text:span text:style-name="T58">Il contient ACwebProjet</text:span></text:p>
      <text:p text:style-name="Mon_5f_texte"/>
      <text:p text:style-name="P18">Ouvrez le fichier index.html dans un navigateur web. Le site web est-il opérationnel ?</text:p>
      <text:p text:style-name="P52"><text:span text:style-name="T59">Le site web est bien opérationnel</text:span></text:p>
      <text:p text:style-name="Mon_5f_texte"/>
      <text:p text:style-name="Mon_5f_texte"><text:span text:style-name="T20">Remarque</text:span> : il est aussi possible de réaliser un clonage de dépôt localement. Par cela, avec Git Bash, il faut se situer dans l’arborescence de fichiers au-dessus du projet courant, puis d’utiliser la commande <text:span text:style-name="T26">git clone <text:s/>36th_americas_cup <text:s/>36th_americas_cup2</text:span></text:p>
      <text:p text:style-name="P18"/>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cd ../</text:span><text:span text:style-name="T31"/></text:p>
      <text:p text:style-name="P36" loext:marker-style-name="T31"/>
      <text:p text:style-name="Standard" loext:marker-style-name="T28"><text:span text:style-name="T29">michael.gassant@RT-E208-PC14 </text:span><text:span text:style-name="T30">MINGW64 </text:span><text:span text:style-name="T28">/c/users/michael.gassant/Desktop</text:span></text:p>
      <text:p text:style-name="Standard" loext:marker-style-name="T31"><text:span text:style-name="T31">$ git clone 36th_americas_cup 36th_americas_cup2</text:span><text:span text:style-name="T31"/></text:p>
      <text:p text:style-name="Standard" loext:marker-style-name="T31"><text:span text:style-name="T31">Cloning into '36th_americas_cup2'...</text:span><text:span text:style-name="T31"/></text:p>
      <text:p text:style-name="Standard" loext:marker-style-name="T31"><text:span text:style-name="T31">done.</text:span><text:span text:style-name="T31"/></text:p>
      <text:p text:style-name="P53"/>
      <text:p text:style-name="Mon_5f_texte"/>
      <text:h text:style-name="P21" text:outline-level="2"><text:bookmark-start text:name="_Toc166434103"/>Gestion de version<text:bookmark-end text:name="_Toc166434103"/> </text:h>
      <text:p text:style-name="P25" loext:marker-style-name="T23"/>
      <text:p text:style-name="Mon_5f_texte">A ce stade du TP, il y a d’un côté le projet web contenant un ensemble de fichiers (html, jpg, css…) sur lesquels vous allez travailler ainsi qu’un dépôt Git qui sert à gérer les différentes versions de ce projet.</text:p>
      <text:p text:style-name="Mon_5f_texte"/>
      <text:p text:style-name="Mon_5f_texte">En continuant à travailler sur le projet web, vous allez être amené à ajouter, modifier, voire supprimer des fichiers. Vous allez indiquer tous ces changements à Git pour qu’il conserve un historique des versions auquel vous pourrez ensuite accéder pour revenir à un état précédent du projet (dans le cas où une modification entraine un bogue par exemple ou n’amène pas le résultat souhaité).</text:p>
      <text:p text:style-name="Mon_5f_texte"/>
      <text:p text:style-name="Mon_5f_texte"><text:soft-page-break/>Ainsi, vous voulez modifier la couleur actuelle des titres du site web, de bleu à blanc… Modifiez en conséquence, le fichier de style soit à partir des outils Windows soit directement sous Git Bash en utilisant l’éditeur nano.</text:p>
      <text:p text:style-name="P18">Reportez votre modification et vérifiez par un navigateur web que cette modification est bien réalisée :</text:p>
      <text:p text:style-name="P54"><text:span text:style-name="T60">Oui, après vérification la modification du style du titre a bien été pris en compte</text:span></text:p>
      <text:p text:style-name="Mon_5f_texte"/>
      <text:p text:style-name="P18">Exécutez la commande <text:span text:style-name="T26">git diff</text:span> et interprétez son compte-rendu :</text:p>
      <text:p text:style-name="P54"><text:span text:style-name="T60">Cette commande indique toutes modifications qui a été effectuer dans le dossier</text:span></text:p>
      <text:p text:style-name="Standard" loext:marker-style-name="T39"><text:span text:style-name="T29">michael.gassant@RT-E208-PC14 </text:span><text:span text:style-name="T30">MINGW64 </text:span><text:span text:style-name="T28">/c/users/michael.gassant/Desktop/36th_americas_cup/styles</text:span><text:span text:style-name="T39"> (main)</text:span></text:p>
      <text:p text:style-name="Standard" loext:marker-style-name="T31"><text:span text:style-name="T31">$ git diff</text:span><text:span text:style-name="T31"/></text:p>
      <text:p text:style-name="Standard" loext:marker-style-name="T61"><text:span text:style-name="T61">diff --git a/styles/36_americas_cup.css b/styles/36_americas_cup.css</text:span><text:span text:style-name="T61"/></text:p>
      <text:p text:style-name="Standard" loext:marker-style-name="T61"><text:span text:style-name="T61">index 874bc91..6933866 100644</text:span><text:span text:style-name="T61"/></text:p>
      <text:p text:style-name="Standard" loext:marker-style-name="T61"><text:span text:style-name="T61">--- a/styles/36_americas_cup.css</text:span><text:span text:style-name="T61"/></text:p>
      <text:p text:style-name="Standard" loext:marker-style-name="T61"><text:span text:style-name="T61">+++ b/styles/36_americas_cup.css</text:span><text:span text:style-name="T61"/></text:p>
      <text:p text:style-name="Standard" loext:marker-style-name="T37"><text:span text:style-name="T62">@@ -14,7 +14,7 @@ </text:span><text:span text:style-name="T37">header</text:span></text:p>
      <text:p text:style-name="Standard" loext:marker-style-name="T37"><text:span text:style-name="T37"><text:s/>h1 <text:s text:c="3"/>/* Style à appliquer sur les titres h1 */</text:span><text:span text:style-name="T37"/></text:p>
      <text:p text:style-name="Standard" loext:marker-style-name="T37"><text:span text:style-name="T37"><text:s/>{</text:span><text:span text:style-name="T37"/></text:p>
      <text:p text:style-name="Standard" loext:marker-style-name="T37"><text:span text:style-name="T37"><text:s text:c="3"/>text-align: center;</text:span><text:span text:style-name="T37"/></text:p>
      <text:p text:style-name="Standard" loext:marker-style-name="T63"><text:span text:style-name="T63">- <text:s/>color: #0A6FB0;</text:span><text:span text:style-name="T63"/></text:p>
      <text:p text:style-name="Standard" loext:marker-style-name="T56"><text:span text:style-name="T56">+ <text:s/>color: #02A3D40;</text:span><text:span text:style-name="T56"/></text:p>
      <text:p text:style-name="Standard" loext:marker-style-name="T37"><text:span text:style-name="T37"><text:s text:c="3"/>letter-spacing: 0.5em;</text:span><text:span text:style-name="T37"/></text:p>
      <text:p text:style-name="Standard" loext:marker-style-name="T37"><text:span text:style-name="T37"><text:s/>}</text:span><text:span text:style-name="T37"/></text:p>
      <text:p text:style-name="Standard" loext:marker-style-name="T37"><text:span text:style-name="T37"><text:s/>h2 <text:s text:c="4"/>/* Style à appliquer sur les sous-titres h2 */</text:span><text:span text:style-name="T37"/></text:p>
      <text:p text:style-name="P55"/>
      <text:p text:style-name="Mon_5f_texte"/>
      <text:p text:style-name="P18">Lancez la commande <text:span text:style-name="T26">git status</text:span>. Que constatez-vous ?</text:p>
      <text:p text:style-name="Standard" loext:marker-style-name="T39"><text:span text:style-name="T29">michael.gassant@RT-E208-PC14 </text:span><text:span text:style-name="T30">MINGW64 </text:span><text:span text:style-name="T28">/c/users/michael.gassant/Desktop/36th_americas_cup/styles</text:span><text:span text:style-name="T39"> (main)</text:span></text:p>
      <text:p text:style-name="Standard" loext:marker-style-name="T31"><text:span text:style-name="T31">$ git status</text:span><text:span text:style-name="T31"/></text:p>
      <text:p text:style-name="Standard" loext:marker-style-name="T31"><text:span text:style-name="T31">On branch main</text:span><text:span text:style-name="T31"/></text:p>
      <text:p text:style-name="Standard" loext:marker-style-name="T31"><text:span text:style-name="T31">Your branch is up to date with 'origin/main'.</text:span><text:span text:style-name="T31"/></text:p>
      <text:p text:style-name="P36" loext:marker-style-name="T31"/>
      <text:p text:style-name="Standard" loext:marker-style-name="T31"><text:span text:style-name="T31">Changes not staged for commit:</text:span><text:span text:style-name="T31"/></text:p>
      <text:p text:style-name="Standard" loext:marker-style-name="T31"><text:span text:style-name="T31"><text:s text:c="2"/>(use "git add &lt;file&gt;..." to update what will be committed)</text:span><text:span text:style-name="T31"/></text:p>
      <text:p text:style-name="Standard" loext:marker-style-name="T31"><text:span text:style-name="T31"><text:s text:c="2"/>(use "git restore &lt;file&gt;..." to discard changes in working directory)</text:span><text:span text:style-name="T31"/></text:p>
      <text:p text:style-name="Standard" loext:marker-style-name="T64"><text:span text:style-name="T31"><text:s text:c="8"/></text:span><text:span text:style-name="T64">modified: <text:s text:c="2"/>36_americas_cup.css</text:span></text:p>
      <text:p text:style-name="P56" loext:marker-style-name="T64"/>
      <text:p text:style-name="Standard" loext:marker-style-name="T31"><text:span text:style-name="T31">no changes added to commit (use "git add" and/or "git commit -a")</text:span><text:span text:style-name="T31"/></text:p>
      <text:p text:style-name="Standard"/>
      <text:p text:style-name="P54"><text:span text:style-name="T60">Je peux constater precisement le fichier qui a été modifier par X et si il a ete commit ou pas</text:span></text:p>
      <text:p text:style-name="Mon_5f_texte"/>
      <text:p text:style-name="P18">Indexez la feuille de style (reportez ci-dessous la commande effectuée), puis exécutez la commande <text:span text:style-name="T26">git status</text:span>. Que constatez-vous ? <text:span text:style-name="T65">Indexez : stage ( git add )</text:span></text:p>
      <text:p text:style-name="Réponse">Commande : <text:span text:style-name="T66">git add .</text:span></text:p>
      <text:p text:style-name="Réponse">Résultat de <text:span text:style-name="T40">git status</text:span> : </text:p>
      <text:p text:style-name="Réponse"/>
      <text:p text:style-name="Standard" loext:marker-style-name="T39"><text:span text:style-name="T29">michael.gassant@RT-E208-PC14 </text:span><text:span text:style-name="T30">MINGW64 </text:span><text:span text:style-name="T28">/c/users/michael.gassant/Desktop/36th_americas_cup/styles</text:span><text:span text:style-name="T39"> (main)</text:span></text:p>
      <text:p text:style-name="Standard" loext:marker-style-name="T31"><text:span text:style-name="T31">$ git status</text:span><text:span text:style-name="T31"/></text:p>
      <text:p text:style-name="Standard" loext:marker-style-name="T31"><text:span text:style-name="T31">On branch main</text:span><text:span text:style-name="T31"/></text:p>
      <text:p text:style-name="Standard" loext:marker-style-name="T31"><text:span text:style-name="T31">Your branch is up to date with 'origin/main'.</text:span><text:span text:style-name="T31"/></text:p>
      <text:p text:style-name="P36" loext:marker-style-name="T31"/>
      <text:p text:style-name="Standard" loext:marker-style-name="T31"><text:span text:style-name="T31">Changes to be committed:</text:span><text:span text:style-name="T31"/></text:p>
      <text:p text:style-name="Standard" loext:marker-style-name="T31"><text:span text:style-name="T31"><text:s text:c="2"/>(use "git restore --staged &lt;file&gt;..." to unstage)</text:span><text:span text:style-name="T31"/></text:p>
      <text:p text:style-name="Standard" loext:marker-style-name="T29"><text:span text:style-name="T31"><text:s text:c="8"/></text:span><text:span text:style-name="T29">modified: <text:s text:c="2"/>36_americas_cup.css</text:span></text:p>
      <text:p text:style-name="Standard"><text:soft-page-break/></text:p>
      <text:p text:style-name="Mon_5f_texte">Enregistrez dans le Repository cette modification de version de la feuille de style, en précisant la nature de la modification "Changement titre h1 en blanc" (reportez ci-dessous la commande effectuée), puis exécutez la commande <text:span text:style-name="T26">git log</text:span> et <text:span text:style-name="T26">git log --oneline</text:span>. </text:p>
      <text:p text:style-name="P57">Que constatez-vous ? <text:span text:style-name="T65">Repository ( git commit )</text:span></text:p>
      <text:p text:style-name="P58">Commande : <text:span text:style-name="T67">git commit -m "</text:span><text:span text:style-name="T68">Deuxième</text:span><text:span text:style-name="T67"> version du projet"</text:span></text:p>
      <text:p text:style-name="Réponse">Résultat de <text:span text:style-name="T40">git log</text:span> : </text:p>
      <text:p text:style-name="Standard" loext:marker-style-name="T39"><text:span text:style-name="T29">michael.gassant@RT-E208-PC14 </text:span><text:span text:style-name="T30">MINGW64 </text:span><text:span text:style-name="T28">/c/users/michael.gassant/Desktop/36th_americas_cup/styles</text:span><text:span text:style-name="T39"> (main)</text:span></text:p>
      <text:p text:style-name="Standard" loext:marker-style-name="T31"><text:span text:style-name="T31">$ git commit -m "Deuxièeme version du projet"</text:span><text:span text:style-name="T31"/></text:p>
      <text:p text:style-name="Standard" loext:marker-style-name="T31"><text:span text:style-name="T31">[main 9473c40] Deuxièeme version du projet</text:span><text:span text:style-name="T31"/></text:p>
      <text:p text:style-name="Standard" loext:marker-style-name="T31"><text:span text:style-name="T31"><text:s/>1 file changed, 1 insertion(+), 1 deletion(-)</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styles</text:span><text:span text:style-name="T39"> (main)</text:span></text:p>
      <text:p text:style-name="Standard" loext:marker-style-name="T31"><text:span text:style-name="T31">$ git log</text:span><text:span text:style-name="T31"/></text:p>
      <text:p text:style-name="Standard" loext:marker-style-name="T48"><text:span text:style-name="T28">commit 9473c40345ff044e51c9c3625e5fca284d78255f (</text:span><text:span text:style-name="T49">HEAD</text:span><text:span text:style-name="T48"> -&gt; </text:span><text:span text:style-name="T50">main</text:span><text:span text:style-name="T48">)</text:span></text:p>
      <text:p text:style-name="Standard" loext:marker-style-name="T37"><text:span text:style-name="T37">Author: Gassant &lt;michael.gassant@ikmail.com&gt;</text:span><text:span text:style-name="T37"/></text:p>
      <text:p text:style-name="Standard" loext:marker-style-name="T37"><text:span text:style-name="T37">Date: <text:s text:c="2"/>Mon May 18 16:44:14 2026 +0200</text:span><text:span text:style-name="T37"/></text:p>
      <text:p text:style-name="P45" loext:marker-style-name="T37"/>
      <text:p text:style-name="Standard" loext:marker-style-name="T37"><text:span text:style-name="T37"><text:s text:c="4"/>Deuxièeme version du projet</text:span><text:span text:style-name="T37"/></text:p>
      <text:p text:style-name="P45" loext:marker-style-name="T37"/>
      <text:p text:style-name="Standard" loext:marker-style-name="T48"><text:span text:style-name="T48">commit 4832b8f14c07b614d1e235519f926b7086f01a3e (</text:span><text:span text:style-name="T55">origin/main</text:span><text:span text:style-name="T48">, </text:span><text:span text:style-name="T55">origin/HEAD</text:span><text:span text:style-name="T48">)</text:span></text:p>
      <text:p text:style-name="Standard" loext:marker-style-name="T37"><text:span text:style-name="T37">Author: LORVINS &lt;122697079+LORVINS@users.noreply.github.com&gt;</text:span><text:span text:style-name="T37"/></text:p>
      <text:p text:style-name="Standard" loext:marker-style-name="T37"><text:span text:style-name="T37">Date: <text:s text:c="2"/>Mon May 18 16:17:03 2026 +0200</text:span><text:span text:style-name="T37"/></text:p>
      <text:p text:style-name="P45" loext:marker-style-name="T37"/>
      <text:p text:style-name="Standard" loext:marker-style-name="T37"><text:span text:style-name="T37"><text:s text:c="4"/>Create README.md</text:span><text:span text:style-name="T37"/></text:p>
      <text:p text:style-name="P45" loext:marker-style-name="T37"/>
      <text:p text:style-name="Standard" loext:marker-style-name="T48"><text:span text:style-name="T48">commit a3c9c99e4f8b0c56a07c266ad1b3778cbebaa6d1</text:span><text:span text:style-name="T48"/></text:p>
      <text:p text:style-name="Standard" loext:marker-style-name="T37"><text:span text:style-name="T37">Author: Gassant &lt;michael.gassant@ikmail.com&gt;</text:span><text:span text:style-name="T37"/></text:p>
      <text:p text:style-name="Standard" loext:marker-style-name="T37"><text:span text:style-name="T37">Date: <text:s text:c="2"/>Mon May 18 15:46:10 2026 +0200</text:span><text:span text:style-name="T37"/></text:p>
      <text:p text:style-name="P45" loext:marker-style-name="T37"/>
      <text:p text:style-name="Standard" loext:marker-style-name="T37"><text:span text:style-name="T37"><text:s text:c="4"/>Première version du projet</text:span><text:span text:style-name="T37"/></text:p>
      <text:p text:style-name="Standard"/>
      <text:p text:style-name="Mon_5f_texte"/>
      <text:p text:style-name="P18">Enfin mettez à jour votre dépôt distant GitHub et reportez ci-dessous la commande effectuée :</text:p>
      <text:p text:style-name="Réponse">Commande : <text:span text:style-name="T69">git push -u origin main</text:span></text:p>
      <text:p text:style-name="Réponse"/>
      <text:p text:style-name="Standard" loext:marker-style-name="T39"><text:span text:style-name="T29">michael.gassant@RT-E208-PC14 </text:span><text:span text:style-name="T30">MINGW64 </text:span><text:span text:style-name="T28">/c/users/michael.gassant/Desktop/36th_americas_cup/styles</text:span><text:span text:style-name="T39"> (main)</text:span></text:p>
      <text:p text:style-name="Standard" loext:marker-style-name="T31"><text:span text:style-name="T31">$ git push -u origin main</text:span><text:span text:style-name="T31"/></text:p>
      <text:p text:style-name="Standard" loext:marker-style-name="T31"><text:span text:style-name="T31">Enumerating objects: 7, done.</text:span><text:span text:style-name="T31"/></text:p>
      <text:p text:style-name="Standard" loext:marker-style-name="T31"><text:span text:style-name="T31">Counting objects: 100% (7/7), done.</text:span><text:span text:style-name="T31"/></text:p>
      <text:p text:style-name="Standard" loext:marker-style-name="T31"><text:span text:style-name="T31">Delta compression using up to 20 threads</text:span><text:span text:style-name="T31"/></text:p>
      <text:p text:style-name="Standard" loext:marker-style-name="T31"><text:span text:style-name="T31">Compressing objects: 100% (3/3), done.</text:span><text:span text:style-name="T31"/></text:p>
      <text:p text:style-name="Standard" loext:marker-style-name="T31"><text:span text:style-name="T31">Writing objects: 100% (4/4), 367 bytes | 367.00 KiB/s, done.</text:span><text:span text:style-name="T31"/></text:p>
      <text:p text:style-name="Standard" loext:marker-style-name="T31"><text:span text:style-name="T31">Total 4 (delta 2), reused 0 (delta 0), pack-reused 0 (from 0)</text:span><text:span text:style-name="T31"/></text:p>
      <text:p text:style-name="Standard" loext:marker-style-name="T31"><text:span text:style-name="T31">remote: Resolving deltas: 100% (2/2), completed with 2 local objects.</text:span><text:span text:style-name="T31"/></text:p>
      <text:p text:style-name="Standard" loext:marker-style-name="T31"><text:span text:style-name="T31">To https://github.com/LORVINS/ACwebProjet.git</text:span><text:span text:style-name="T31"/></text:p>
      <text:p text:style-name="Standard" loext:marker-style-name="T31"><text:span text:style-name="T31"><text:s text:c="3"/>4832b8f..9473c40 <text:s/>main -&gt; main</text:span><text:span text:style-name="T31"/></text:p>
      <text:p text:style-name="Standard" loext:marker-style-name="T31"><text:span text:style-name="T31">branch 'main' set up to track 'origin/main'.</text:span></text:p>
      <text:p text:style-name="Mon_5f_texte"/>
      <text:p text:style-name="Mon_5f_texte">Revenez sur votre 'repository' <text:span text:style-name="T20">ACwebProjet</text:span> sous GitHub. Vous devriez obtenir ce type d’affichage avec ces changements :</text:p>
      <text:p text:style-name="Mon_5f_texte"><draw:g text:anchor-type="char" draw:z-index="14" draw:name="Groupe 17" draw:style-name="gr22"><draw:frame draw:name="Image 2" draw:style-name="gr2" draw:text-style-name="P1" svg:width="18.634cm" svg:height="4.684cm" svg:x="-1.651cm" svg:y="0.213cm"><draw:image xlink:href="Pictures/1000000000000393000000E6A26884DC.png" xlink:type="simple" xlink:show="embed" xlink:actuate="onLoad" draw:mime-type="image/png"><text:p/></draw:image></draw:frame><draw:custom-shape draw:name="Rectangle : coins arrondis 6" draw:style-name="gr23" draw:text-style-name="P6" svg:width="4.287cm" svg:height="0.872cm" svg:x="4.355cm" svg:y="4.025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custom-shape draw:name="Rectangle : coins arrondis 8" draw:style-name="gr24" draw:text-style-name="P6" svg:width="2.195cm" svg:height="0.872cm" svg:x="14.437cm" svg:y="1.509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custom-shape draw:name="Rectangle : coins arrondis 13" draw:style-name="gr25" draw:text-style-name="P6" svg:width="3.915cm" svg:height="0.872cm" svg:x="0.783cm" svg:y="1.509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g></text:p>
      <text:p text:style-name="Mon_5f_texte"/>
      <text:p text:style-name="Mon_5f_texte"/>
      <text:p text:style-name="Mon_5f_texte"/>
      <text:p text:style-name="Mon_5f_texte"/>
      <text:p text:style-name="Mon_5f_texte"/>
      <text:p text:style-name="Mon_5f_texte"><text:soft-page-break/></text:p>
      <text:p text:style-name="P18"/>
      <text:p text:style-name="P18"/>
      <text:p text:style-name="P18">Cliquez sur <text:span text:style-name="T70">Changement titre h1 en blanc</text:span> (à côté de votre login : zone bleue). Que constatez-vous ?</text:p>
      <text:p text:style-name="P59"><text:span text:style-name="T71">On peut constater que on remarque la zone de la modification effectuer par X, l’avant et l’après, ce qui nous permet d’avoir une sorte d’historique</text:span></text:p>
      <text:p text:style-name="Mon_5f_texte"/>
      <text:p text:style-name="Mon_5f_texte">Supprimez (par erreur !) la feuille de style soit à partir de l’explorateur Windows soit à partir de Git Bash par la commande : <text:s/><text:span text:style-name="T26">rm <text:s/>36_americas_cup.css</text:span></text:p>
      <text:p text:style-name="Mon_5f_texte"/>
      <text:p text:style-name="P18">Actualisez dans un navigateur web la page index.html par exemple. Que constatez-vous ?</text:p>
      <text:p text:style-name="P60">On peut constater que la suppression du fichier css, enlevé l’apparence visuelle du site web qui a pour effet d’avoir une visuelle brut d’HTML</text:p>
      <text:p text:style-name="P18"/>
      <text:p text:style-name="Mon_5f_texte">Horreur ! Vous venez de perdre 5h de travail !</text:p>
      <text:p text:style-name="Mon_5f_texte">Que nenni, il existe une version dans le dépôt local que l’on peut utiliser !</text:p>
      <text:p text:style-name="P18"/>
      <text:p text:style-name="P18">D’autre part, confirmez par la commande <text:span text:style-name="T26">git status</text:span> que Git a bien vu ce changement. Que vous propose-t-il comme action possible ? </text:p>
      <text:p text:style-name="P59"><text:span text:style-name="T71">Il propose git add et/ou git commit -a</text:span></text:p>
      <text:p text:style-name="P18"/>
      <text:p text:style-name="Mon_5f_texte">Cette restauration peut se réaliser avec la commande générale <text:span text:style-name="T26">git checkout -- nom-du-fichier</text:span> ou la nouvelle commande spécialisée <text:span text:style-name="T26">git restore</text:span></text:p>
      <text:p text:style-name="P18">Exécutez les commandes <text:span text:style-name="T26">git restore 36_americas_cup.css</text:span>, <text:span text:style-name="T26">git status</text:span> et <text:span text:style-name="T26">ls -al</text:span>. Que constatez-vous ? <text:s/>Et au niveau de la page index.html dans le navigateur ?</text:p>
      <text:p text:style-name="P61">On peut constater que la restauration du fichier a bien ete realiser avec succès. La resstauration du style du site web a bien ete effectuer avec succès aussi.</text:p>
      <text:p text:style-name="P61">On retrouve le feuille de style.</text:p>
      <text:p text:style-name="P62"/>
      <text:p text:style-name="Standard" loext:marker-style-name="T39"><text:span text:style-name="T29">michael.gassant@RT-E208-PC14 </text:span><text:span text:style-name="T30">MINGW64 </text:span><text:span text:style-name="T28">/c/users/michael.gassant/Desktop/36th_americas_cup/styles</text:span><text:span text:style-name="T39"> (main)</text:span></text:p>
      <text:p text:style-name="Standard" loext:marker-style-name="T31"><text:span text:style-name="T31">$ git restore 36_americas_cup.css</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styles</text:span><text:span text:style-name="T39"> (main)</text:span></text:p>
      <text:p text:style-name="Standard" loext:marker-style-name="T31"><text:span text:style-name="T31">$ ls</text:span><text:span text:style-name="T31"/></text:p>
      <text:p text:style-name="Standard" loext:marker-style-name="T31"><text:span text:style-name="T31">36_americas_cup.css</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styles</text:span><text:span text:style-name="T39"> (main)</text:span></text:p>
      <text:p text:style-name="Standard" loext:marker-style-name="T31"><text:span text:style-name="T31">$ git status</text:span><text:span text:style-name="T31"/></text:p>
      <text:p text:style-name="Standard" loext:marker-style-name="T31"><text:span text:style-name="T31">On branch main</text:span><text:span text:style-name="T31"/></text:p>
      <text:p text:style-name="Standard" loext:marker-style-name="T31"><text:span text:style-name="T31">Your branch is up to date with 'origin/main'.</text:span><text:span text:style-name="T31"/></text:p>
      <text:p text:style-name="P36" loext:marker-style-name="T31"/>
      <text:p text:style-name="Standard" loext:marker-style-name="T31"><text:span text:style-name="T31">nothing to commit, working tree clean</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styles</text:span><text:span text:style-name="T39"> (main)</text:span></text:p>
      <text:p text:style-name="Standard" loext:marker-style-name="T31"><text:span text:style-name="T31">$ ls -al</text:span><text:span text:style-name="T31"/></text:p>
      <text:p text:style-name="Standard" loext:marker-style-name="T31"><text:span text:style-name="T31">total 8</text:span><text:span text:style-name="T31"/></text:p>
      <text:p text:style-name="Standard" loext:marker-style-name="T37"><text:span text:style-name="T31">drwxr-xr-x 1 michael.gassant 1049089 <text:s text:c="3"/>0 May 18 16:52 </text:span><text:span text:style-name="T38">.</text:span><text:span text:style-name="T37">/</text:span></text:p>
      <text:p text:style-name="Standard" loext:marker-style-name="T37"><text:soft-page-break/><text:span text:style-name="T37">drwxr-xr-x 1 michael.gassant 1049089 <text:s text:c="3"/>0 May 18 16:21 </text:span><text:span text:style-name="T38">..</text:span><text:span text:style-name="T37">/</text:span></text:p>
      <text:p text:style-name="Standard" loext:marker-style-name="T37"><text:span text:style-name="T37">-rw-r--r-- 1 michael.gassant 1049089 2138 May 18 16:52 36_americas_cup.css</text:span><text:span text:style-name="T37"/></text:p>
      <text:p text:style-name="P63"/>
      <text:p text:style-name="Mon_5f_texte"/>
      <text:p text:style-name="Mon_5f_texte">Tout est rentré dans l’ordre, ouf ! </text:p>
      <text:p text:style-name="Mon_5f_texte">Cependant, Git avait proposé une autre action possible… </text:p>
      <text:p text:style-name="Mon_5f_texte">En effet, Git ne peut pas savoir si cette suppression de fichier était involontaire ou pas. Or, si cette suppression était volontaire, il faudrait mettre à jour l’index et le repository, pour que Git ne fasse plus le suivi de version de ce fichier, par les commandes :</text:p>
      <text:p text:style-name="Mon_5f_texte" loext:marker-style-name="T70"><text:span text:style-name="T26">git rm 36_americas_cup.css</text:span> <text:s text:c="3"/><text:span text:style-name="T26"><text:s/></text:span><text:s/>et<text:span text:style-name="T70"> </text:span></text:p>
      <text:p text:style-name="Mon_5f_texte"><text:span text:style-name="T26">git commit -m "suppression de la feuille de style" <text:s text:c="4"/></text:span>par exemple.</text:p>
      <text:p text:style-name="Mon_5f_texte"/>
      <text:p text:style-name="Mon_5f_texte"><draw:g text:anchor-type="char" draw:z-index="15" draw:name="Groupe 27" draw:style-name="gr26"><draw:frame draw:name="Image 26" draw:style-name="gr2" draw:text-style-name="P1" svg:width="13.997cm" svg:height="6.615cm" svg:x="0.254cm" svg:y="0.116cm"><draw:image xlink:href="Pictures/1000000000000211000000FA34939168.png" xlink:type="simple" xlink:show="embed" xlink:actuate="onLoad" draw:mime-type="image/png"><text:p/></draw:image></draw:frame><draw:custom-shape draw:name="Zone de texte 20" draw:style-name="gr8" draw:text-style-name="P39" svg:width="1.317cm" svg:height="0.814cm" svg:x="1.603cm" svg:y="1.889cm"><text:p text:style-name="Standard" loext:marker-style-name="T40"><text:span text:style-name="T40">ad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2" draw:style-name="gr9" draw:text-style-name="P39" svg:width="1.987cm" svg:height="0.814cm" svg:x="7.849cm" svg:y="3.875cm"><text:p text:style-name="Standard" loext:marker-style-name="T40"><text:span text:style-name="T40">comm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5" draw:style-name="gr27" draw:text-style-name="P39" svg:width="1.925cm" svg:height="0.814cm" svg:x="7.849cm" svg:y="1.942cm"><text:p text:style-name="Standard" loext:marker-style-name="T40"><text:span text:style-name="T40">rest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P18"/>
      <text:p text:style-name="P19" loext:marker-style-name="T22"/>
      <text:p text:style-name="P47"/>
      <text:h text:style-name="P21" text:outline-level="2"><text:bookmark-start text:name="_Toc166434104"/>Gestion de l’historique<text:bookmark-end text:name="_Toc166434104"/></text:h>
      <text:p text:style-name="Mon_5f_texte"/>
      <text:p text:style-name="Mon_5f_texte">Très bien, on vient de récupérer la dernière version de la feuille de style… mais si on veut retrouver la feuille d’antan ?</text:p>
      <text:p text:style-name="Mon_5f_texte">En effet, il existe plusieurs versions de la feuille de style !</text:p>
      <text:p text:style-name="Mon_5f_texte"/>
      <text:p text:style-name="Mon_5f_texte">Pour s’en assurer, exécutez la commande <text:span text:style-name="T26">git log --oneline</text:span></text:p>
      <text:p text:style-name="Mon_5f_texte">Vous devriez obtenir quelque chose dans ce style :</text:p>
      <text:p text:style-name="P64" loext:marker-style-name="T72"><text:span text:style-name="T73">User@PC-IUT1 </text:span><text:span text:style-name="T74">MINGW64</text:span><text:span text:style-name="T72"> </text:span><text:span text:style-name="T75">~/Desktop/36th_americas_cup/styles</text:span><text:span text:style-name="T72"> </text:span><text:span text:style-name="T76">(main)</text:span></text:p>
      <text:p text:style-name="P64" loext:marker-style-name="T72"><text:span text:style-name="T72">$ git log --oneline</text:span><text:span text:style-name="T72"/></text:p>
      <text:p text:style-name="P64" loext:marker-style-name="T72"><text:span text:style-name="T75">540fcf1 (</text:span><text:span text:style-name="T77">HEAD -&gt; </text:span><text:span text:style-name="T78">main</text:span><text:span text:style-name="T72">, </text:span><text:span text:style-name="T79">origin/main</text:span><text:span text:style-name="T72">) Changement titre h1 en blanc</text:span></text:p>
      <text:p text:style-name="P64" loext:marker-style-name="T72"><text:span text:style-name="T75">c1c5a05</text:span><text:span text:style-name="T72"> Create README.md</text:span></text:p>
      <text:p text:style-name="P64" loext:marker-style-name="T72"><text:span text:style-name="T75">aeebabf</text:span><text:span text:style-name="T72"> Premiere version du projet web</text:span></text:p>
      <text:p text:style-name="Mon_5f_texte"/>
      <text:p text:style-name="Mon_5f_texte">Cela représente les différents <text:span text:style-name="T20">commits</text:span> réalisés (donc les différentes versions du projet) et cela constitue <text:span text:style-name="T20">l’historique des versions</text:span>. Par rapport, à votre propre résultat, il y a très certainement des différences sur les identifiants des <text:span text:style-name="T20">commits</text:span> qui figurent en première colonne.</text:p>
      <text:p text:style-name="Mon_5f_texte"/>
      <text:p text:style-name="Mon_5f_texte">Cet historique constitue la branche <text:span text:style-name="T76">main</text:span> du projet. Suivant l’avancement du projet, les tests… plusieurs branches peuvent être par la suite créées. </text:p>
      <text:p text:style-name="Mon_5f_texte"/>
      <text:p text:style-name="Mon_5f_texte">Pour avoir plus de détail sur un <text:span text:style-name="T20">commit</text:span> particulier vous pouvez utiliser <text:span text:style-name="T26">git show</text:span> suivi de l'identifiant du commit (c1c5a05 dans le cas présenté, mais à adapter en fonction de votre propre historique).</text:p>
      <text:p text:style-name="P18">Rappelez-vous de quoi il s’agissait ? </text:p>
      <text:p text:style-name="P65">ACwebProjet</text:p>
      <text:p text:style-name="Réponse"/>
      <text:p text:style-name="Standard" loext:marker-style-name="T39"><text:span text:style-name="T29">michael.gassant@RT-E208-PC14 </text:span><text:span text:style-name="T30">MINGW64 </text:span><text:span text:style-name="T28">/c/users/michael.gassant/Desktop/36th_americas_cup/styles</text:span><text:span text:style-name="T39"> (main)</text:span></text:p>
      <text:p text:style-name="Standard" loext:marker-style-name="T31"><text:span text:style-name="T31">$ git show 4832b8f</text:span><text:span text:style-name="T31"/></text:p>
      <text:p text:style-name="Standard" loext:marker-style-name="T28"><text:span text:style-name="T28">commit 4832b8f14c07b614d1e235519f926b7086f01a3e</text:span><text:span text:style-name="T28"/></text:p>
      <text:p text:style-name="Standard" loext:marker-style-name="T31"><text:span text:style-name="T31">Author: LORVINS &lt;122697079+LORVINS@users.noreply.github.com&gt;</text:span><text:span text:style-name="T31"/></text:p>
      <text:p text:style-name="Standard" loext:marker-style-name="T31"><text:span text:style-name="T31">Date: <text:s text:c="2"/>Mon May 18 16:17:03 2026 +0200</text:span><text:span text:style-name="T31"/></text:p>
      <text:p text:style-name="P36" loext:marker-style-name="T31"/>
      <text:p text:style-name="Standard" loext:marker-style-name="T31"><text:span text:style-name="T31"><text:s text:c="4"/>Create README.md</text:span><text:span text:style-name="T31"/></text:p>
      <text:p text:style-name="P36" loext:marker-style-name="T31"/>
      <text:p text:style-name="Standard" loext:marker-style-name="T61"><text:span text:style-name="T61">diff --git a/README.md b/README.md</text:span><text:span text:style-name="T61"/></text:p>
      <text:p text:style-name="Standard" loext:marker-style-name="T61"><text:span text:style-name="T61">new file mode 100644</text:span><text:span text:style-name="T61"/></text:p>
      <text:p text:style-name="Standard" loext:marker-style-name="T61"><text:span text:style-name="T61">index 0000000..506f374</text:span><text:span text:style-name="T61"/></text:p>
      <text:p text:style-name="Standard" loext:marker-style-name="T61"><text:span text:style-name="T61">--- /dev/null</text:span><text:span text:style-name="T61"/></text:p>
      <text:p text:style-name="Standard" loext:marker-style-name="T61"><text:span text:style-name="T61">+++ b/README.md</text:span><text:span text:style-name="T61"/></text:p>
      <text:p text:style-name="Standard" loext:marker-style-name="T62"><text:span text:style-name="T62">@@ -0,0 +1 @@</text:span><text:span text:style-name="T62"/></text:p>
      <text:p text:style-name="Standard" loext:marker-style-name="T56"><text:span text:style-name="T56">+ACwebProjet</text:span></text:p>
      <text:p text:style-name="Mon_5f_texte"/>
      <text:p text:style-name="Mon_5f_texte"/>
      <text:p text:style-name="Mon_5f_texte">Vous aurez également noté la présence des éléments <text:span text:style-name="T77">HEAD</text:span> et <text:span text:style-name="T78">main</text:span>. Il s’agit de 2 pointeurs :</text:p>
      <text:list xml:id="list181001766429504" text:continue-numbering="true" text:style-name="WWNum4">
        <text:list-item>
          <text:p text:style-name="P66">le pointeur <text:span text:style-name="T77">HEAD</text:span> désigne le commit actif</text:p>
        </text:list-item>
        <text:list-item>
          <text:p text:style-name="P66">le pointeur <text:span text:style-name="T78">main</text:span> désigne toujours la tête de l'historique</text:p>
        </text:list-item>
      </text:list>
      <text:p text:style-name="Mon_5f_texte"/>
      <text:p text:style-name="Mon_5f_texte"><text:soft-page-break/>Ces 2 pointeurs sont actuellement sur le même commit. C’est normal puisqu’il s’agit de la dernière version du projet qui est actuellement utilisée !</text:p>
      <text:p text:style-name="P19" loext:marker-style-name="T22"/>
      <text:p text:style-name="P67"><draw:g text:anchor-type="char" draw:z-index="40" draw:name="Groupe 949" draw:style-name="gr7"><draw:g draw:style-name="gr28"><draw:custom-shape draw:name="Ellipse 96" draw:style-name="gr29" draw:text-style-name="P68" svg:width="1.348cm" svg:height="1.244cm" svg:x="0.811cm" svg:y="2.38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Zone de texte 97" draw:style-name="gr30" draw:text-style-name="P39" svg:width="2.142cm" svg:height="1.292cm" svg:x="0.423cm" svg:y="3.785cm"><text:p text:style-name="P3"><text:span text:style-name="T80">commit acti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Zone de texte 98" draw:style-name="gr31" draw:text-style-name="P39" svg:width="3.698cm" svg:height="1.442cm" svg:x="-0.318cm" svg:y="0.661cm"><text:p text:style-name="P69" loext:marker-style-name="T20"><text:span text:style-name="T20">Repository local</text:span><text:span text:style-name="T20"/></text:p><text:p text:style-name="P70" loext:marker-style-name="T27"/><text:p text:style-name="P69">Branche : <text:span text:style-name="T76">main</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On peut illustrer cela par le schéma suivant :</text:p>
      <text:p text:style-name="Mon_5f_texte"><draw:g text:anchor-type="char" draw:z-index="16" draw:name="Groupe 951" draw:style-name="gr7"><draw:custom-shape draw:name="Zone de texte 37" draw:style-name="gr32" draw:text-style-name="P39" svg:width="1.428cm" svg:height="0.66cm" svg:x="10.638cm" svg:y="2.196cm"><text:p text:style-name="P3"><text:span text:style-name="T81">ma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lipse 28" draw:style-name="gr33" draw:text-style-name="P6" svg:width="1.348cm" svg:height="1.243cm" svg:x="4.952cm" svg:y="0.295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lipse 29" draw:style-name="gr33" draw:text-style-name="P6" svg:width="1.348cm" svg:height="1.243cm" svg:x="7.834cm" svg:y="0.295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lipse 30" draw:style-name="gr34" draw:text-style-name="P71" svg:width="1.348cm" svg:height="1.243cm" svg:x="10.716cm" svg:y="0.295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Zone de texte 31" draw:style-name="gr32" draw:text-style-name="P39" svg:width="2.142cm" svg:height="0.66cm" svg:x="10.326cm" svg:y="1.697cm"><text:p text:style-name="P3"><text:span text:style-name="T80">540fcf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32" draw:style-name="gr32" draw:text-style-name="P39" svg:width="2.142cm" svg:height="0.66cm" svg:x="7.46cm" svg:y="1.697cm"><text:p text:style-name="P3"><text:span text:style-name="T80">c1c5a0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necteur droit 39" draw:style-name="gr35" draw:text-style-name="P6" svg:x1="6.306cm" svg:y1="0.927cm" svg:x2="7.84cm" svg:y2="0.928cm"><text:p/></draw:line><draw:line draw:name="Connecteur droit 40" draw:style-name="gr35" draw:text-style-name="P6" svg:x1="9.188cm" svg:y1="0.927cm" svg:x2="10.723cm" svg:y2="0.928cm"><text:p/></draw:line><draw:custom-shape draw:name="Zone de texte 33" draw:style-name="gr32" draw:text-style-name="P39" svg:width="2.142cm" svg:height="0.66cm" svg:x="4.53cm" svg:y="1.697cm"><text:p text:style-name="P3"><text:span text:style-name="T80">aeebab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8"><draw:custom-shape draw:name="Connecteur droit avec flèche 36" draw:style-name="gr36" draw:text-style-name="P39" svg:width="0.003cm" svg:height="1.216cm" svg:x="11.353cm" svg:y="2.937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Zone de texte 34" draw:style-name="gr32" draw:text-style-name="P39" svg:width="1.428cm" svg:height="0.66cm" svg:x="10.638cm" svg:y="4.184cm"><text:p text:style-name="P3"><text:span text:style-name="T82">HE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72" loext:marker-style-name="T20"/>
      <text:p text:style-name="Mon_5f_texte"/>
      <text:p text:style-name="Mon_5f_texte"/>
      <text:p text:style-name="Mon_5f_texte"/>
      <text:p text:style-name="P18"/>
      <text:p text:style-name="P18"/>
      <text:p text:style-name="P18"/>
      <text:p text:style-name="Mon_5f_texte">Mais on peut déplacer le pointeur <text:span text:style-name="T77">HEAD</text:span> pour remonter dans le temps par la commande :</text:p>
      <text:p text:style-name="Mon_5f_texte"><text:s/><text:tab/><text:span text:style-name="T26">git checkout </text:span></text:p>
      <text:p text:style-name="Mon_5f_texte"/>
      <text:p text:style-name="P18">Par exemple exécutez la commande : <text:span text:style-name="T26">git checkout c1c5a05 <text:s text:c="3"/></text:span>(pensez à adapter à votre cas)</text:p>
      <text:p text:style-name="P18">Puis exécutez la commande <text:span text:style-name="T26">git log --oneline</text:span></text:p>
      <text:p text:style-name="P18">Que constatez-vous ? </text:p>
      <text:p text:style-name="Standard" loext:marker-style-name="T39"><text:span text:style-name="T29">michael.gassant@RT-E208-PC14 </text:span><text:span text:style-name="T30">MINGW64 </text:span><text:span text:style-name="T28">/c/users/michael.gassant/Desktop/36th_americas_cup/styles</text:span><text:span text:style-name="T39"> ((4832b8f...))</text:span></text:p>
      <text:p text:style-name="Standard" loext:marker-style-name="T31"><text:span text:style-name="T31">$ git log --oneline</text:span><text:span text:style-name="T31"/></text:p>
      <text:p text:style-name="Standard" loext:marker-style-name="T37"><text:span text:style-name="T28">4832b8f (</text:span><text:span text:style-name="T49">HEAD</text:span><text:span text:style-name="T48">) </text:span><text:span text:style-name="T37">Create README.md</text:span></text:p>
      <text:p text:style-name="Standard" loext:marker-style-name="T37"><text:span text:style-name="T48">a3c9c99 </text:span><text:span text:style-name="T37">Première version du projet</text:span></text:p>
      <text:p text:style-name="Standard"/>
      <text:p text:style-name="P73"><text:span text:style-name="T83">On peut suivre l’historique dans le temps de cet identifiant</text:span></text:p>
      <text:p text:style-name="Mon_5f_texte"/>
      <text:p text:style-name="P18">Dans votre navigateur web, rafraichissez la page index.html</text:p>
      <text:p text:style-name="P18">Que constatez-vous et pourquoi ? </text:p>
      <text:p text:style-name="P74"><text:span text:style-name="T84">La restauration du fichier CSS par l’originale. Car on faisant ce manipulation, on a remonter dans le temps donc on a pu obtenir notre configuration d’avant toute modification fait précédemment.</text:span></text:p>
      <text:p text:style-name="Mon_5f_texte"/>
      <text:p text:style-name="Mon_5f_texte">Le répertoire de travail est constitué des fichiers suivis dans leur version correspondant au commit référencé par <text:span text:style-name="T77">HEAD</text:span></text:p>
      <text:p text:style-name="Mon_5f_texte"/>
      <text:p text:style-name="Mon_5f_texte">Par conséquent, <text:span text:style-name="T26">git checkout c1c5a05</text:span> va déplacer <text:span text:style-name="T77">HEAD</text:span> sur le commit <text:span text:style-name="T26">c1c5a05</text:span>, puis va faire en sorte que votre répertoire de travail soit constitué des fichiers dans leur version correspondant au nouveau <text:span text:style-name="T77">HEAD</text:span>.</text:p>
      <text:p text:style-name="Mon_5f_texte"/>
      <text:p text:style-name="Mon_5f_texte">Les fichiers sont donc modifiés, ajoutés, ou supprimés, pour que votre répertoire de travail soit dans l'état qui était le sien au moment du commit <text:span text:style-name="T26">c1c5a05</text:span></text:p>
      <text:p text:style-name="Mon_5f_texte"/>
      <text:p text:style-name="P19" loext:marker-style-name="T22"/>
      <text:p text:style-name="P67">Ce qui peut s’illustrer par le schéma suivant :</text:p>
      <text:p text:style-name="Mon_5f_texte"><draw:g text:anchor-type="char" draw:z-index="24" draw:name="Groupe 952" draw:style-name="gr7"><draw:custom-shape draw:name="Zone de texte 954" draw:style-name="gr32" draw:text-style-name="P39" svg:width="1.428cm" svg:height="0.66cm" svg:x="10.899cm" svg:y="2.222cm"><text:p text:style-name="P3"><text:span text:style-name="T81">ma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lipse 955" draw:style-name="gr33" draw:text-style-name="P6" svg:width="1.348cm" svg:height="1.243cm" svg:x="5.213cm" svg:y="0.32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lipse 956" draw:style-name="gr34" draw:text-style-name="P71" svg:width="1.348cm" svg:height="1.243cm" svg:x="8.095cm" svg:y="0.32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lipse 957" draw:style-name="gr33" draw:text-style-name="P6" svg:width="1.348cm" svg:height="1.243cm" svg:x="10.977cm" svg:y="0.32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Zone de texte 958" draw:style-name="gr32" draw:text-style-name="P39" svg:width="2.142cm" svg:height="0.66cm" svg:x="10.587cm" svg:y="1.723cm"><text:p text:style-name="P3"><text:span text:style-name="T80">540fcf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959" draw:style-name="gr32" draw:text-style-name="P39" svg:width="2.142cm" svg:height="0.66cm" svg:x="7.721cm" svg:y="1.723cm"><text:p text:style-name="P3"><text:span text:style-name="T80">c1c5a0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necteur droit 64" draw:style-name="gr35" draw:text-style-name="P6" svg:x1="6.567cm" svg:y1="0.952cm" svg:x2="8.101cm" svg:y2="0.953cm"><text:p/></draw:line><draw:line draw:name="Connecteur droit 65" draw:style-name="gr35" draw:text-style-name="P6" svg:x1="9.449cm" svg:y1="0.952cm" svg:x2="10.984cm" svg:y2="0.953cm"><text:p/></draw:line><draw:custom-shape draw:name="Zone de texte 66" draw:style-name="gr32" draw:text-style-name="P39" svg:width="2.142cm" svg:height="0.66cm" svg:x="4.791cm" svg:y="1.723cm"><text:p text:style-name="P3"><text:span text:style-name="T80">aeebab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8"><draw:custom-shape draw:name="Connecteur droit avec flèche 68" draw:style-name="gr36" draw:text-style-name="P39" svg:width="0.003cm" svg:height="1.216cm" svg:x="8.807cm" svg:y="2.448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Zone de texte 69" draw:style-name="gr32" draw:text-style-name="P39" svg:width="1.428cm" svg:height="0.66cm" svg:x="8.093cm" svg:y="3.695cm"><text:p text:style-name="P3"><text:span text:style-name="T82">HE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text:anchor-type="char" draw:z-index="39" draw:name="Groupe 933" draw:style-name="gr7"><draw:g draw:style-name="gr28"><draw:custom-shape draw:name="Ellipse 935" draw:style-name="gr29" draw:text-style-name="P68" svg:width="1.348cm" svg:height="1.244cm" svg:x="0.999cm" svg:y="1.773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Zone de texte 936" draw:style-name="gr30" draw:text-style-name="P39" svg:width="2.142cm" svg:height="1.292cm" svg:x="0.609cm" svg:y="3.177cm"><text:p text:style-name="P3"><text:span text:style-name="T80">commit acti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Zone de texte 939" draw:style-name="gr37" draw:text-style-name="P39" svg:width="3.7cm" svg:height="1.442cm" svg:x="-0.132cm" svg:y="0.053cm"><text:p text:style-name="P69" loext:marker-style-name="T20"><text:span text:style-name="T20">Repository local</text:span><text:span text:style-name="T20"/></text:p><text:p text:style-name="P70" loext:marker-style-name="T27"/><text:p text:style-name="P69">Branche : <text:span text:style-name="T76">main</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2" loext:marker-style-name="T20"/>
      <text:p text:style-name="Mon_5f_texte"/>
      <text:p text:style-name="Mon_5f_texte"/>
      <text:p text:style-name="Mon_5f_texte"/>
      <text:p text:style-name="Mon_5f_texte"/>
      <text:p text:style-name="Mon_5f_texte"/>
      <text:p text:style-name="P18"/>
      <text:p text:style-name="P18">Faites <text:span text:style-name="T26">ls -al</text:span> sur le dossier <text:span text:style-name="T20">36th_americas_cup</text:span>. </text:p>
      <text:p text:style-name="P18">Relevez les caractéristiques du fichier README.md</text:p>
      <text:p text:style-name="Standard" loext:marker-style-name="T39"><text:span text:style-name="T29">michael.gassant@RT-E208-PC14 </text:span><text:span text:style-name="T30">MINGW64 </text:span><text:span text:style-name="T28">/c/users/michael.gassant/Desktop/36th_americas_cup</text:span><text:span text:style-name="T39"> ((4832b8f...))</text:span></text:p>
      <text:p text:style-name="Standard" loext:marker-style-name="T31"><text:span text:style-name="T31">$ ls -al</text:span><text:span text:style-name="T31"/></text:p>
      <text:p text:style-name="Standard" loext:marker-style-name="T31"><text:span text:style-name="T31">total 21</text:span><text:span text:style-name="T31"/></text:p>
      <text:p text:style-name="Standard" loext:marker-style-name="T37"><text:span text:style-name="T31">drwxr-xr-x 1 michael.gassant 1049089 <text:s text:c="3"/>0 May 18 16:21 </text:span><text:span text:style-name="T38">.</text:span><text:span text:style-name="T37">/</text:span></text:p>
      <text:p text:style-name="Standard" loext:marker-style-name="T37"><text:span text:style-name="T37">drwxr-xr-x 1 michael.gassant 1049089 <text:s text:c="3"/>0 May 18 16:29 </text:span><text:span text:style-name="T38">..</text:span><text:span text:style-name="T37">/</text:span></text:p>
      <text:p text:style-name="Standard" loext:marker-style-name="T37"><text:span text:style-name="T37">drwxr-xr-x 1 michael.gassant 1049089 <text:s text:c="3"/>0 May 18 16:57 </text:span><text:span text:style-name="T38">.git</text:span><text:span text:style-name="T37">/</text:span></text:p>
      <text:p text:style-name="Standard" loext:marker-style-name="T37"><text:span text:style-name="T37">-rw-r--r-- 1 michael.gassant 1049089 <text:s text:c="2"/>13 May 18 16:21 README.md</text:span><text:span text:style-name="T37"/></text:p>
      <text:p text:style-name="Standard" loext:marker-style-name="T37"><text:span text:style-name="T37">drwxr-xr-x 1 michael.gassant 1049089 <text:s text:c="3"/>0 May 18 16:21 </text:span><text:span text:style-name="T38">challenger</text:span><text:span text:style-name="T37">/</text:span></text:p>
      <text:p text:style-name="Standard" loext:marker-style-name="T37"><text:span text:style-name="T37">drwxr-xr-x 1 michael.gassant 1049089 <text:s text:c="3"/>0 May 18 16:21 </text:span><text:span text:style-name="T38">images</text:span><text:span text:style-name="T37">/</text:span></text:p>
      <text:p text:style-name="Standard" loext:marker-style-name="T37"><text:span text:style-name="T37">-rw-r--r-- 1 michael.gassant 1049089 3456 May 18 16:21 index.html</text:span><text:span text:style-name="T37"/></text:p>
      <text:p text:style-name="Standard" loext:marker-style-name="T37"><text:span text:style-name="T37">drwxr-xr-x 1 michael.gassant 1049089 <text:s text:c="3"/>0 May 18 16:57 </text:span><text:span text:style-name="T38">styles</text:span><text:span text:style-name="T37">/</text:span></text:p>
      <text:p text:style-name="Standard"/>
      <text:p text:style-name="P75"><text:span text:style-name="T85">Le caracteristique du fichier, c’est les droits</text:span></text:p>
      <text:p text:style-name="P18"/>
      <text:p text:style-name="P18">Déplacez-vous d’un cran vers la gauche sur la branche <text:span text:style-name="T76">main</text:span> : <text:span text:style-name="T26">git checkout HEAD^</text:span></text:p>
      <text:p text:style-name="P18">Puis exécutez la commande <text:span text:style-name="T26">git log --oneline</text:span></text:p>
      <text:p text:style-name="P18">Que constatez-vous ? </text:p>
      <text:p text:style-name="Standard" loext:marker-style-name="T39"><text:span text:style-name="T29">michael.gassant@RT-E208-PC14 </text:span><text:span text:style-name="T30">MINGW64 </text:span><text:span text:style-name="T28">/c/users/michael.gassant/Desktop/36th_americas_cup</text:span><text:span text:style-name="T39"> ((4832b8f...))</text:span></text:p>
      <text:p text:style-name="Standard" loext:marker-style-name="T31"><text:span text:style-name="T31">$ git checkout HEAD^</text:span><text:span text:style-name="T31"/></text:p>
      <text:p text:style-name="Standard" loext:marker-style-name="T31"><text:span text:style-name="T31">Previous HEAD position was 4832b8f Create README.md</text:span><text:span text:style-name="T31"/></text:p>
      <text:p text:style-name="Standard" loext:marker-style-name="T31"><text:span text:style-name="T31">HEAD is now at a3c9c99 Première version du projet</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a3c9c99...))</text:span></text:p>
      <text:p text:style-name="Standard" loext:marker-style-name="T31"><text:span text:style-name="T31">$ git log --oneline</text:span><text:span text:style-name="T31"/></text:p>
      <text:p text:style-name="Standard" loext:marker-style-name="T37"><text:span text:style-name="T28">a3c9c99 (</text:span><text:span text:style-name="T49">HEAD</text:span><text:span text:style-name="T48">) </text:span><text:span text:style-name="T37">Première version du projet</text:span></text:p>
      <text:p text:style-name="Standard"/>
      <text:p text:style-name="P76">On peut constater que le HEAD <text:s/>est maintenant « a3c9c99 »</text:p>
      <text:p text:style-name="P18"/>
      <text:p text:style-name="P18">Refaites <text:span text:style-name="T26">ls -al</text:span> sur le dossier <text:span text:style-name="T20">36th_americas_cup</text:span>. </text:p>
      <text:p text:style-name="P18">Que constatez-vous et pourquoi ? </text:p>
      <text:p text:style-name="Standard" loext:marker-style-name="T39"><text:span text:style-name="T29">michael.gassant@RT-E208-PC14 </text:span><text:span text:style-name="T30">MINGW64 </text:span><text:span text:style-name="T28">/c/users/michael.gassant/Desktop/36th_americas_cup</text:span><text:span text:style-name="T39"> ((a3c9c99...))</text:span></text:p>
      <text:p text:style-name="Standard" loext:marker-style-name="T31"><text:span text:style-name="T31">$ ls -al</text:span><text:span text:style-name="T31"/></text:p>
      <text:p text:style-name="Standard" loext:marker-style-name="T31"><text:span text:style-name="T31">total 20</text:span><text:span text:style-name="T31"/></text:p>
      <text:p text:style-name="Standard" loext:marker-style-name="T37"><text:span text:style-name="T31">drwxr-xr-x 1 michael.gassant 1049089 <text:s text:c="3"/>0 May 18 17:02 </text:span><text:span text:style-name="T38">.</text:span><text:span text:style-name="T37">/</text:span></text:p>
      <text:p text:style-name="Standard" loext:marker-style-name="T37"><text:span text:style-name="T37">drwxr-xr-x 1 michael.gassant 1049089 <text:s text:c="3"/>0 May 18 16:29 </text:span><text:span text:style-name="T38">..</text:span><text:span text:style-name="T37">/</text:span></text:p>
      <text:p text:style-name="Standard" loext:marker-style-name="T37"><text:span text:style-name="T37">drwxr-xr-x 1 michael.gassant 1049089 <text:s text:c="3"/>0 May 18 17:02 </text:span><text:span text:style-name="T38">.git</text:span><text:span text:style-name="T37">/</text:span></text:p>
      <text:p text:style-name="Standard" loext:marker-style-name="T37"><text:span text:style-name="T37">drwxr-xr-x 1 michael.gassant 1049089 <text:s text:c="3"/>0 May 18 16:21 </text:span><text:span text:style-name="T38">challenger</text:span><text:span text:style-name="T37">/</text:span></text:p>
      <text:p text:style-name="Standard" loext:marker-style-name="T37"><text:span text:style-name="T37">drwxr-xr-x 1 michael.gassant 1049089 <text:s text:c="3"/>0 May 18 16:21 </text:span><text:span text:style-name="T38">images</text:span><text:span text:style-name="T37">/</text:span></text:p>
      <text:p text:style-name="Standard" loext:marker-style-name="T37"><text:span text:style-name="T37">-rw-r--r-- 1 michael.gassant 1049089 3456 May 18 16:21 index.html</text:span><text:span text:style-name="T37"/></text:p>
      <text:p text:style-name="Standard" loext:marker-style-name="T37"><text:span text:style-name="T37">drwxr-xr-x 1 michael.gassant 1049089 <text:s text:c="3"/>0 May 18 16:57 </text:span><text:span text:style-name="T38">styles</text:span><text:span text:style-name="T37">/</text:span></text:p>
      <text:p text:style-name="Standard"/>
      <text:p text:style-name="P77"><text:soft-page-break/><text:span text:style-name="T86">On peut constater que README.md n’est plus présent mais un fichier d’extension .git</text:span></text:p>
      <text:p text:style-name="Mon_5f_texte"/>
      <text:p text:style-name="Mon_5f_texte"><draw:g text:anchor-type="char" draw:z-index="38" draw:name="Groupe 913" draw:style-name="gr7"><draw:g draw:style-name="gr28"><draw:custom-shape draw:name="Ellipse 918" draw:style-name="gr29" draw:text-style-name="P68" svg:width="1.348cm" svg:height="1.244cm" svg:x="0.999cm" svg:y="2.4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Zone de texte 923" draw:style-name="gr30" draw:text-style-name="P39" svg:width="2.142cm" svg:height="1.292cm" svg:x="0.609cm" svg:y="3.874cm"><text:p text:style-name="P3"><text:span text:style-name="T80">commit acti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Zone de texte 932" draw:style-name="gr31" draw:text-style-name="P39" svg:width="3.698cm" svg:height="1.442cm" svg:x="-0.132cm" svg:y="0.75cm"><text:p text:style-name="P69" loext:marker-style-name="T20"><text:span text:style-name="T20">Repository local</text:span><text:span text:style-name="T20"/></text:p><text:p text:style-name="P70" loext:marker-style-name="T27"/><text:p text:style-name="P69">Branche : <text:span text:style-name="T76">main</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Mettez à jour le schéma suivant (en plaçant le pointeur <text:span text:style-name="T77">HEAD</text:span> et le commit actif) :</text:p>
      <text:p text:style-name="Mon_5f_texte"><draw:custom-shape text:anchor-type="char" draw:z-index="17" draw:name="Ellipse 904" draw:style-name="gr38" draw:text-style-name="P1" svg:width="1.35cm" svg:height="1.243cm" svg:x="10.971cm" svg:y="0.41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text:anchor-type="char" draw:z-index="18" draw:name="Groupe 912" draw:style-name="gr39"><draw:custom-shape draw:name="Ellipse 902" draw:style-name="gr33" draw:text-style-name="P6" svg:width="1.348cm" svg:height="1.243cm" svg:x="5.201cm" svg:y="0.415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lipse 903" draw:style-name="gr33" draw:text-style-name="P6" svg:width="1.348cm" svg:height="1.243cm" svg:x="8.085cm" svg:y="0.415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Zone de texte 905" draw:style-name="gr32" draw:text-style-name="P39" svg:width="2.142cm" svg:height="0.66cm" svg:x="10.572cm" svg:y="1.817cm"><text:p text:style-name="P3"><text:span text:style-name="T80">540fcf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906" draw:style-name="gr32" draw:text-style-name="P39" svg:width="2.142cm" svg:height="0.66cm" svg:x="7.715cm" svg:y="1.817cm"><text:p text:style-name="P3"><text:span text:style-name="T80">c1c5a0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907" draw:style-name="gr32" draw:text-style-name="P39" svg:width="2.142cm" svg:height="0.66cm" svg:x="4.778cm" svg:y="1.817cm"><text:p text:style-name="P3"><text:span text:style-name="T80">aeebab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necteur droit 910" draw:style-name="gr35" draw:text-style-name="P6" svg:x1="6.55cm" svg:y1="1.05cm" svg:x2="8.085cm" svg:y2="1.051cm"><text:p/></draw:line><draw:line draw:name="Connecteur droit 911" draw:style-name="gr35" draw:text-style-name="P6" svg:x1="9.434cm" svg:y1="1.05cm" svg:x2="10.969cm" svg:y2="1.051cm"><text:p/></draw:line><draw:custom-shape draw:name="Zone de texte 908" draw:style-name="gr32" draw:text-style-name="P39" svg:width="1.428cm" svg:height="0.66cm" svg:x="10.89cm" svg:y="2.241cm"><text:p text:style-name="P3"><text:span text:style-name="T81">ma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2" loext:marker-style-name="T20"><draw:g text:anchor-type="char" draw:z-index="19" draw:name="Groupe 78" draw:style-name="gr40"><draw:custom-shape draw:name="Connecteur droit avec flèche 914" draw:style-name="gr41" draw:text-style-name="P6" svg:width="0.003cm" svg:height="1.216cm" svg:x="14.614cm" svg:y="0.36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Zone de texte 915" draw:style-name="gr42" draw:text-style-name="P39" svg:width="1.43cm" svg:height="0.66cm" svg:x="13.891cm" svg:y="1.604cm"><text:p text:style-name="P3"><text:span text:style-name="T82">HE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2" loext:marker-style-name="T20"/>
      <text:p text:style-name="Mon_5f_texte"/>
      <text:p text:style-name="Mon_5f_texte"/>
      <text:p text:style-name="Mon_5f_texte"/>
      <text:p text:style-name="P18"/>
      <text:p text:style-name="P18"/>
      <text:p text:style-name="P18">Pour revenir en tête de l’historique <text:span text:style-name="T78">main</text:span>, exécutez : <text:span text:style-name="T26">git checkout main</text:span></text:p>
      <text:p text:style-name="P18">Puis exécutez la commande <text:span text:style-name="T26">git log --oneline</text:span></text:p>
      <text:p text:style-name="P18">Que constatez-vous ? </text:p>
      <text:p text:style-name="Standard" loext:marker-style-name="T39"><text:span text:style-name="T29">michael.gassant@RT-E208-PC14 </text:span><text:span text:style-name="T30">MINGW64 </text:span><text:span text:style-name="T28">/c/users/michael.gassant/Desktop/36th_americas_cup</text:span><text:span text:style-name="T39"> ((a3c9c99...))</text:span></text:p>
      <text:p text:style-name="Standard" loext:marker-style-name="T31"><text:span text:style-name="T31">$ git checkout main</text:span><text:span text:style-name="T31"/></text:p>
      <text:p text:style-name="Standard" loext:marker-style-name="T31"><text:span text:style-name="T31">Previous HEAD position was a3c9c99 Première version du projet</text:span><text:span text:style-name="T31"/></text:p>
      <text:p text:style-name="Standard" loext:marker-style-name="T31"><text:span text:style-name="T31">Switched to branch 'main'</text:span><text:span text:style-name="T31"/></text:p>
      <text:p text:style-name="Standard" loext:marker-style-name="T31"><text:span text:style-name="T31">Your branch is up to date with 'origin/main'.</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log --oneline</text:span><text:span text:style-name="T31"/></text:p>
      <text:p text:style-name="Standard" loext:marker-style-name="T37"><text:span text:style-name="T28">9473c40 (</text:span><text:span text:style-name="T49">HEAD</text:span><text:span text:style-name="T48"> -&gt; </text:span><text:span text:style-name="T50">main</text:span><text:span text:style-name="T48">, </text:span><text:span text:style-name="T55">origin/main</text:span><text:span text:style-name="T48">, </text:span><text:span text:style-name="T55">origin/HEAD</text:span><text:span text:style-name="T48">) </text:span><text:span text:style-name="T37">Deuxièeme version du projet</text:span></text:p>
      <text:p text:style-name="Standard" loext:marker-style-name="T37"><text:span text:style-name="T48">4832b8f </text:span><text:span text:style-name="T37">Create README.md</text:span></text:p>
      <text:p text:style-name="Standard" loext:marker-style-name="T37"><text:span text:style-name="T48">a3c9c99 </text:span><text:span text:style-name="T37">Première version du projet</text:span></text:p>
      <text:p text:style-name="Standard"/>
      <text:p text:style-name="P78"><text:span text:style-name="T87">On peut constater qu’on a echange d’actif, dont le retour du fichier README.md</text:span></text:p>
      <text:p text:style-name="Mon_5f_texte"/>
      <text:p text:style-name="P18">Dans votre navigateur web, rafraichissez la page index.html</text:p>
      <text:p text:style-name="P18">Refaites <text:span text:style-name="T26">ls -al</text:span> sur le dossier <text:span text:style-name="T20">36th_americas_cup</text:span>. </text:p>
      <text:p text:style-name="P18">Que constatez-vous et pourquoi ? </text:p>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ls -al</text:span><text:span text:style-name="T31"/></text:p>
      <text:p text:style-name="Standard" loext:marker-style-name="T31"><text:span text:style-name="T31">total 21</text:span><text:span text:style-name="T31"/></text:p>
      <text:p text:style-name="Standard" loext:marker-style-name="T37"><text:span text:style-name="T31">drwxr-xr-x 1 michael.gassant 1049089 <text:s text:c="3"/>0 May 18 17:05 </text:span><text:span text:style-name="T38">.</text:span><text:span text:style-name="T37">/</text:span></text:p>
      <text:p text:style-name="Standard" loext:marker-style-name="T37"><text:span text:style-name="T37">drwxr-xr-x 1 michael.gassant 1049089 <text:s text:c="3"/>0 May 18 16:29 </text:span><text:span text:style-name="T38">..</text:span><text:span text:style-name="T37">/</text:span></text:p>
      <text:p text:style-name="Standard" loext:marker-style-name="T37"><text:span text:style-name="T37">drwxr-xr-x 1 michael.gassant 1049089 <text:s text:c="3"/>0 May 18 17:05 </text:span><text:span text:style-name="T38">.git</text:span><text:span text:style-name="T37">/</text:span></text:p>
      <text:p text:style-name="Standard" loext:marker-style-name="T37"><text:span text:style-name="T37">-rw-r--r-- 1 michael.gassant 1049089 <text:s text:c="2"/>13 May 18 17:05 README.md</text:span><text:span text:style-name="T37"/></text:p>
      <text:p text:style-name="Standard" loext:marker-style-name="T37"><text:span text:style-name="T37">drwxr-xr-x 1 michael.gassant 1049089 <text:s text:c="3"/>0 May 18 16:21 </text:span><text:span text:style-name="T38">challenger</text:span><text:span text:style-name="T37">/</text:span></text:p>
      <text:p text:style-name="Standard" loext:marker-style-name="T37"><text:span text:style-name="T37">drwxr-xr-x 1 michael.gassant 1049089 <text:s text:c="3"/>0 May 18 16:21 </text:span><text:span text:style-name="T38">images</text:span><text:span text:style-name="T37">/</text:span></text:p>
      <text:p text:style-name="Standard" loext:marker-style-name="T37"><text:span text:style-name="T37">-rw-r--r-- 1 michael.gassant 1049089 3456 May 18 16:21 index.html</text:span><text:span text:style-name="T37"/></text:p>
      <text:p text:style-name="Standard" loext:marker-style-name="T37"><text:span text:style-name="T37">drwxr-xr-x 1 michael.gassant 1049089 <text:s text:c="3"/>0 May 18 17:05 </text:span><text:span text:style-name="T38">styles</text:span><text:span text:style-name="T37">/</text:span></text:p>
      <text:p text:style-name="Standard"/>
      <text:p text:style-name="P79"><text:span text:style-name="T88">On peut constater que le fichier README est de retour</text:span></text:p>
      <text:p text:style-name="Mon_5f_texte"/>
      <text:p text:style-name="Mon_5f_texte">Vous avez pu ainsi naviguer dans l’historique du projet. Et vous vous êtes aperçu que la première couleur utilisée pour les titres h1 était le meilleur choix !</text:p>
      <text:p text:style-name="Mon_5f_texte"><text:soft-page-break/>Mais comment faire alors pour uniquement reprendre la version antérieure de la feuille de style qui se trouve dans l’avant dernier commit ?</text:p>
      <text:p text:style-name="P18">En étant dans le dossier <text:span text:style-name="T20">styles</text:span>, exécutez la commande :</text:p>
      <text:p text:style-name="P18"><text:s text:c="6"/><text:span text:style-name="T26">git checkout HEAD^ 36_americas_cup.css</text:span></text:p>
      <text:p text:style-name="P18">Que constatez-vous en rafraichissant la page index.html dans le navigateur ? </text:p>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cd styles</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styles</text:span><text:span text:style-name="T39"> (main)</text:span></text:p>
      <text:p text:style-name="Standard" loext:marker-style-name="T31"><text:span text:style-name="T31">$ git checkout HEAD^ 36_americas_cup.css</text:span><text:span text:style-name="T31"/></text:p>
      <text:p text:style-name="Standard" loext:marker-style-name="T31"><text:span text:style-name="T31">Updated 1 path from 7cf24ec</text:span><text:span text:style-name="T31"/></text:p>
      <text:p text:style-name="Standard"/>
      <text:p text:style-name="P80"><text:span text:style-name="T89">On a pu retrouve notre modification effectuer avant la restauration de notre fichier CSS</text:span></text:p>
      <text:p text:style-name="Mon_5f_texte"/>
      <text:p text:style-name="Mon_5f_texte">Voilà cette version vous semble parfaite ! </text:p>
      <text:p text:style-name="Mon_5f_texte" loext:marker-style-name="T26">Et il ne faut pas oublier de l’enregistrer dans l’historique local. Par contre, ce n’est pas utile de faire un <text:span text:style-name="T26">git add</text:span> car l’index est déjà mis à jour, comme le montre le résultat de la commande <text:span text:style-name="T26">git status</text:span></text:p>
      <text:p text:style-name="Mon_5f_texte"/>
      <text:p text:style-name="P18">Exécutez la commande <text:span text:style-name="T26">git commit -m "Retour à la feuille de style d’origine" <text:s text:c="4"/></text:span></text:p>
      <text:p text:style-name="P18">Puis <text:span text:style-name="T26">git status</text:span> et <text:span text:style-name="T26">git log --oneline</text:span></text:p>
      <text:p text:style-name="P18">Est-ce que tout vous parait correct ? <text:s/></text:p>
      <text:p text:style-name="P18">Quel est le nouvel identifiant de la dernière version ?</text:p>
      <text:p text:style-name="P18">Où se trouvent les pointeurs <text:span text:style-name="T77">HEAD</text:span> et <text:span text:style-name="T78">main</text:span> ?</text:p>
      <text:p text:style-name="Standard" loext:marker-style-name="T39"><text:span text:style-name="T29">michael.gassant@RT-E208-PC14 </text:span><text:span text:style-name="T30">MINGW64 </text:span><text:span text:style-name="T28">/c/users/michael.gassant/Desktop/36th_americas_cup/styles</text:span><text:span text:style-name="T39"> (main)</text:span></text:p>
      <text:p text:style-name="Standard" loext:marker-style-name="T31"><text:span text:style-name="T31">$ cd ../</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commit -m "Retour à la feuille de style d'origine"</text:span><text:span text:style-name="T31"/></text:p>
      <text:p text:style-name="Standard" loext:marker-style-name="T31"><text:span text:style-name="T31">[main d8b4385] Retour à la feuille de style d'origine</text:span><text:span text:style-name="T31"/></text:p>
      <text:p text:style-name="P36" loext:marker-style-name="T31"><text:s/>1 file changed, 1 insertion(+), 1 deletion(-)</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status</text:span><text:span text:style-name="T31"/></text:p>
      <text:p text:style-name="Standard" loext:marker-style-name="T31"><text:span text:style-name="T31">On branch main</text:span><text:span text:style-name="T31"/></text:p>
      <text:p text:style-name="Standard" loext:marker-style-name="T31"><text:span text:style-name="T31">Your branch is ahead of 'origin/main' by 1 commit.</text:span><text:span text:style-name="T31"/></text:p>
      <text:p text:style-name="Standard" loext:marker-style-name="T31"><text:span text:style-name="T31"><text:s text:c="2"/>(use "git push" to publish your local commits)</text:span><text:span text:style-name="T31"/></text:p>
      <text:p text:style-name="P36" loext:marker-style-name="T31"/>
      <text:p text:style-name="Standard" loext:marker-style-name="T31"><text:span text:style-name="T31">nothing to commit, working tree clean</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log --oneline</text:span><text:span text:style-name="T31"/></text:p>
      <text:p text:style-name="Standard" loext:marker-style-name="T37"><text:span text:style-name="T28">d8b4385 (</text:span><text:span text:style-name="T49">HEAD</text:span><text:span text:style-name="T48"> -&gt; </text:span><text:span text:style-name="T50">main</text:span><text:span text:style-name="T48">) </text:span><text:span text:style-name="T37">Retour à la feuille de style d'origine</text:span></text:p>
      <text:p text:style-name="Standard" loext:marker-style-name="T37"><text:span text:style-name="T48">9473c40 (</text:span><text:span text:style-name="T55">origin/main</text:span><text:span text:style-name="T48">, </text:span><text:span text:style-name="T55">origin/HEAD</text:span><text:span text:style-name="T48">) </text:span><text:span text:style-name="T37">Deuxièeme version du projet</text:span></text:p>
      <text:p text:style-name="Standard" loext:marker-style-name="T37"><text:span text:style-name="T48">4832b8f </text:span><text:span text:style-name="T37">Create README.md</text:span></text:p>
      <text:p text:style-name="Standard" loext:marker-style-name="T37"><text:span text:style-name="T48">a3c9c99 </text:span><text:span text:style-name="T37">Première version du projet</text:span></text:p>
      <text:p text:style-name="Standard"/>
      <text:p text:style-name="P81">HEAD et main se trouve dans 9473c40</text:p>
      <text:p text:style-name="P82"><text:span text:style-name="T90">l’identifiant : d8b4385</text:span></text:p>
      <text:p text:style-name="Mon_5f_texte"/>
      <text:p text:style-name="Mon_5f_texte"/>
      <text:p text:style-name="Mon_5f_texte"><text:soft-page-break/></text:p>
      <text:p text:style-name="P18">Mais à votre avis, pourquoi le pointeur <text:span text:style-name="T79">origin/main</text:span> est resté au même endroit ? </text:p>
      <text:p text:style-name="P83">Car main est le reporitory principale</text:p>
      <text:p text:style-name="Mon_5f_texte"/>
      <text:p text:style-name="Mon_5f_texte">Poussez le dépôt local vers votre dépôt distant GitHub et vérifiez d’une part que localement tout est correct avec <text:span text:style-name="T26">git log --oneline</text:span> et d’autre part sur votre dépôt distant GitHub que cette version est correctement enregistrée. Enfin, mettez en évidence la modification réalisée sur la feuille de style.</text:p>
      <text:p text:style-name="P18">Est-ce que tout est correct ? Sinon quels sont les problèmes ?</text:p>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push -u origin main</text:span><text:span text:style-name="T31"/></text:p>
      <text:p text:style-name="Standard" loext:marker-style-name="T31"><text:span text:style-name="T31">Enumerating objects: 7, done.</text:span><text:span text:style-name="T31"/></text:p>
      <text:p text:style-name="Standard" loext:marker-style-name="T31"><text:span text:style-name="T31">Counting objects: 100% (7/7), done.</text:span><text:span text:style-name="T31"/></text:p>
      <text:p text:style-name="Standard" loext:marker-style-name="T31"><text:span text:style-name="T31">Delta compression using up to 20 threads</text:span><text:span text:style-name="T31"/></text:p>
      <text:p text:style-name="Standard" loext:marker-style-name="T31"><text:span text:style-name="T31">Compressing objects: 100% (3/3), done.</text:span><text:span text:style-name="T31"/></text:p>
      <text:p text:style-name="Standard" loext:marker-style-name="T31"><text:span text:style-name="T31">Writing objects: 100% (4/4), 378 bytes | 189.00 KiB/s, done.</text:span><text:span text:style-name="T31"/></text:p>
      <text:p text:style-name="Standard" loext:marker-style-name="T31"><text:span text:style-name="T31">Total 4 (delta 2), reused 1 (delta 0), pack-reused 0 (from 0)</text:span><text:span text:style-name="T31"/></text:p>
      <text:p text:style-name="Standard" loext:marker-style-name="T31"><text:span text:style-name="T31">remote: Resolving deltas: 100% (2/2), completed with 2 local objects.</text:span><text:span text:style-name="T31"/></text:p>
      <text:p text:style-name="Standard" loext:marker-style-name="T31"><text:span text:style-name="T31">To https://github.com/LORVINS/ACwebProjet.git</text:span><text:span text:style-name="T31"/></text:p>
      <text:p text:style-name="Standard" loext:marker-style-name="T31"><text:span text:style-name="T31"><text:s text:c="3"/>9473c40..d8b4385 <text:s/>main -&gt; main</text:span><text:span text:style-name="T31"/></text:p>
      <text:p text:style-name="Standard" loext:marker-style-name="T31"><text:span text:style-name="T31">branch 'main' set up to track 'origin/main'.</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log --oneline</text:span><text:span text:style-name="T31"/></text:p>
      <text:p text:style-name="Standard" loext:marker-style-name="T37"><text:span text:style-name="T28">d8b4385 (</text:span><text:span text:style-name="T49">HEAD</text:span><text:span text:style-name="T48"> -&gt; </text:span><text:span text:style-name="T50">main</text:span><text:span text:style-name="T48">, </text:span><text:span text:style-name="T55">origin/main</text:span><text:span text:style-name="T48">, </text:span><text:span text:style-name="T55">origin/HEAD</text:span><text:span text:style-name="T48">) </text:span><text:span text:style-name="T37">Retour à la feuille de style d'origine</text:span></text:p>
      <text:p text:style-name="Standard" loext:marker-style-name="T37"><text:span text:style-name="T48">9473c40 </text:span><text:span text:style-name="T37">Deuxièeme version du projet</text:span></text:p>
      <text:p text:style-name="Standard" loext:marker-style-name="T37"><text:span text:style-name="T48">4832b8f </text:span><text:span text:style-name="T37">Create README.md</text:span></text:p>
      <text:p text:style-name="Standard" loext:marker-style-name="T37"><text:span text:style-name="T48">a3c9c99 </text:span><text:span text:style-name="T37">Première version du projet</text:span></text:p>
      <text:p text:style-name="Standard"/>
      <text:p text:style-name="P84"><text:span text:style-name="T91">problème avec l’identifiant d8b4385</text:span></text:p>
      <text:p text:style-name="Mon_5f_texte"/>
      <text:p text:style-name="Mon_5f_texte">A partir du tableau de bord du dépôt distant sur GitHub, vous devez avoir un état du projet qui fait apparaitre ainsi les fichiers/dossiers :</text:p>
      <text:p text:style-name="Mon_5f_texte"><draw:frame draw:style-name="fr1" draw:name="Image 917" text:anchor-type="char" svg:x="0.307cm" svg:y="0.196cm" svg:width="15.478cm" svg:height="5.265cm" draw:z-index="44"><draw:image xlink:href="Pictures/1000000000000249000000C77F543DAE.png" xlink:type="simple" xlink:show="embed" xlink:actuate="onLoad" draw:mime-type="image/png"/></draw:frame></text:p>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text:soft-page-break/></text:p>
      <text:p text:style-name="Mon_5f_texte">Vous allez maintenant cliquer sur le fichier <text:span text:style-name="T20">index.html</text:span> et modifier le titre :</text:p>
      <text:p text:style-name="Mon_5f_texte" loext:marker-style-name="T92"><text:s/><text:tab/><text:tab/><text:span text:style-name="T92">&lt;h1&gt;L’America’s Cup 2021 en Nouvelle-Zélande&lt;/h1&gt;</text:span><text:span text:style-name="T92"/></text:p>
      <text:p text:style-name="Mon_5f_texte"><text:s/>Enregistrer la modification.</text:p>
      <text:p text:style-name="Mon_5f_texte"><text:s/>En revenant sur le tableau de bord, vous devez voir qu’un nouveau message à automatiquement remplacé l’ancien et que le nombre de commit est passer à 5 :</text:p>
      <text:p text:style-name="Mon_5f_texte"><draw:g text:anchor-type="char" draw:z-index="21" draw:name="Groupe 922" draw:style-name="gr43"><draw:frame draw:name="Image 919" draw:style-name="gr2" draw:text-style-name="P1" svg:width="16.003cm" svg:height="5.328cm" svg:x="-0.037cm" svg:y="0.157cm"><draw:image xlink:href="Pictures/10000000000002EC000000F999B1DB5C.png" xlink:type="simple" xlink:show="embed" xlink:actuate="onLoad" draw:mime-type="image/png"><text:p/></draw:image></draw:frame><draw:custom-shape draw:name="Rectangle : coins arrondis 920" draw:style-name="gr44" draw:text-style-name="P6" svg:width="3.07cm" svg:height="0.66cm" svg:x="5.043cm" svg:y="4.63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custom-shape draw:name="Rectangle : coins arrondis 921" draw:style-name="gr45" draw:text-style-name="P6" svg:width="2.169cm" svg:height="0.66cm" svg:x="13.485cm" svg:y="0.501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g></text:p>
      <text:p text:style-name="Mon_5f_texte"/>
      <text:p text:style-name="Mon_5f_texte"/>
      <text:p text:style-name="Mon_5f_texte"/>
      <text:p text:style-name="Mon_5f_texte"/>
      <text:p text:style-name="Mon_5f_texte"/>
      <text:p text:style-name="Mon_5f_texte"/>
      <text:p text:style-name="Mon_5f_texte"/>
      <text:p text:style-name="P18"/>
      <text:p text:style-name="Mon_5f_texte">Mais alors votre dépôt local n’est plus à jour ! <text:s/></text:p>
      <text:p text:style-name="Mon_5f_texte">Vous pouvez facilement le vérifier par la commande <text:span text:style-name="T26">git log --oneline</text:span> mais aussi par la page web index.html dont le titre n’a pas changé !</text:p>
      <text:p text:style-name="Mon_5f_texte"/>
      <text:p text:style-name="Mon_5f_texte">Il vous faut mettre à jour votre dépôt local par la commande <text:span text:style-name="T26">git pull</text:span></text:p>
      <text:p text:style-name="Mon_5f_texte">Vous pouvez ensuite vérifier par la commande <text:span text:style-name="T26">git log --oneline</text:span> qu’il y a bien 5 commits mais aussi que le titre de la page web index.html a bien été modifié !</text:p>
      <text:p text:style-name="Mon_5f_texte"><draw:g text:anchor-type="char" draw:z-index="22" draw:name="Groupe 944" draw:style-name="gr13"><draw:g draw:style-name="gr46"><draw:frame draw:name="Image 924" draw:style-name="gr2" draw:text-style-name="P1" svg:width="14.339cm" svg:height="11.029cm" svg:x="-0.014cm" svg:y="0.513cm"><draw:image xlink:href="Pictures/10000000000003140000025E47901519.png" xlink:type="simple" xlink:show="embed" xlink:actuate="onLoad" draw:mime-type="image/png"><text:p/></draw:image></draw:frame><draw:frame draw:name="Image 938" draw:style-name="gr2" draw:text-style-name="P1" svg:width="1.137cm" svg:height="7.09cm" svg:x="8.696cm" svg:y="0.363cm"><draw:image xlink:href="Pictures/100000000000002B0000010CAEC05A31.png" xlink:type="simple" xlink:show="embed" xlink:actuate="onLoad" draw:mime-type="image/png"><text:p/></draw:image></draw:frame></draw:g><draw:g draw:style-name="gr28"><draw:g draw:style-name="gr28"><draw:custom-shape draw:name="Zone de texte 937" draw:style-name="gr27" draw:text-style-name="P39" svg:width="1.925cm" svg:height="0.814cm" svg:x="7.904cm" svg:y="2.459cm"><text:p text:style-name="Standard" loext:marker-style-name="T40"><text:span text:style-name="T40">rest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926" draw:style-name="gr14" draw:text-style-name="P39" svg:width="1.317cm" svg:height="0.812cm" svg:x="1.602cm" svg:y="2.459cm"><text:p text:style-name="Standard" loext:marker-style-name="T40"><text:span text:style-name="T40">ad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927" draw:style-name="gr15" draw:text-style-name="P39" svg:width="1.747cm" svg:height="0.812cm" svg:x="10.924cm" svg:y="2.541cm"><text:p text:style-name="Standard" loext:marker-style-name="T51"><text:span text:style-name="T51">stat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ccolade fermante 930" draw:style-name="gr12" draw:text-style-name="P39" svg:width="0.608cm" svg:height="1.23cm" svg:x="10.148cm" svg:y="2.326cm"><text:p/><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position-x="?f17" draw:handle-position-y="?f7" draw:handle-range-y-maximum="?f5" draw:handle-range-y-minimum="0"/><draw:handle draw:handle-position="?f18 ?f8" draw:handle-position-x="?f18" draw:handle-position-y="?f8" draw:handle-range-y-maximum="100000" draw:handle-range-y-minimum="0"/></draw:enhanced-geometry></draw:custom-shape><draw:custom-shape draw:name="Zone de texte 928" draw:style-name="gr47" draw:text-style-name="P39" svg:width="1.108cm" svg:height="0.812cm" svg:x="1.222cm" svg:y="5.295cm"><text:p text:style-name="Standard" loext:marker-style-name="T51"><text:span text:style-name="T51">lo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929" draw:style-name="gr17" draw:text-style-name="P39" svg:width="1.987cm" svg:height="0.812cm" svg:x="7.756cm" svg:y="4.404cm"><text:p text:style-name="Standard" loext:marker-style-name="T40"><text:span text:style-name="T40">comm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8"><draw:custom-shape draw:name="Zone de texte 931" draw:style-name="gr18" draw:text-style-name="P39" svg:width="1.553cm" svg:height="0.812cm" svg:x="2.163cm" svg:y="7.092cm"><text:p text:style-name="Standard" loext:marker-style-name="T52"><text:span text:style-name="T52">pus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43" draw:style-name="gr48" draw:text-style-name="P39" svg:width="1.555cm" svg:height="0.812cm" svg:x="7.029cm" svg:y="7.092cm"><text:p text:style-name="Standard" loext:marker-style-name="T52"><text:span text:style-name="T52">pu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On peut ainsi compléter le schéma :</text:p>
      <text:p text:style-name="Mon_5f_texte"/>
      <text:p text:style-name="P18"/>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Mon_5f_texte"/>
      <text:p text:style-name="P18"><text:soft-page-break/></text:p>
      <text:p text:style-name="P19" loext:marker-style-name="T22"/>
      <text:p text:style-name="P47"/>
      <text:h text:style-name="P21" text:outline-level="2"><text:bookmark-start text:name="_Toc166434105"/>Exploitation des branches de l’historique<text:bookmark-end text:name="_Toc166434105"/></text:h>
      <text:p text:style-name="Standard"/>
      <text:p text:style-name="Mon_5f_texte">Le principal atout de Git est son système de branches :</text:p>
      <text:list text:continue-numbering="true" text:style-name="WWNum4">
        <text:list-item>
          <text:p text:style-name="P17">la branche principale (<text:span text:style-name="T20">main</text:span> ou <text:span text:style-name="T93">master</text:span> avant 2020) constituera la base stable du projet. </text:p>
        </text:list-item>
        <text:list-item>
          <text:p text:style-name="P17">l’objectif n’est donc pas de réaliser les modifications majeures directement sur cette branche, mais de les réaliser sur d’autres branches.</text:p>
        </text:list-item>
        <text:list-item>
          <text:p text:style-name="P17">et après divers tests, de les intégrer sur la branche principale.</text:p>
        </text:list-item>
      </text:list>
      <text:p text:style-name="P85"><draw:frame draw:style-name="fr1" draw:name="Image 948" text:anchor-type="char" svg:x="1.889cm" svg:y="0.527cm" svg:width="12.435cm" svg:height="4.352cm" draw:z-index="54"><draw:image xlink:href="Pictures/100000000000038A0000013D1E9D4908.png" xlink:type="simple" xlink:show="embed" xlink:actuate="onLoad" draw:mime-type="image/png"/></draw:frame></text:p>
      <text:p text:style-name="Standard"/>
      <text:p text:style-name="P18"/>
      <text:p text:style-name="Mon_5f_texte"/>
      <text:p text:style-name="Mon_5f_texte"/>
      <text:p text:style-name="Mon_5f_texte"/>
      <text:p text:style-name="Mon_5f_texte"/>
      <text:p text:style-name="P18"/>
      <text:p text:style-name="P18"/>
      <text:p text:style-name="Mon_5f_texte">Pour connaître les branches présentes du projet, il faut taper la ligne de commande :</text:p>
      <text:p text:style-name="P40" loext:marker-style-name="T26"><text:span text:style-name="T26">git branch</text:span><text:span text:style-name="T26"/></text:p>
      <text:p text:style-name="Mon_5f_texte"/>
      <text:p text:style-name="Mon_5f_texte">Dans un premier temps, vous n’aurez que : <text:s text:c="3"/><text:span text:style-name="T26">* </text:span><text:span text:style-name="T73">main</text:span></text:p>
      <text:p text:style-name="Mon_5f_texte">Et c’est normal. L’astérisque signifie que c’est la branche sur laquelle vous vous situez, et que c’est sur celle-ci qu'actuellement les modifications sont réalisées.</text:p>
      <text:p text:style-name="Mon_5f_texte"/>
      <text:p text:style-name="Mon_5f_texte">Par contre, une modification majeure du site est prévue par la création de la page web présentant plus en détail le challenger <text:span text:style-name="T20">American Magic</text:span>. Il faut donc créer une branche que l’on appellera <text:span text:style-name="T20">magic</text:span> !</text:p>
      <text:p text:style-name="Mon_5f_texte" loext:marker-style-name="T26">Exécutez la commande : <text:span text:style-name="T26">git branch magic</text:span><text:span text:style-name="T26"/></text:p>
      <text:p text:style-name="Mon_5f_texte"/>
      <text:p text:style-name="Mon_5f_texte" loext:marker-style-name="T26">Vérifiez que cette branche existe bien par la commande : <text:span text:style-name="T26">git branch</text:span><text:span text:style-name="T26"/></text:p>
      <text:p text:style-name="P18">Résultat ? </text:p>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branch</text:span><text:span text:style-name="T31"/></text:p>
      <text:p text:style-name="Standard" loext:marker-style-name="T29"><text:span text:style-name="T31">* </text:span><text:span text:style-name="T29">main</text:span></text:p>
      <text:p text:style-name="P86" loext:marker-style-name="T29"/>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branch magic</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branch</text:span><text:span text:style-name="T31"/></text:p>
      <text:p text:style-name="Standard" loext:marker-style-name="T31"><text:span text:style-name="T31"><text:s text:c="2"/>magic</text:span><text:span text:style-name="T31"/></text:p>
      <text:p text:style-name="Standard" loext:marker-style-name="T29"><text:span text:style-name="T31">* </text:span><text:span text:style-name="T29">main</text:span></text:p>
      <text:p text:style-name="Standard"/>
      <text:p text:style-name="P87">On peut constater que maintenant la branch magic apparait</text:p>
      <text:p text:style-name="Mon_5f_texte"><text:soft-page-break/></text:p>
      <text:p text:style-name="Mon_5f_texte">Comme vous pouvez le voir, l’astérisque est toujours sur la branche <text:span text:style-name="T73">main</text:span>. La branche <text:span text:style-name="T72">magic</text:span> est créée, mais nous n’avons pas encore basculé sur celle-ci.</text:p>
      <text:p text:style-name="P18"/>
      <text:p text:style-name="P18">Exécutez la commande <text:span text:style-name="T26">git log --oneline</text:span> </text:p>
      <text:p text:style-name="P18">Que constatez-vous ? </text:p>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log --oneline</text:span><text:span text:style-name="T31"/></text:p>
      <text:p text:style-name="Standard" loext:marker-style-name="T37"><text:span text:style-name="T28">d8b4385 (</text:span><text:span text:style-name="T49">HEAD</text:span><text:span text:style-name="T48"> -&gt; </text:span><text:span text:style-name="T50">main</text:span><text:span text:style-name="T48">, </text:span><text:span text:style-name="T55">origin/main</text:span><text:span text:style-name="T48">, </text:span><text:span text:style-name="T55">origin/HEAD</text:span><text:span text:style-name="T48">, </text:span><text:span text:style-name="T50">magic</text:span><text:span text:style-name="T48">) </text:span><text:span text:style-name="T37">Retour à la feuille de style d'origine</text:span></text:p>
      <text:p text:style-name="Standard" loext:marker-style-name="T37"><text:span text:style-name="T48">9473c40 </text:span><text:span text:style-name="T37">Deuxièeme version du projet</text:span></text:p>
      <text:p text:style-name="Standard" loext:marker-style-name="T37"><text:span text:style-name="T48">4832b8f </text:span><text:span text:style-name="T37">Create README.md</text:span></text:p>
      <text:p text:style-name="Standard" loext:marker-style-name="T37"><text:span text:style-name="T48">a3c9c99 </text:span><text:span text:style-name="T37">Première version du projet</text:span></text:p>
      <text:p text:style-name="Standard"/>
      <text:p text:style-name="P88">On peut constater que magic appartient à l’identifiant d8b4385 à partir de maintenant</text:p>
      <text:p text:style-name="Mon_5f_texte"/>
      <text:p text:style-name="Mon_5f_texte" loext:marker-style-name="T78">Nous avons donc simplement créé une nouvelle branche, nommée <text:span text:style-name="T73">magic</text:span> et le pointeur <text:span text:style-name="T78">magic</text:span>, placé pour l'instant sur le dernier commit (celui pointé par <text:span text:style-name="T77">HEAD</text:span>).</text:p>
      <text:p text:style-name="Mon_5f_texte"><draw:g text:anchor-type="char" draw:z-index="36" draw:name="Groupe 900" draw:style-name="gr7"><draw:g draw:style-name="gr28"><draw:custom-shape draw:name="Ellipse 94" draw:style-name="gr29" draw:text-style-name="P68" svg:width="1.348cm" svg:height="1.244cm" svg:x="-0.019cm" svg:y="2.59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Zone de texte 95" draw:style-name="gr30" draw:text-style-name="P39" svg:width="2.142cm" svg:height="1.292cm" svg:x="-0.407cm" svg:y="4.002cm"><text:p text:style-name="P3"><text:span text:style-name="T80">commit acti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Zone de texte 61" draw:style-name="gr37" draw:text-style-name="P39" svg:width="3.7cm" svg:height="1.442cm" svg:x="-1.148cm" svg:y="0.878cm"><text:p text:style-name="P69" loext:marker-style-name="T20"><text:span text:style-name="T20">Repository local</text:span><text:span text:style-name="T20"/></text:p><text:p text:style-name="P70" loext:marker-style-name="T27"/><text:p text:style-name="P69">Branche : <text:span text:style-name="T76">main</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On peut illustrer cela par le schéma suivant :</text:p>
      <text:p text:style-name="Mon_5f_texte"><draw:g text:anchor-type="char" draw:z-index="37" draw:name="Groupe 909" draw:style-name="gr7"><draw:g draw:style-name="gr28"><draw:custom-shape draw:name="Zone de texte 86" draw:style-name="gr32" draw:text-style-name="P39" svg:width="2.142cm" svg:height="0.66cm" svg:x="11.235cm" svg:y="1.511cm"><text:p text:style-name="P3"><text:span text:style-name="T80">cde218e</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lipse 81" draw:style-name="gr33" draw:text-style-name="P39" svg:width="1.348cm" svg:height="1.243cm" svg:x="8.695cm" svg:y="0.10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lipse 82" draw:style-name="gr33" draw:text-style-name="P39" svg:width="1.348cm" svg:height="1.243cm" svg:x="11.605cm" svg:y="0.10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lipse 83" draw:style-name="gr34" draw:text-style-name="P68" svg:width="1.348cm" svg:height="1.243cm" svg:x="14.463cm" svg:y="0.10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87" draw:style-name="gr35" draw:text-style-name="P39" svg:x1="10.071cm" svg:y1="0.744cm" svg:x2="11.605cm" svg:y2="0.745cm"><text:p/></draw:line><draw:line draw:name="Connecteur droit 88" draw:style-name="gr35" draw:text-style-name="P39" svg:x1="12.955cm" svg:y1="0.744cm" svg:x2="14.489cm" svg:y2="0.745cm"><text:p/></draw:line><draw:custom-shape draw:name="Zone de texte 80" draw:style-name="gr32" draw:text-style-name="P39" svg:width="2.142cm" svg:height="1.246cm" svg:x="14.092cm" svg:y="1.988cm"><text:p text:style-name="P3" loext:marker-style-name="T81"><text:span text:style-name="T81">main</text:span><text:span text:style-name="T81"/></text:p><text:p text:style-name="P3" loext:marker-style-name="T81"><text:span text:style-name="T81">magi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8"><draw:custom-shape draw:name="Connecteur droit avec flèche 91" draw:style-name="gr36" draw:text-style-name="P39" svg:width="0.003cm" svg:height="1.216cm" svg:x="15.124cm" svg:y="3.121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Zone de texte 92" draw:style-name="gr32" draw:text-style-name="P39" svg:width="1.428cm" svg:height="0.66cm" svg:x="14.41cm" svg:y="4.369cm"><text:p text:style-name="P3"><text:span text:style-name="T82">HE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Zone de texte 89" draw:style-name="gr32" draw:text-style-name="P39" svg:width="2.142cm" svg:height="0.66cm" svg:x="8.298cm" svg:y="1.511cm"><text:p text:style-name="P3"><text:span text:style-name="T80">540fcf1</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84" draw:style-name="gr32" draw:text-style-name="P39" svg:width="2.142cm" svg:height="0.66cm" svg:x="14.092cm" svg:y="1.511cm"><text:p text:style-name="P3"><text:span text:style-name="T80">6d2cf0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8"><draw:custom-shape draw:name="Ellipse 120" draw:style-name="gr33" draw:text-style-name="P39" svg:width="1.348cm" svg:height="1.243cm" svg:x="2.904cm" svg:y="0.10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125" draw:style-name="gr35" draw:text-style-name="P39" svg:x1="4.266cm" svg:y1="0.705cm" svg:x2="5.8cm" svg:y2="0.706cm"><text:p/></draw:line><draw:custom-shape draw:name="Zone de texte 962" draw:style-name="gr32" draw:text-style-name="P39" svg:width="2.142cm" svg:height="0.66cm" svg:x="2.477cm" svg:y="1.511cm"><text:p text:style-name="P3"><text:span text:style-name="T80">aeebab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8"><draw:custom-shape draw:name="Ellipse 897" draw:style-name="gr33" draw:text-style-name="P39" svg:width="1.348cm" svg:height="1.243cm" svg:x="5.788cm" svg:y="0.10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898" draw:style-name="gr35" draw:text-style-name="P39" svg:x1="7.15cm" svg:y1="0.705cm" svg:x2="8.684cm" svg:y2="0.706cm"><text:p/></draw:line><draw:custom-shape draw:name="Zone de texte 899" draw:style-name="gr32" draw:text-style-name="P39" svg:width="2.142cm" svg:height="0.66cm" svg:x="5.361cm" svg:y="1.511cm"><text:p text:style-name="P3"><text:span text:style-name="T80">c1c5a05</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72" loext:marker-style-name="T20"/>
      <text:p text:style-name="P18"/>
      <text:p text:style-name="Mon_5f_texte"/>
      <text:p text:style-name="Mon_5f_texte"/>
      <text:p text:style-name="P18"/>
      <text:p text:style-name="P18"/>
      <text:p text:style-name="P18"/>
      <text:p text:style-name="Mon_5f_texte">Pour rappel, se placer sur une branche, c'est faire en sorte que le répertoire de travail soit en lien avec le dernier <text:span text:style-name="T20">commit</text:span> de cette branche. Ce lien est défini par la position du pointeur <text:span text:style-name="T77">HEAD</text:span> et la commande qui permet de manipuler ce pointeur est : <text:span text:style-name="T26">git checkout</text:span></text:p>
      <text:p text:style-name="Mon_5f_texte">Pour se placer dans la branche <text:span text:style-name="T73">magic</text:span>, il suffit donc de déplacer <text:span text:style-name="T77">HEAD</text:span> sur le <text:span text:style-name="T20">commit</text:span> référencé par <text:span text:style-name="T78">magic</text:span> : <text:s/><text:span text:style-name="T26">git checkout magic</text:span></text:p>
      <text:p text:style-name="Mon_5f_texte"/>
      <text:p text:style-name="Mon_5f_texte"><text:span text:style-name="T21">Remarque</text:span> : <text:s/>Les deux actions précédentes (création et déplacement) auraient pu être réalisée ensemble par la commande : <text:span text:style-name="T26">git checkout -b magic</text:span></text:p>
      <text:p text:style-name="Mon_5f_texte"/>
      <text:p text:style-name="P18">Exécutez les commandes : <text:span text:style-name="T26">git branch ; git log --oneline</text:span> </text:p>
      <text:p text:style-name="P18">Que constatez-vous ? </text:p>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checkout</text:span><text:span text:style-name="T31"/></text:p>
      <text:p text:style-name="Standard" loext:marker-style-name="T31"><text:span text:style-name="T31">Your branch is up to date with 'origin/main'.</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checkout magic</text:span><text:span text:style-name="T31"/></text:p>
      <text:p text:style-name="Standard" loext:marker-style-name="T31"><text:span text:style-name="T31">Switched to branch 'magic'</text:span><text:span text:style-name="T31"/></text:p>
      <text:p text:style-name="P36" loext:marker-style-name="T31"/>
      <text:p text:style-name="Standard" loext:marker-style-name="T39"><text:soft-page-break/><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checkout -b magic</text:span><text:span text:style-name="T31"/></text:p>
      <text:p text:style-name="Standard" loext:marker-style-name="T31"><text:span text:style-name="T31">fatal: a branch named 'magic' already exists</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branch</text:span><text:span text:style-name="T31"/></text:p>
      <text:p text:style-name="Standard" loext:marker-style-name="T29"><text:span text:style-name="T31">* </text:span><text:span text:style-name="T29">magic</text:span></text:p>
      <text:p text:style-name="Standard" loext:marker-style-name="T31"><text:span text:style-name="T31"><text:s text:c="2"/>main</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log --oneline</text:span><text:span text:style-name="T31"/></text:p>
      <text:p text:style-name="Standard" loext:marker-style-name="T37"><text:span text:style-name="T28">d8b4385 (</text:span><text:span text:style-name="T49">HEAD</text:span><text:span text:style-name="T48"> -&gt; </text:span><text:span text:style-name="T50">magic</text:span><text:span text:style-name="T48">, </text:span><text:span text:style-name="T55">origin/main</text:span><text:span text:style-name="T48">, </text:span><text:span text:style-name="T55">origin/HEAD</text:span><text:span text:style-name="T48">, </text:span><text:span text:style-name="T50">main</text:span><text:span text:style-name="T48">) </text:span><text:span text:style-name="T37">Retour à la feuille de style d'origine</text:span></text:p>
      <text:p text:style-name="Standard" loext:marker-style-name="T37"><text:span text:style-name="T48">9473c40 </text:span><text:span text:style-name="T37">Deuxièeme version du projet</text:span></text:p>
      <text:p text:style-name="Standard" loext:marker-style-name="T37"><text:span text:style-name="T48">4832b8f </text:span><text:span text:style-name="T37">Create README.md</text:span></text:p>
      <text:p text:style-name="Standard" loext:marker-style-name="T37"><text:span text:style-name="T48">a3c9c99 </text:span><text:span text:style-name="T37">Première version du projet</text:span></text:p>
      <text:p text:style-name="Standard"/>
      <text:p text:style-name="P88">Que HEAD → magic et plus main</text:p>
      <text:p text:style-name="Mon_5f_texte"/>
      <text:p text:style-name="Mon_5f_texte"><text:span text:style-name="T77">HEAD</text:span> pointe maintenant effectivement sur <text:span text:style-name="T78">magic</text:span>. Ce qui signifie que tout nouveau <text:span text:style-name="T20">commit</text:span> sera ajouté après à la branche<text:span text:style-name="T94"> </text:span><text:span text:style-name="T76">magic</text:span><text:span text:style-name="T94"> </text:span>et non plus à la branche <text:span text:style-name="T76">main</text:span>. </text:p>
      <text:p text:style-name="Mon_5f_texte"/>
      <text:p text:style-name="Mon_5f_texte">Maintenant que la branche <text:span text:style-name="T76">magic</text:span> est active, vous allez pouvoir tester la mise en place de la page du site web dédiée au challenger <text:span text:style-name="T20">American Magic</text:span> ! </text:p>
      <text:p text:style-name="Mon_5f_texte"/>
      <text:p text:style-name="Mon_5f_texte">A partir du serveur de fichiers <text:span text:style-name="T20">S2022</text:span> et plus particulièrement du dossier AmericanMagic (<text:a xlink:type="simple" xlink:href="../../../../..//192.168.100.1/Public/BUT1/SAé23/AmericanMagic" text:style-name="Internet_20_link" text:visited-style-name="Visited_20_Internet_20_Link"><text:span text:style-name="Internet_20_link">\\192.168.100.1\Public\BUT1\SAé23\AmericanMagic</text:span></text:a>) ou à partir du dossier zippé sur Iris, copiez les 3 images (.png, .jpg et .ico) dans le dossier <text:span text:style-name="T24">36th_americas_cup\images</text:span> présent sur le Bureau Windows. </text:p>
      <text:p text:style-name="Mon_5f_texte">Faites de même avec le fichier american_magic.html que vous placerez dans le dossier <text:span text:style-name="T24">36th_americas_cup\challenger</text:span> présent sur le Bureau Windows. Puis revenez dans la console Git Bash, vérifiez que vous êtes bien à la racine du projet et exécutez alors <text:span text:style-name="T26">git status</text:span></text:p>
      <text:p text:style-name="Mon_5f_texte"/>
      <text:p text:style-name="P18">Est-ce que Git s’est aperçu des changements et que propose-t-il ? </text:p>
      <text:p text:style-name="Standard" loext:marker-style-name="T39"><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status</text:span><text:span text:style-name="T31"/></text:p>
      <text:p text:style-name="Standard" loext:marker-style-name="T31"><text:span text:style-name="T31">On branch magic</text:span><text:span text:style-name="T31"/></text:p>
      <text:p text:style-name="Standard" loext:marker-style-name="T31"><text:span text:style-name="T31">Untracked files:</text:span><text:span text:style-name="T31"/></text:p>
      <text:p text:style-name="Standard" loext:marker-style-name="T31"><text:span text:style-name="T31"><text:s text:c="2"/>(use "git add &lt;file&gt;..." to include in what will be committed)</text:span><text:span text:style-name="T31"/></text:p>
      <text:p text:style-name="Standard" loext:marker-style-name="T64"><text:span text:style-name="T31"><text:s text:c="8"/></text:span><text:span text:style-name="T64">challenger/american_magic.html</text:span></text:p>
      <text:p text:style-name="Standard" loext:marker-style-name="T64"><text:span text:style-name="T31"><text:s text:c="8"/></text:span><text:span text:style-name="T64">images/AC75_Defiant.png</text:span></text:p>
      <text:p text:style-name="Standard" loext:marker-style-name="T64"><text:span text:style-name="T31"><text:s text:c="8"/></text:span><text:span text:style-name="T64">images/american_magic.ico</text:span></text:p>
      <text:p text:style-name="Standard" loext:marker-style-name="T64"><text:span text:style-name="T31"><text:s text:c="8"/></text:span><text:span text:style-name="T64">images/vAC75_Defiant.jpg</text:span></text:p>
      <text:p text:style-name="P56" loext:marker-style-name="T64"/>
      <text:p text:style-name="Standard" loext:marker-style-name="T31"><text:span text:style-name="T31">nothing added to commit but untracked files present (use "git add" to track)</text:span><text:span text:style-name="T31"/></text:p>
      <text:p text:style-name="Standard"/>
      <text:p text:style-name="P89">On peut constater que il a pu voir l’ajout des differents fichier que j’ai pu mets dans le dossier images et le dossier challenger</text:p>
      <text:p text:style-name="Mon_5f_texte"/>
      <text:p text:style-name="Mon_5f_texte">A partir de la racine du projet, exécutez les commandes <text:span text:style-name="T26">git add . ; git status</text:span></text:p>
      <text:p text:style-name="P18">Est-ce que tout vous semble correct ? </text:p>
      <text:p text:style-name="Standard" loext:marker-style-name="T39"><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add .</text:span><text:span text:style-name="T31"/></text:p>
      <text:p text:style-name="P36" loext:marker-style-name="T31"/>
      <text:p text:style-name="Standard" loext:marker-style-name="T39"><text:soft-page-break/><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status</text:span><text:span text:style-name="T31"/></text:p>
      <text:p text:style-name="Standard" loext:marker-style-name="T31"><text:span text:style-name="T31">On branch magic</text:span><text:span text:style-name="T31"/></text:p>
      <text:p text:style-name="Standard" loext:marker-style-name="T31"><text:span text:style-name="T31">Changes to be committed:</text:span><text:span text:style-name="T31"/></text:p>
      <text:p text:style-name="Standard" loext:marker-style-name="T31"><text:span text:style-name="T31"><text:s text:c="2"/>(use "git restore --staged &lt;file&gt;..." to unstage)</text:span><text:span text:style-name="T31"/></text:p>
      <text:p text:style-name="Standard" loext:marker-style-name="T29"><text:span text:style-name="T31"><text:s text:c="8"/></text:span><text:span text:style-name="T29">new file: <text:s text:c="2"/>challenger/american_magic.html</text:span></text:p>
      <text:p text:style-name="Standard" loext:marker-style-name="T29"><text:span text:style-name="T31"><text:s text:c="8"/></text:span><text:span text:style-name="T29">new file: <text:s text:c="2"/>images/AC75_Defiant.png</text:span></text:p>
      <text:p text:style-name="Standard" loext:marker-style-name="T29"><text:span text:style-name="T31"><text:s text:c="8"/></text:span><text:span text:style-name="T29">new file: <text:s text:c="2"/>images/american_magic.ico</text:span></text:p>
      <text:p text:style-name="Standard" loext:marker-style-name="T29"><text:span text:style-name="T31"><text:s text:c="8"/></text:span><text:span text:style-name="T29">new file: <text:s text:c="2"/>images/vAC75_Defiant.jpg</text:span></text:p>
      <text:p text:style-name="Standard"/>
      <text:p text:style-name="P89">On peut constater que les transfert vers github a bien reussi avec succès</text:p>
      <text:p text:style-name="Mon_5f_texte"/>
      <text:p text:style-name="Mon_5f_texte">Si oui, exécutez la commande :</text:p>
      <text:p text:style-name="P40"><text:span text:style-name="T26">git commit -m "Ajout des images et page web American Magic" <text:s text:c="4"/></text:span></text:p>
      <text:p text:style-name="Mon_5f_texte"/>
      <text:p text:style-name="Mon_5f_texte">Exécutez de nouveau <text:span text:style-name="T26">git status</text:span> et si tout est correct exécutez <text:span text:style-name="T26">git branch ; git log --oneline</text:span></text:p>
      <text:p text:style-name="P18">Interprétez l’affichage produit : </text:p>
      <text:p text:style-name="Standard" loext:marker-style-name="T39"><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commit -m "Ajout des images et page web American MAgic"</text:span><text:span text:style-name="T31"/></text:p>
      <text:p text:style-name="Standard" loext:marker-style-name="T31"><text:span text:style-name="T31">[magic 8c2c3a8] Ajout des images et page web American MAgic</text:span><text:span text:style-name="T31"/></text:p>
      <text:p text:style-name="Standard" loext:marker-style-name="T31"><text:span text:style-name="T31"><text:s/>4 files changed, 37 insertions(+)</text:span><text:span text:style-name="T31"/></text:p>
      <text:p text:style-name="Standard" loext:marker-style-name="T31"><text:span text:style-name="T31"><text:s/>create mode 100644 challenger/american_magic.html</text:span><text:span text:style-name="T31"/></text:p>
      <text:p text:style-name="Standard" loext:marker-style-name="T31"><text:span text:style-name="T31"><text:s/>create mode 100644 images/AC75_Defiant.png</text:span><text:span text:style-name="T31"/></text:p>
      <text:p text:style-name="Standard" loext:marker-style-name="T31"><text:span text:style-name="T31"><text:s/>create mode 100644 images/american_magic.ico</text:span><text:span text:style-name="T31"/></text:p>
      <text:p text:style-name="Standard" loext:marker-style-name="T31"><text:span text:style-name="T31"><text:s/>create mode 100644 images/vAC75_Defiant.jpg</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status</text:span><text:span text:style-name="T31"/></text:p>
      <text:p text:style-name="Standard" loext:marker-style-name="T31"><text:span text:style-name="T31">On branch magic</text:span><text:span text:style-name="T31"/></text:p>
      <text:p text:style-name="Standard" loext:marker-style-name="T31"><text:span text:style-name="T31">nothing to commit, working tree clean</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branch</text:span><text:span text:style-name="T31"/></text:p>
      <text:p text:style-name="Standard" loext:marker-style-name="T29"><text:span text:style-name="T31">* </text:span><text:span text:style-name="T29">magic</text:span></text:p>
      <text:p text:style-name="Standard" loext:marker-style-name="T31"><text:span text:style-name="T31"><text:s text:c="2"/>main</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log --oneline</text:span><text:span text:style-name="T31"/></text:p>
      <text:p text:style-name="Standard" loext:marker-style-name="T37"><text:span text:style-name="T28">8c2c3a8 (</text:span><text:span text:style-name="T49">HEAD</text:span><text:span text:style-name="T48"> -&gt; </text:span><text:span text:style-name="T50">magic</text:span><text:span text:style-name="T48">) </text:span><text:span text:style-name="T37">Ajout des images et page web American MAgic</text:span></text:p>
      <text:p text:style-name="Standard" loext:marker-style-name="T37"><text:span text:style-name="T48">d8b4385 (</text:span><text:span text:style-name="T55">origin/main</text:span><text:span text:style-name="T48">, </text:span><text:span text:style-name="T55">origin/HEAD</text:span><text:span text:style-name="T48">, </text:span><text:span text:style-name="T50">main</text:span><text:span text:style-name="T48">) </text:span><text:span text:style-name="T37">Retour à la feuille de style d'origine</text:span></text:p>
      <text:p text:style-name="Standard" loext:marker-style-name="T37"><text:span text:style-name="T48">9473c40 </text:span><text:span text:style-name="T37">Deuxièeme version du projet</text:span></text:p>
      <text:p text:style-name="Standard" loext:marker-style-name="T37"><text:span text:style-name="T48">4832b8f </text:span><text:span text:style-name="T37">Create README.md</text:span></text:p>
      <text:p text:style-name="Standard" loext:marker-style-name="T37"><text:span text:style-name="T48">a3c9c99 </text:span><text:span text:style-name="T37">Première version du projet</text:span></text:p>
      <text:p text:style-name="Standard"/>
      <text:p text:style-name="P90"><text:span text:style-name="T95">On peut constater qu’il a pu remarque les changement effectuer par moi l’utilisateur et que la fase de transfert entre git et github a bien reussi avec succes</text:span></text:p>
      <text:p text:style-name="P19" loext:marker-style-name="T22"/>
      <text:p text:style-name="Mon_5f_texte"><draw:custom-shape text:anchor-type="char" draw:z-index="46" draw:name="Zone de texte 14" draw:style-name="gr49" draw:text-style-name="P1" svg:width="1.9cm" svg:height="1.281cm" svg:x="-2.069cm" svg:y="0.855cm"><text:p text:style-name="P91" loext:marker-style-name="T96">branche <text:span text:style-name="T76">ma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1" draw:name="Groupe 970" draw:style-name="gr43"><draw:g draw:style-name="gr28"><draw:custom-shape draw:name="Zone de texte 975" draw:style-name="gr32" draw:text-style-name="P39" svg:width="2.142cm" svg:height="0.66cm" svg:x="8.007cm" svg:y="2.263cm"><text:p text:style-name="P3"><text:span text:style-name="T80">cde218e</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lipse 994" draw:style-name="gr33" draw:text-style-name="P39" svg:width="1.348cm" svg:height="1.243cm" svg:x="5.467cm" svg:y="0.86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lipse 995" draw:style-name="gr33" draw:text-style-name="P39" svg:width="1.348cm" svg:height="1.243cm" svg:x="8.377cm" svg:y="0.86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lipse 1020" draw:style-name="gr33" draw:text-style-name="P39" svg:width="1.348cm" svg:height="1.243cm" svg:x="11.233cm" svg:y="0.86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140" draw:style-name="gr35" draw:text-style-name="P39" svg:x1="6.842cm" svg:y1="1.496cm" svg:x2="8.376cm" svg:y2="1.497cm"><text:p/></draw:line><draw:line draw:name="Connecteur droit 146" draw:style-name="gr35" draw:text-style-name="P39" svg:x1="9.726cm" svg:y1="1.496cm" svg:x2="11.26cm" svg:y2="1.497cm"><text:p/></draw:line><draw:custom-shape draw:name="Zone de texte 162" draw:style-name="gr32" draw:text-style-name="P39" svg:width="2.142cm" svg:height="0.75cm" svg:x="10.862cm" svg:y="2.74cm"><text:p text:style-name="P3" loext:marker-style-name="T81"><text:span text:style-name="T81">ma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75" draw:style-name="gr32" draw:text-style-name="P39" svg:width="2.142cm" svg:height="0.66cm" svg:x="5.07cm" svg:y="2.263cm"><text:p text:style-name="P3"><text:span text:style-name="T80">540fcf1</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77" draw:style-name="gr32" draw:text-style-name="P39" svg:width="2.142cm" svg:height="0.66cm" svg:x="10.862cm" svg:y="2.263cm"><text:p text:style-name="P3"><text:span text:style-name="T80">6d2cf0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8"><draw:custom-shape draw:name="Ellipse 180" draw:style-name="gr33" draw:text-style-name="P39" svg:width="1.348cm" svg:height="1.243cm" svg:x="-0.324cm" svg:y="0.86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181" draw:style-name="gr35" draw:text-style-name="P39" svg:x1="1.037cm" svg:y1="1.458cm" svg:x2="2.572cm" svg:y2="1.459cm"><text:p/></draw:line><draw:custom-shape draw:name="Zone de texte 182" draw:style-name="gr32" draw:text-style-name="P39" svg:width="2.142cm" svg:height="0.66cm" svg:x="-0.751cm" svg:y="2.263cm"><text:p text:style-name="P3"><text:span text:style-name="T80">aeebab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8"><draw:custom-shape draw:name="Ellipse 184" draw:style-name="gr33" draw:text-style-name="P39" svg:width="1.348cm" svg:height="1.243cm" svg:x="2.56cm" svg:y="0.86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185" draw:style-name="gr35" draw:text-style-name="P39" svg:x1="3.921cm" svg:y1="1.458cm" svg:x2="5.455cm" svg:y2="1.459cm"><text:p/></draw:line><draw:custom-shape draw:name="Zone de texte 186" draw:style-name="gr32" draw:text-style-name="P39" svg:width="2.142cm" svg:height="0.66cm" svg:x="2.133cm" svg:y="2.263cm"><text:p text:style-name="P3"><text:span text:style-name="T80">c1c5a05</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Mettez à jour par le schéma suivant : </text:p>
      <text:p text:style-name="Mon_5f_texte"/>
      <text:p text:style-name="Mon_5f_texte"><draw:g text:anchor-type="char" draw:z-index="28" draw:name="Groupe 187" draw:style-name="gr50"><draw:custom-shape draw:name="Ellipse 989" draw:style-name="gr51" draw:text-style-name="P92" svg:width="1.348cm" svg:height="1.243cm" svg:x="14.487cm" svg:y="1.462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Forme libre : forme 996" draw:style-name="gr52" draw:text-style-name="P6" svg:width="1.885cm" svg:height="1.996cm" svg:x="12.608cm" svg:y="0.111cm"><text:p/><draw:enhanced-geometry draw:mirror-horizontal="false" draw:mirror-vertical="false" draw:glue-points="?f0 ?f1 ?f2 ?f3 ?f4 ?f5 ?f6 ?f7 ?f8 ?f9 ?f10 ?f11" drawooo:sub-view-size="678788 718057" draw:text-areas="0 0 ?f12 ?f13" svg:viewBox="0 0 0 0" draw:type="ooxml-non-primitive" draw:enhanced-path="M 0 0 C 96769 11220 193539 22440 269271 117807 345003 213174 386142 472160 454395 572202 522648 672244 678788 718057 678788 718057 L 678788 718057 678788 718057 N"><draw:equation draw:name="f0" draw:formula="0*logwidth/678788"/><draw:equation draw:name="f1" draw:formula="0*logheight/718057"/><draw:equation draw:name="f2" draw:formula="269271*logwidth/678788"/><draw:equation draw:name="f3" draw:formula="117807*logheight/718057"/><draw:equation draw:name="f4" draw:formula="454395*logwidth/678788"/><draw:equation draw:name="f5" draw:formula="572202*logheight/718057"/><draw:equation draw:name="f6" draw:formula="678788*logwidth/678788"/><draw:equation draw:name="f7" draw:formula="718057*logheight/718057"/><draw:equation draw:name="f8" draw:formula="678788*logwidth/678788"/><draw:equation draw:name="f9" draw:formula="718057*logheight/718057"/><draw:equation draw:name="f10" draw:formula="678788*logwidth/678788"/><draw:equation draw:name="f11" draw:formula="718057*logheight/718057"/><draw:equation draw:name="f12" draw:formula="logwidth"/><draw:equation draw:name="f13" draw:formula="logheight"/></draw:enhanced-geometry></draw:custom-shape></draw:g></text:p>
      <text:p text:style-name="Mon_5f_texte"/>
      <text:p text:style-name="Mon_5f_texte"><draw:custom-shape text:anchor-type="char" draw:z-index="45" draw:name="Zone de texte 12" draw:style-name="gr49" draw:text-style-name="P1" svg:width="1.9cm" svg:height="1.281cm" svg:x="15.683cm" svg:y="0.113cm"><text:p text:style-name="P91" loext:marker-style-name="T96">branche <text:span text:style-name="T76">magi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on_5f_texte"/>
      <text:p text:style-name="Mon_5f_texte"><draw:custom-shape text:anchor-type="char" draw:z-index="25" draw:name="Zone de texte 112" draw:style-name="gr53" draw:text-style-name="P1" svg:width="2.142cm" svg:height="0.717cm" svg:x="14.157cm" svg:y="0.139cm"><text:p text:style-name="P91"><text:span text:style-name="T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custom-shape text:anchor-type="char" draw:z-index="27" draw:name="Zone de texte 988" draw:style-name="gr54" draw:text-style-name="P1" svg:width="1.773cm" svg:height="0.839cm" svg:x="5.315cm" svg:y="0.053cm"><text:p text:style-name="P91" loext:marker-style-name="T81"><text:span text:style-name="T81">magi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6" draw:name="Groupe 982" draw:style-name="gr55"><draw:custom-shape draw:name="Connecteur droit avec flèche 983" draw:style-name="gr56" draw:text-style-name="P6" svg:width="0.004cm" svg:height="1.216cm" svg:x="4.588cm" svg:y="0.33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Zone de texte 984" draw:style-name="gr57" draw:text-style-name="P39" svg:width="1.428cm" svg:height="0.66cm" svg:x="3.875cm" svg:y="1.577cm"><text:p text:style-name="P3"><text:span text:style-name="T82">HE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Eléments à placer : </text:p>
      <text:p text:style-name="Mon_5f_texte"/>
      <text:p text:style-name="Mon_5f_texte"/>
      <text:p text:style-name="Mon_5f_texte"/>
      <text:p text:style-name="Mon_5f_texte" loext:marker-style-name="T35">Dans un navigateur web, ouvrez directement la page <text:span text:style-name="T20">american_magic.html</text:span> depuis le dossier <text:span text:style-name="T24">36th_americas_cup\challenger</text:span><text:span text:style-name="T35">. Vérifiez que le style et les images cliquables sont corrects : la page web dédiée à American Magic est bien présente !</text:span></text:p>
      <text:p text:style-name="Mon_5f_texte" loext:marker-style-name="T35"><text:span text:style-name="T35">De même, ouvrez la page </text:span><text:span text:style-name="T24">index.html</text:span><text:span text:style-name="T35"> </text:span>depuis le dossier <text:span text:style-name="T24">36th_americas_cup</text:span><text:span text:style-name="T35">. Ne manque-t-il pas un lien hypertexte pour accéder à la page web d’American Magic, comme c’est le cas pour la page web dédiée à Luna Rossa ?</text:span></text:p>
      <text:p text:style-name="Mon_5f_texte">Corrigez en conséquence la page <text:span text:style-name="T20">index.html</text:span> (vous pouvez le faire sous Windows avec Notepad++ ou sous la console Git Bash avec l’éditeur nano) et vérifiez dans le navigateur web que maintenant la page d’American Magic est accessible depuis la page <text:span text:style-name="T20">index.html</text:span>.</text:p>
      <text:p text:style-name="Mon_5f_texte">Exécutez la commande <text:span text:style-name="T26">git status</text:span></text:p>
      <text:p text:style-name="P18">Est-ce que tout vous semble correct ? </text:p>
      <text:p text:style-name="P93">Oui</text:p>
      <text:p text:style-name="Standard" loext:marker-style-name="T39"><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status</text:span><text:span text:style-name="T31"/></text:p>
      <text:p text:style-name="Standard" loext:marker-style-name="T31"><text:span text:style-name="T31">On branch magic</text:span><text:span text:style-name="T31"/></text:p>
      <text:p text:style-name="Standard" loext:marker-style-name="T31"><text:span text:style-name="T31">Changes not staged for commit:</text:span><text:span text:style-name="T31"/></text:p>
      <text:p text:style-name="Standard" loext:marker-style-name="T31"><text:span text:style-name="T31"><text:s text:c="2"/>(use "git add &lt;file&gt;..." to update what will be committed)</text:span><text:span text:style-name="T31"/></text:p>
      <text:p text:style-name="Standard" loext:marker-style-name="T31"><text:span text:style-name="T31"><text:s text:c="2"/>(use "git restore &lt;file&gt;..." to discard changes in working directory)</text:span><text:span text:style-name="T31"/></text:p>
      <text:p text:style-name="Standard" loext:marker-style-name="T64"><text:span text:style-name="T31"><text:s text:c="8"/></text:span><text:span text:style-name="T64">modified: <text:s text:c="2"/>index.html</text:span></text:p>
      <text:p text:style-name="P56" loext:marker-style-name="T64"/>
      <text:p text:style-name="Standard" loext:marker-style-name="T31"><text:span text:style-name="T31">no changes added to commit (use "git add" and/or "git commit -a")</text:span><text:span text:style-name="T31"/></text:p>
      <text:p text:style-name="P94"/>
      <text:p text:style-name="Mon_5f_texte"/>
      <text:p text:style-name="Mon_5f_texte">Il faut alors mettre cette modification dans l’historique des versions de la branche <text:span text:style-name="T76">magic</text:span>, avec le message <text:span text:style-name="T26">"Ajout hyperlien vers American Magic" <text:s text:c="4"/></text:span></text:p>
      <text:p text:style-name="P18">Reportez ici vos commandes :</text:p>
      <text:p text:style-name="Standard" loext:marker-style-name="T39"><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add .</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commit -m "Ajout hyperlien vers American Magic"</text:span><text:span text:style-name="T31"/></text:p>
      <text:p text:style-name="Standard" loext:marker-style-name="T31"><text:span text:style-name="T31">[magic 1e9bceb] Ajout hyperlien vers American Magic</text:span><text:span text:style-name="T31"/></text:p>
      <text:p text:style-name="Standard" loext:marker-style-name="T31"><text:span text:style-name="T31"><text:s/>1 file changed, 2 insertions(+), 1 deletion(-)</text:span></text:p>
      <text:p text:style-name="Mon_5f_texte"/>
      <text:p text:style-name="Mon_5f_texte">Puis exécutez : <text:span text:style-name="T26">git status ; git branch ; git log --oneline</text:span></text:p>
      <text:p text:style-name="P18">Interprétez l’affichage produit : </text:p>
      <text:p text:style-name="Standard" loext:marker-style-name="T39"><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status</text:span><text:span text:style-name="T31"/></text:p>
      <text:p text:style-name="Standard" loext:marker-style-name="T31"><text:span text:style-name="T31">On branch magic</text:span><text:span text:style-name="T31"/></text:p>
      <text:p text:style-name="Standard" loext:marker-style-name="T31"><text:span text:style-name="T31">nothing to commit, working tree clean</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branch</text:span><text:span text:style-name="T31"/></text:p>
      <text:p text:style-name="Standard" loext:marker-style-name="T29"><text:span text:style-name="T31">* </text:span><text:span text:style-name="T29">magic</text:span></text:p>
      <text:p text:style-name="Standard" loext:marker-style-name="T31"><text:span text:style-name="T31"><text:s text:c="2"/>main</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gic)</text:span></text:p>
      <text:p text:style-name="Standard" loext:marker-style-name="T31"><text:span text:style-name="T31">$ git log --oneline</text:span><text:span text:style-name="T31"/></text:p>
      <text:p text:style-name="Standard" loext:marker-style-name="T37"><text:span text:style-name="T28">1e9bceb (</text:span><text:span text:style-name="T49">HEAD</text:span><text:span text:style-name="T48"> -&gt; </text:span><text:span text:style-name="T50">magic</text:span><text:span text:style-name="T48">) </text:span><text:span text:style-name="T37">Ajout hyperlien vers American Magic</text:span></text:p>
      <text:p text:style-name="Standard" loext:marker-style-name="T37"><text:soft-page-break/><text:span text:style-name="T48">8c2c3a8 </text:span><text:span text:style-name="T37">Ajout des images et page web American MAgic</text:span></text:p>
      <text:p text:style-name="Standard" loext:marker-style-name="T37"><text:span text:style-name="T48">d8b4385 (</text:span><text:span text:style-name="T55">origin/main</text:span><text:span text:style-name="T48">, </text:span><text:span text:style-name="T55">origin/HEAD</text:span><text:span text:style-name="T48">, </text:span><text:span text:style-name="T50">main</text:span><text:span text:style-name="T48">) </text:span><text:span text:style-name="T37">Retour à la feuille de style d'origine</text:span></text:p>
      <text:p text:style-name="Standard" loext:marker-style-name="T37"><text:span text:style-name="T48">9473c40 </text:span><text:span text:style-name="T37">Deuxièeme version du projet</text:span></text:p>
      <text:p text:style-name="Standard" loext:marker-style-name="T37"><text:span text:style-name="T48">4832b8f </text:span><text:span text:style-name="T37">Create README.md</text:span></text:p>
      <text:p text:style-name="Standard" loext:marker-style-name="T37"><text:span text:style-name="T48">a3c9c99 </text:span><text:span text:style-name="T37">Première version du projet</text:span></text:p>
      <text:p text:style-name="Standard"/>
      <text:p text:style-name="P95">On peut constater que le produit afficher montre bien l’operation qu’on a demande d’effectuer</text:p>
      <text:p text:style-name="Mon_5f_texte"/>
      <text:p text:style-name="Mon_5f_texte"><draw:custom-shape text:anchor-type="char" draw:z-index="48" draw:name="Zone de texte 18" draw:style-name="gr58" draw:text-style-name="P1" svg:width="1.899cm" svg:height="1.281cm" svg:x="-2.536cm" svg:y="0.72cm"><text:p text:style-name="P91" loext:marker-style-name="T96">branche <text:span text:style-name="T76">ma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2" draw:name="Groupe 297" draw:style-name="gr59"><draw:custom-shape draw:name="Ellipse 1022" draw:style-name="gr60" draw:text-style-name="P92" svg:width="1.347cm" svg:height="1.243cm" svg:x="14.135cm" svg:y="2.786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1023" draw:style-name="gr61" draw:text-style-name="P6" svg:x1="12.58cm" svg:y1="3.395cm" svg:x2="14.112cm" svg:y2="3.396cm"><text:p/></draw:line><draw:g draw:style-name="gr28"><draw:g draw:style-name="gr28"><draw:custom-shape draw:name="Ellipse 189" draw:style-name="gr62" draw:text-style-name="P39" svg:width="1.348cm" svg:height="1.243cm" svg:x="11.255cm" svg:y="2.732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Forme libre : forme 190" draw:style-name="gr63" draw:text-style-name="P39" svg:width="1.883cm" svg:height="1.992cm" svg:x="9.378cm" svg:y="1.384cm"><text:p/><draw:enhanced-geometry draw:mirror-horizontal="false" draw:mirror-vertical="false" draw:glue-points="?f0 ?f1 ?f2 ?f3 ?f4 ?f5 ?f6 ?f7 ?f8 ?f9 ?f10 ?f11" drawooo:sub-view-size="678788 718057" draw:text-areas="0 0 ?f12 ?f13" svg:viewBox="0 0 0 0" draw:type="ooxml-non-primitive" draw:enhanced-path="M 0 0 C 96769 11220 193539 22440 269271 117807 345003 213174 386142 472160 454395 572202 522648 672244 678788 718057 678788 718057 L 678788 718057 678788 718057 N"><draw:equation draw:name="f0" draw:formula="0*logwidth/678788"/><draw:equation draw:name="f1" draw:formula="0*logheight/718057"/><draw:equation draw:name="f2" draw:formula="269271*logwidth/678788"/><draw:equation draw:name="f3" draw:formula="117807*logheight/718057"/><draw:equation draw:name="f4" draw:formula="454395*logwidth/678788"/><draw:equation draw:name="f5" draw:formula="572202*logheight/718057"/><draw:equation draw:name="f6" draw:formula="678788*logwidth/678788"/><draw:equation draw:name="f7" draw:formula="718057*logheight/718057"/><draw:equation draw:name="f8" draw:formula="678788*logwidth/678788"/><draw:equation draw:name="f9" draw:formula="718057*logheight/718057"/><draw:equation draw:name="f10" draw:formula="678788*logwidth/678788"/><draw:equation draw:name="f11" draw:formula="718057*logheight/718057"/><draw:equation draw:name="f12" draw:formula="logwidth"/><draw:equation draw:name="f13" draw:formula="logheight"/></draw:enhanced-geometry></draw:custom-shape></draw:g><draw:custom-shape draw:name="Zone de texte 263" draw:style-name="gr32" draw:text-style-name="P39" svg:width="2.142cm" svg:height="0.75cm" svg:x="7.614cm" svg:y="2.559cm"><text:p text:style-name="P3" loext:marker-style-name="T81"><text:span text:style-name="T81">ma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8"><draw:custom-shape draw:name="Zone de texte 257" draw:style-name="gr32" draw:text-style-name="P39" svg:width="2.142cm" svg:height="0.66cm" svg:x="5.434cm" svg:y="2.084cm"><text:p text:style-name="P3"><text:span text:style-name="T80">cde218e</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64" draw:style-name="gr32" draw:text-style-name="P39" svg:width="2.142cm" svg:height="0.66cm" svg:x="3.256cm" svg:y="2.084cm"><text:p text:style-name="P3"><text:span text:style-name="T80">540fcf1</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65" draw:style-name="gr32" draw:text-style-name="P39" svg:width="2.142cm" svg:height="0.66cm" svg:x="7.614cm" svg:y="2.084cm"><text:p text:style-name="P3"><text:span text:style-name="T80">6d2cf0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69" draw:style-name="gr32" draw:text-style-name="P39" svg:width="2.142cm" svg:height="0.66cm" svg:x="-1.161cm" svg:y="2.084cm"><text:p text:style-name="P3"><text:span text:style-name="T80">aeebab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74" draw:style-name="gr32" draw:text-style-name="P39" svg:width="2.14cm" svg:height="0.66cm" svg:x="1.037cm" svg:y="2.084cm"><text:p text:style-name="P3"><text:span text:style-name="T80">c1c5a05</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8"><draw:g draw:style-name="gr28"><draw:custom-shape draw:name="Ellipse 260" draw:style-name="gr33" draw:text-style-name="P39" svg:width="1.348cm" svg:height="1.243cm" svg:x="8.013cm" svg:y="0.75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262" draw:style-name="gr35" draw:text-style-name="P39" svg:x1="7.159cm" svg:y1="1.387cm" svg:x2="8.03cm" svg:y2="1.388cm"><text:p/></draw:line></draw:g><draw:g draw:style-name="gr28"><draw:custom-shape draw:name="Ellipse 283" draw:style-name="gr33" draw:text-style-name="P39" svg:width="1.348cm" svg:height="1.243cm" svg:x="5.813cm" svg:y="0.75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284" draw:style-name="gr35" draw:text-style-name="P39" svg:x1="4.96cm" svg:y1="1.387cm" svg:x2="5.831cm" svg:y2="1.388cm"><text:p/></draw:line></draw:g><draw:custom-shape draw:name="Ellipse 286" draw:style-name="gr33" draw:text-style-name="P39" svg:width="1.348cm" svg:height="1.243cm" svg:x="-0.782cm" svg:y="0.75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28"><draw:custom-shape draw:name="Ellipse 289" draw:style-name="gr33" draw:text-style-name="P39" svg:width="1.348cm" svg:height="1.243cm" svg:x="1.416cm" svg:y="0.75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290" draw:style-name="gr35" draw:text-style-name="P39" svg:x1="0.562cm" svg:y1="1.387cm" svg:x2="1.433cm" svg:y2="1.388cm"><text:p/></draw:line></draw:g><draw:g draw:style-name="gr28"><draw:custom-shape draw:name="Ellipse 292" draw:style-name="gr33" draw:text-style-name="P39" svg:width="1.348cm" svg:height="1.243cm" svg:x="3.616cm" svg:y="0.75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293" draw:style-name="gr35" draw:text-style-name="P39" svg:x1="2.762cm" svg:y1="1.387cm" svg:x2="3.633cm" svg:y2="1.388cm"><text:p/></draw:line></draw:g></draw:g></draw:g></draw:g>Mettez à jour par le schéma suivant :</text:p>
      <text:p text:style-name="Mon_5f_texte"/>
      <text:p text:style-name="Mon_5f_texte"/>
      <text:p text:style-name="Mon_5f_texte"/>
      <text:p text:style-name="Mon_5f_texte"><draw:custom-shape text:anchor-type="char" draw:z-index="47" draw:name="Zone de texte 16" draw:style-name="gr49" draw:text-style-name="P1" svg:width="1.9cm" svg:height="1.281cm" svg:x="15.332cm" svg:y="0.088cm"><text:p text:style-name="P91" loext:marker-style-name="T96">branche <text:span text:style-name="T76">magi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on_5f_texte"/>
      <text:p text:style-name="Mon_5f_texte"><draw:custom-shape text:anchor-type="char" draw:z-index="31" draw:name="Zone de texte 1019" draw:style-name="gr64" draw:text-style-name="P1" svg:width="1.773cm" svg:height="0.84cm" svg:x="5.105cm" svg:y="0.547cm"><text:p text:style-name="P91" loext:marker-style-name="T81"><text:span text:style-name="T81">magi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Zone de texte 1018" draw:style-name="gr53" draw:text-style-name="P1" svg:width="2.142cm" svg:height="0.717cm" svg:x="10.855cm" svg:y="0.155cm"><text:p text:style-name="P91"><text:span text:style-name="T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Zone de texte 1021" draw:style-name="gr53" draw:text-style-name="P1" svg:width="2.142cm" svg:height="0.717cm" svg:x="13.757cm" svg:y="0.176cm"><text:p text:style-name="P91"><text:span text:style-name="T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0" draw:name="Groupe 1015" draw:style-name="gr55"><draw:custom-shape draw:name="Connecteur droit avec flèche 1016" draw:style-name="gr41" draw:text-style-name="P6" svg:width="0.003cm" svg:height="1.216cm" svg:x="4.388cm" svg:y="0.536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Zone de texte 1017" draw:style-name="gr42" draw:text-style-name="P39" svg:width="1.43cm" svg:height="0.66cm" svg:x="3.672cm" svg:y="1.783cm"><text:p text:style-name="P3"><text:span text:style-name="T82">HE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8">Eléments à placer : </text:p>
      <text:p text:style-name="Mon_5f_texte"/>
      <text:p text:style-name="Mon_5f_texte"/>
      <text:p text:style-name="Mon_5f_texte"/>
      <text:p text:style-name="Mon_5f_texte">Voilà, vous êtes satisfait des modifications apportées au projet du site web !</text:p>
      <text:p text:style-name="Mon_5f_texte"/>
      <text:p text:style-name="Mon_5f_texte">À présent, il faut intégrer l'évolution réalisée dans la branche <text:span text:style-name="T76">magic</text:span> à la branche principale <text:span text:style-name="T76">main</text:span>. Pour cela, vous devrez utiliser la commande <text:span text:style-name="T26">git merge</text:span>.</text:p>
      <text:p text:style-name="Mon_5f_texte">Mais attention, cette commande doit s'utiliser à partir de la branche dans laquelle nous voulons apporter les évolutions. Dans le cas présent, la commande s’effectuera donc dans la branche <text:span text:style-name="T76">main</text:span>. Pour y retourner, utilisez la commande : <text:span text:style-name="T26">git checkout main</text:span></text:p>
      <text:p text:style-name="Mon_5f_texte">Mettez à jour (F5) la page <text:span text:style-name="T20">index.html</text:span> dans le navigateur (ou réouvrez là si vous l’aviez fermée). Avec l’explorateur de fichiers Windows, placez-vous dans le dossier <text:span text:style-name="T20">Challenger</text:span>…</text:p>
      <text:p text:style-name="P18">Que constatez-vous !</text:p>
      <text:p text:style-name="P96">Que le fichier american_magic.html a disparu</text:p>
      <text:p text:style-name="Mon_5f_texte"/>
      <text:p text:style-name="Mon_5f_texte"><text:span text:style-name="T20">Mais pas de panique</text:span>, c’est normal puisque la version actuelle du projet se trouve sur la branche <text:span text:style-name="T76">main</text:span> et rassurez-vous la branche <text:span text:style-name="T76">magic</text:span> existe toujours !</text:p>
      <text:p text:style-name="Mon_5f_texte">Pour le constater, il suffit d’exécuter : <text:span text:style-name="T26">git status ; git branch ; git log --oneline</text:span></text:p>
      <text:p text:style-name="Mon_5f_texte"><draw:custom-shape text:anchor-type="char" draw:z-index="50" draw:name="Zone de texte 21" draw:style-name="gr58" draw:text-style-name="P1" svg:width="1.899cm" svg:height="1.281cm" svg:x="-2.053cm" svg:y="0.811cm"><text:p text:style-name="P91" loext:marker-style-name="T96">branche <text:span text:style-name="T76">ma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3" draw:name="Groupe 1032" draw:style-name="gr65"><draw:g draw:style-name="gr28"><draw:custom-shape draw:name="Connecteur droit avec flèche 54" draw:style-name="gr36" draw:text-style-name="P39" svg:width="0.003cm" svg:height="1.216cm" svg:x="9.168cm" svg:y="3.344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Zone de texte 55" draw:style-name="gr32" draw:text-style-name="P39" svg:width="1.428cm" svg:height="0.66cm" svg:x="8.454cm" svg:y="4.591cm"><text:p text:style-name="P3"><text:span text:style-name="T82">HE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Zone de texte 58" draw:style-name="gr32" draw:text-style-name="P39" svg:width="1.772cm" svg:height="0.837cm" svg:x="14.444cm" svg:y="4.655cm"><text:p text:style-name="P3" loext:marker-style-name="T81"><text:span text:style-name="T81">magi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98" draw:style-name="gr32" draw:text-style-name="P39" svg:width="2.14cm" svg:height="0.715cm" svg:x="11.352cm" svg:y="4.175cm"><text:p text:style-name="P3"><text:span text:style-name="T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99" draw:style-name="gr32" draw:text-style-name="P39" svg:width="2.14cm" svg:height="0.715cm" svg:x="14.252cm" svg:y="4.175cm"><text:p text:style-name="P3"><text:span text:style-name="T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8"><draw:custom-shape draw:name="Ellipse 301" draw:style-name="gr62" draw:text-style-name="P39" svg:width="1.347cm" svg:height="1.243cm" svg:x="14.62cm" svg:y="2.824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302" draw:style-name="gr61" draw:text-style-name="P39" svg:x1="13.066cm" svg:y1="3.432cm" svg:x2="14.598cm" svg:y2="3.433cm"><text:p/></draw:line><draw:g draw:style-name="gr28"><draw:g draw:style-name="gr28"><draw:custom-shape draw:name="Ellipse 305" draw:style-name="gr62" draw:text-style-name="P39" svg:width="1.348cm" svg:height="1.243cm" svg:x="11.74cm" svg:y="2.77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Forme libre : forme 306" draw:style-name="gr63" draw:text-style-name="P39" svg:width="1.883cm" svg:height="1.992cm" svg:x="9.863cm" svg:y="1.421cm"><text:p/><draw:enhanced-geometry draw:mirror-horizontal="false" draw:mirror-vertical="false" draw:glue-points="?f0 ?f1 ?f2 ?f3 ?f4 ?f5 ?f6 ?f7 ?f8 ?f9 ?f10 ?f11" drawooo:sub-view-size="678788 718057" draw:text-areas="0 0 ?f12 ?f13" svg:viewBox="0 0 0 0" draw:type="ooxml-non-primitive" draw:enhanced-path="M 0 0 C 96769 11220 193539 22440 269271 117807 345003 213174 386142 472160 454395 572202 522648 672244 678788 718057 678788 718057 L 678788 718057 678788 718057 N"><draw:equation draw:name="f0" draw:formula="0*logwidth/678788"/><draw:equation draw:name="f1" draw:formula="0*logheight/718057"/><draw:equation draw:name="f2" draw:formula="269271*logwidth/678788"/><draw:equation draw:name="f3" draw:formula="117807*logheight/718057"/><draw:equation draw:name="f4" draw:formula="454395*logwidth/678788"/><draw:equation draw:name="f5" draw:formula="572202*logheight/718057"/><draw:equation draw:name="f6" draw:formula="678788*logwidth/678788"/><draw:equation draw:name="f7" draw:formula="718057*logheight/718057"/><draw:equation draw:name="f8" draw:formula="678788*logwidth/678788"/><draw:equation draw:name="f9" draw:formula="718057*logheight/718057"/><draw:equation draw:name="f10" draw:formula="678788*logwidth/678788"/><draw:equation draw:name="f11" draw:formula="718057*logheight/718057"/><draw:equation draw:name="f12" draw:formula="logwidth"/><draw:equation draw:name="f13" draw:formula="logheight"/></draw:enhanced-geometry></draw:custom-shape></draw:g><draw:custom-shape draw:name="Zone de texte 307" draw:style-name="gr32" draw:text-style-name="P39" svg:width="2.142cm" svg:height="0.75cm" svg:x="8.099cm" svg:y="2.596cm"><text:p text:style-name="P3" loext:marker-style-name="T81"><text:span text:style-name="T81">ma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8"><draw:custom-shape draw:name="Zone de texte 309" draw:style-name="gr32" draw:text-style-name="P39" svg:width="2.142cm" svg:height="0.66cm" svg:x="5.919cm" svg:y="2.123cm"><text:p text:style-name="P3"><text:span text:style-name="T80">cde218e</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310" draw:style-name="gr32" draw:text-style-name="P39" svg:width="2.142cm" svg:height="0.66cm" svg:x="3.741cm" svg:y="2.123cm"><text:p text:style-name="P3"><text:span text:style-name="T80">540fcf1</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311" draw:style-name="gr32" draw:text-style-name="P39" svg:width="2.142cm" svg:height="0.66cm" svg:x="8.099cm" svg:y="2.123cm"><text:p text:style-name="P3"><text:span text:style-name="T80">6d2cf0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312" draw:style-name="gr32" draw:text-style-name="P39" svg:width="2.142cm" svg:height="0.66cm" svg:x="-0.676cm" svg:y="2.123cm"><text:p text:style-name="P3"><text:span text:style-name="T80">aeebab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313" draw:style-name="gr32" draw:text-style-name="P39" svg:width="2.14cm" svg:height="0.66cm" svg:x="1.522cm" svg:y="2.123cm"><text:p text:style-name="P3"><text:span text:style-name="T80">c1c5a05</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8"><draw:g draw:style-name="gr28"><draw:custom-shape draw:name="Ellipse 316" draw:style-name="gr34" draw:text-style-name="P68" svg:width="1.348cm" svg:height="1.243cm" svg:x="8.498cm" svg:y="0.79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317" draw:style-name="gr35" draw:text-style-name="P39" svg:x1="7.644cm" svg:y1="1.425cm" svg:x2="8.515cm" svg:y2="1.426cm"><text:p/></draw:line></draw:g><draw:g draw:style-name="gr28"><draw:custom-shape draw:name="Ellipse 319" draw:style-name="gr33" draw:text-style-name="P39" svg:width="1.348cm" svg:height="1.243cm" svg:x="6.298cm" svg:y="0.79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1024" draw:style-name="gr35" draw:text-style-name="P39" svg:x1="5.446cm" svg:y1="1.425cm" svg:x2="6.317cm" svg:y2="1.426cm"><text:p/></draw:line></draw:g><draw:custom-shape draw:name="Ellipse 1025" draw:style-name="gr33" draw:text-style-name="P39" svg:width="1.348cm" svg:height="1.243cm" svg:x="-0.297cm" svg:y="0.79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28"><draw:custom-shape draw:name="Ellipse 1027" draw:style-name="gr33" draw:text-style-name="P39" svg:width="1.348cm" svg:height="1.243cm" svg:x="1.901cm" svg:y="0.79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1028" draw:style-name="gr35" draw:text-style-name="P39" svg:x1="1.047cm" svg:y1="1.425cm" svg:x2="1.918cm" svg:y2="1.426cm"><text:p/></draw:line></draw:g><draw:g draw:style-name="gr28"><draw:custom-shape draw:name="Ellipse 1030" draw:style-name="gr33" draw:text-style-name="P39" svg:width="1.348cm" svg:height="1.243cm" svg:x="4.101cm" svg:y="0.79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1031" draw:style-name="gr35" draw:text-style-name="P39" svg:x1="3.247cm" svg:y1="1.425cm" svg:x2="4.118cm" svg:y2="1.426cm"><text:p/></draw:line></draw:g></draw:g></draw:g></draw:g></draw:g>Le schéma actuel est le suivant :</text:p>
      <text:p text:style-name="Mon_5f_texte"/>
      <text:p text:style-name="Mon_5f_texte"/>
      <text:p text:style-name="Mon_5f_texte"/>
      <text:p text:style-name="Mon_5f_texte"><draw:custom-shape text:anchor-type="char" draw:z-index="49" draw:name="Zone de texte 19" draw:style-name="gr49" draw:text-style-name="P1" svg:width="1.9cm" svg:height="1.281cm" svg:x="15.812cm" svg:y="0.18cm"><text:p text:style-name="P91" loext:marker-style-name="T96">branche <text:span text:style-name="T76">magi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on_5f_texte"/>
      <text:p text:style-name="Mon_5f_texte"/>
      <text:p text:style-name="P18"><text:soft-page-break/></text:p>
      <text:p text:style-name="P18"/>
      <text:p text:style-name="Mon_5f_texte">Maintenant, l’opération de fusion de la branche <text:span text:style-name="T76">magic</text:span> avec la branche <text:span text:style-name="T76">main</text:span> est réalisable, en exécutant : <text:s/><text:span text:style-name="T26">git merge magic</text:span></text:p>
      <text:p text:style-name="P18">Combien de fichiers du site web ont été impactés ? <text:s/>Est-ce correct ?</text:p>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merge magic</text:span><text:span text:style-name="T31"/></text:p>
      <text:p text:style-name="Standard" loext:marker-style-name="T31"><text:span text:style-name="T31">Updating d8b4385..1e9bceb</text:span><text:span text:style-name="T31"/></text:p>
      <text:p text:style-name="Standard" loext:marker-style-name="T31"><text:span text:style-name="T31">Fast-forward</text:span><text:span text:style-name="T31"/></text:p>
      <text:p text:style-name="Standard" loext:marker-style-name="T29"><text:span text:style-name="T31"><text:s/>challenger/american_magic.html | <text:s/>37 </text:span><text:span text:style-name="T29">+++++++++++++++++++++++++++++++++++++</text:span></text:p>
      <text:p text:style-name="Standard" loext:marker-style-name="T31"><text:span text:style-name="T31"><text:s/>images/AC75_Defiant.png <text:s text:c="7"/>| Bin </text:span><text:span text:style-name="T64">0 </text:span><text:span text:style-name="T31">-&gt; </text:span><text:span text:style-name="T29">111882 </text:span><text:span text:style-name="T31">bytes</text:span></text:p>
      <text:p text:style-name="Standard" loext:marker-style-name="T31"><text:span text:style-name="T31"><text:s/>images/american_magic.ico <text:s text:c="5"/>| Bin </text:span><text:span text:style-name="T64">0 </text:span><text:span text:style-name="T31">-&gt; </text:span><text:span text:style-name="T29">1150 </text:span><text:span text:style-name="T31">bytes</text:span></text:p>
      <text:p text:style-name="Standard" loext:marker-style-name="T31"><text:span text:style-name="T31"><text:s/>images/vAC75_Defiant.jpg <text:s text:c="6"/>| Bin </text:span><text:span text:style-name="T64">0 </text:span><text:span text:style-name="T31">-&gt; </text:span><text:span text:style-name="T29">16956 </text:span><text:span text:style-name="T31">bytes</text:span></text:p>
      <text:p text:style-name="Standard" loext:marker-style-name="T64"><text:span text:style-name="T31"><text:s/>index.html <text:s text:c="20"/>| <text:s text:c="2"/>3 </text:span><text:span text:style-name="T29">++</text:span><text:span text:style-name="T64">-</text:span></text:p>
      <text:p text:style-name="Standard" loext:marker-style-name="T31"><text:span text:style-name="T31"><text:s/>5 files changed, 39 insertions(+), 1 deletion(-)</text:span><text:span text:style-name="T31"/></text:p>
      <text:p text:style-name="Standard" loext:marker-style-name="T31"><text:span text:style-name="T31"><text:s/>create mode 100644 challenger/american_magic.html</text:span><text:span text:style-name="T31"/></text:p>
      <text:p text:style-name="Standard" loext:marker-style-name="T31"><text:span text:style-name="T31"><text:s/>create mode 100644 images/AC75_Defiant.png</text:span><text:span text:style-name="T31"/></text:p>
      <text:p text:style-name="Standard" loext:marker-style-name="T31"><text:span text:style-name="T31"><text:s/>create mode 100644 images/american_magic.ico</text:span><text:span text:style-name="T31"/></text:p>
      <text:p text:style-name="Standard" loext:marker-style-name="T31"><text:span text:style-name="T31"><text:s/>create mode 100644 images/vAC75_Defiant.jpg</text:span><text:span text:style-name="T31"/></text:p>
      <text:p text:style-name="Standard"/>
      <text:p text:style-name="P97">1 fichier ( deletion ) et 5 fichiers changées</text:p>
      <text:p text:style-name="Mon_5f_texte"/>
      <text:p text:style-name="Mon_5f_texte">Mettez à jour (F5) la page <text:span text:style-name="T20">index.html</text:span> dans le navigateur (ou réouvrez la si vous l’aviez fermée), accédez à la page web d’American Magic. Avec l’explorateur de fichiers Windows, placez-vous dans le dossier <text:span text:style-name="T20">Challenger</text:span>…</text:p>
      <text:p text:style-name="P18">Que constatez-vous ! <text:s text:c="8"/><text:span text:style-name="T20">It's a kind of Magic !</text:span></text:p>
      <text:p text:style-name="P98">On peut constater que au debut le fichier n’était pas present puis a apparus lors de l’actualisation de notre page web</text:p>
      <text:p text:style-name="Mon_5f_texte"/>
      <text:p text:style-name="Mon_5f_texte">Pour vous en convaincre, exécutez de nouveau : <text:span text:style-name="T26">git status ; git branch ; git log --oneline</text:span></text:p>
      <text:p text:style-name="Mon_5f_texte"><draw:custom-shape text:anchor-type="char" draw:z-index="51" draw:name="Zone de texte 24" draw:style-name="gr58" draw:text-style-name="P1" svg:width="1.899cm" svg:height="1.281cm" svg:x="-2.14cm" svg:y="0.82cm"><text:p text:style-name="P91" loext:marker-style-name="T96">branche <text:span text:style-name="T76">ma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4" draw:name="Groupe 1067" draw:style-name="gr7"><draw:custom-shape draw:name="Zone de texte 1033" draw:style-name="gr32" draw:text-style-name="P39" svg:width="2.14cm" svg:height="0.715cm" svg:x="11.22cm" svg:y="4.203cm"><text:p text:style-name="P3"><text:span text:style-name="T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8"><draw:g draw:style-name="gr28"><draw:custom-shape draw:name="Ellipse 1040" draw:style-name="gr62" draw:text-style-name="P39" svg:width="1.348cm" svg:height="1.243cm" svg:x="11.638cm" svg:y="2.803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Forme libre : forme 1041" draw:style-name="gr63" draw:text-style-name="P39" svg:width="1.883cm" svg:height="1.992cm" svg:x="9.761cm" svg:y="1.453cm"><text:p/><draw:enhanced-geometry draw:mirror-horizontal="false" draw:mirror-vertical="false" draw:glue-points="?f0 ?f1 ?f2 ?f3 ?f4 ?f5 ?f6 ?f7 ?f8 ?f9 ?f10 ?f11" drawooo:sub-view-size="678788 718057" draw:text-areas="0 0 ?f12 ?f13" svg:viewBox="0 0 0 0" draw:type="ooxml-non-primitive" draw:enhanced-path="M 0 0 C 96769 11220 193539 22440 269271 117807 345003 213174 386142 472160 454395 572202 522648 672244 678788 718057 678788 718057 L 678788 718057 678788 718057 N"><draw:equation draw:name="f0" draw:formula="0*logwidth/678788"/><draw:equation draw:name="f1" draw:formula="0*logheight/718057"/><draw:equation draw:name="f2" draw:formula="269271*logwidth/678788"/><draw:equation draw:name="f3" draw:formula="117807*logheight/718057"/><draw:equation draw:name="f4" draw:formula="454395*logwidth/678788"/><draw:equation draw:name="f5" draw:formula="572202*logheight/718057"/><draw:equation draw:name="f6" draw:formula="678788*logwidth/678788"/><draw:equation draw:name="f7" draw:formula="718057*logheight/718057"/><draw:equation draw:name="f8" draw:formula="678788*logwidth/678788"/><draw:equation draw:name="f9" draw:formula="718057*logheight/718057"/><draw:equation draw:name="f10" draw:formula="678788*logwidth/678788"/><draw:equation draw:name="f11" draw:formula="718057*logheight/718057"/><draw:equation draw:name="f12" draw:formula="logwidth"/><draw:equation draw:name="f13" draw:formula="logheight"/></draw:enhanced-geometry></draw:custom-shape></draw:g><draw:g draw:style-name="gr28"><draw:custom-shape draw:name="Zone de texte 1044" draw:style-name="gr32" draw:text-style-name="P39" svg:width="2.142cm" svg:height="0.66cm" svg:x="5.819cm" svg:y="2.155cm"><text:p text:style-name="P3"><text:span text:style-name="T80">cde218e</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045" draw:style-name="gr32" draw:text-style-name="P39" svg:width="2.142cm" svg:height="0.66cm" svg:x="3.639cm" svg:y="2.155cm"><text:p text:style-name="P3"><text:span text:style-name="T80">540fcf1</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046" draw:style-name="gr32" draw:text-style-name="P39" svg:width="2.142cm" svg:height="0.66cm" svg:x="7.997cm" svg:y="2.155cm"><text:p text:style-name="P3"><text:span text:style-name="T80">6d2cf0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047" draw:style-name="gr32" draw:text-style-name="P39" svg:width="2.142cm" svg:height="0.66cm" svg:x="-0.778cm" svg:y="2.155cm"><text:p text:style-name="P3"><text:span text:style-name="T80">aeebab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048" draw:style-name="gr32" draw:text-style-name="P39" svg:width="2.14cm" svg:height="0.66cm" svg:x="1.42cm" svg:y="2.155cm"><text:p text:style-name="P3"><text:span text:style-name="T80">c1c5a05</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8"><draw:g draw:style-name="gr28"><draw:custom-shape draw:name="Ellipse 1051" draw:style-name="gr33" draw:text-style-name="P39" svg:width="1.348cm" svg:height="1.243cm" svg:x="8.396cm" svg:y="0.82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1052" draw:style-name="gr35" draw:text-style-name="P39" svg:x1="7.543cm" svg:y1="1.457cm" svg:x2="8.414cm" svg:y2="1.458cm"><text:p/></draw:line></draw:g><draw:g draw:style-name="gr28"><draw:custom-shape draw:name="Ellipse 1054" draw:style-name="gr33" draw:text-style-name="P39" svg:width="1.348cm" svg:height="1.243cm" svg:x="6.196cm" svg:y="0.82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1055" draw:style-name="gr35" draw:text-style-name="P39" svg:x1="5.343cm" svg:y1="1.457cm" svg:x2="6.214cm" svg:y2="1.458cm"><text:p/></draw:line></draw:g><draw:custom-shape draw:name="Ellipse 1056" draw:style-name="gr33" draw:text-style-name="P39" svg:width="1.348cm" svg:height="1.243cm" svg:x="-0.399cm" svg:y="0.82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28"><draw:custom-shape draw:name="Ellipse 1058" draw:style-name="gr33" draw:text-style-name="P39" svg:width="1.348cm" svg:height="1.243cm" svg:x="1.799cm" svg:y="0.82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1059" draw:style-name="gr35" draw:text-style-name="P39" svg:x1="0.946cm" svg:y1="1.457cm" svg:x2="1.817cm" svg:y2="1.458cm"><text:p/></draw:line></draw:g><draw:g draw:style-name="gr28"><draw:custom-shape draw:name="Ellipse 1061" draw:style-name="gr33" draw:text-style-name="P39" svg:width="1.348cm" svg:height="1.243cm" svg:x="3.999cm" svg:y="0.82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1062" draw:style-name="gr35" draw:text-style-name="P39" svg:x1="3.145cm" svg:y1="1.457cm" svg:x2="4.016cm" svg:y2="1.458cm"><text:p/></draw:line></draw:g></draw:g></draw:g><draw:custom-shape draw:name="Zone de texte 1063" draw:style-name="gr32" draw:text-style-name="P39" svg:width="2.14cm" svg:height="0.715cm" svg:x="14.594cm" svg:y="2.155cm"><text:p text:style-name="P3"><text:span text:style-name="T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necteur droit 1064" draw:style-name="gr35" draw:text-style-name="P6" svg:x1="9.742cm" svg:y1="1.457cm" svg:x2="14.91cm" svg:y2="1.458cm"><text:p/></draw:line><draw:custom-shape draw:name="Ellipse 1065" draw:style-name="gr34" draw:text-style-name="P71" svg:width="1.347cm" svg:height="1.241cm" svg:x="14.936cm" svg:y="0.82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Forme libre : forme 1066" draw:style-name="gr63" draw:text-style-name="P6" svg:width="1.945cm" svg:height="1.943cm" svg:x="12.964cm" svg:y="1.446cm"><text:p/><draw:enhanced-geometry draw:mirror-horizontal="false" draw:mirror-vertical="false" draw:glue-points="?f0 ?f1 ?f2 ?f3 ?f4 ?f5 ?f6 ?f7 ?f8 ?f9" drawooo:sub-view-size="590550 692658" draw:text-areas="0 0 ?f10 ?f11" svg:viewBox="0 0 0 0" draw:type="ooxml-non-primitive" draw:enhanced-path="M 0 692150 C 56621 693737 113242 695325 165100 635000 216958 574675 269875 420158 311150 330200 352425 240242 366183 150283 412750 95250 459317 40217 524933 20108 590550 0 N"><draw:equation draw:name="f0" draw:formula="0*logwidth/590550"/><draw:equation draw:name="f1" draw:formula="692150*logheight/692658"/><draw:equation draw:name="f2" draw:formula="165100*logwidth/590550"/><draw:equation draw:name="f3" draw:formula="635000*logheight/692658"/><draw:equation draw:name="f4" draw:formula="311150*logwidth/590550"/><draw:equation draw:name="f5" draw:formula="330200*logheight/692658"/><draw:equation draw:name="f6" draw:formula="412750*logwidth/590550"/><draw:equation draw:name="f7" draw:formula="95250*logheight/692658"/><draw:equation draw:name="f8" draw:formula="590550*logwidth/590550"/><draw:equation draw:name="f9" draw:formula="0*logheight/692658"/><draw:equation draw:name="f10" draw:formula="logwidth"/><draw:equation draw:name="f11" draw:formula="logheight"/></draw:enhanced-geometry></draw:custom-shape></draw:g>Mettez à jour par le schéma suivant :</text:p>
      <text:p text:style-name="Mon_5f_texte"/>
      <text:p text:style-name="Mon_5f_texte"/>
      <text:p text:style-name="Mon_5f_texte"/>
      <text:p text:style-name="Mon_5f_texte"/>
      <text:p text:style-name="P18"><draw:g text:anchor-type="char" draw:z-index="33" draw:name="Groupe 166" draw:style-name="gr55"><draw:custom-shape draw:name="Connecteur droit avec flèche 167" draw:style-name="gr41" draw:text-style-name="P6" svg:width="0.003cm" svg:height="1.216cm" svg:x="4.388cm" svg:y="0.536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Zone de texte 168" draw:style-name="gr42" draw:text-style-name="P39" svg:width="1.43cm" svg:height="0.66cm" svg:x="3.672cm" svg:y="1.783cm"><text:p text:style-name="P3"><text:span text:style-name="T82">HE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8"><draw:custom-shape text:anchor-type="char" draw:z-index="35" draw:name="Zone de texte 176" draw:style-name="gr64" draw:text-style-name="P1" svg:width="1.773cm" svg:height="0.84cm" svg:x="5.114cm" svg:y="0.413cm"><text:p text:style-name="P91" loext:marker-style-name="T81"><text:span text:style-name="T81">ma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Eléments à placer : </text:p>
      <text:p text:style-name="Mon_5f_texte"><draw:custom-shape text:anchor-type="char" draw:z-index="34" draw:name="Zone de texte 170" draw:style-name="gr64" draw:text-style-name="P1" svg:width="1.773cm" svg:height="0.84cm" svg:x="5.106cm" svg:y="0.439cm"><text:p text:style-name="P91" loext:marker-style-name="T81"><text:span text:style-name="T81">magi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18"/>
      <text:p text:style-name="P18">En analysant le résultat des dernières commandes, n’y a-t-il pas un conseil qu’il faudrait suivre ? <text:s/></text:p>
      <text:p text:style-name="P99">Qu’il faut faire attention avec l’identifiant et l’evolution dans le temps en cas de modifcation a effectuer</text:p>
      <text:p text:style-name="P99"/>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status</text:span><text:span text:style-name="T31"/></text:p>
      <text:p text:style-name="Standard" loext:marker-style-name="T31"><text:span text:style-name="T31">On branch main</text:span><text:span text:style-name="T31"/></text:p>
      <text:p text:style-name="Standard" loext:marker-style-name="T31"><text:soft-page-break/><text:span text:style-name="T31">Your branch is ahead of 'origin/main' by 2 commits.</text:span><text:span text:style-name="T31"/></text:p>
      <text:p text:style-name="Standard" loext:marker-style-name="T31"><text:span text:style-name="T31"><text:s text:c="2"/>(use "git push" to publish your local commits)</text:span><text:span text:style-name="T31"/></text:p>
      <text:p text:style-name="P36" loext:marker-style-name="T31"/>
      <text:p text:style-name="Standard" loext:marker-style-name="T31"><text:span text:style-name="T31">nothing to commit, working tree clean</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branch</text:span><text:span text:style-name="T31"/></text:p>
      <text:p text:style-name="Standard" loext:marker-style-name="T31"><text:span text:style-name="T31"><text:s text:c="2"/>magic</text:span><text:span text:style-name="T31"/></text:p>
      <text:p text:style-name="Standard" loext:marker-style-name="T29"><text:span text:style-name="T31">* </text:span><text:span text:style-name="T29">main</text:span></text:p>
      <text:p text:style-name="P86" loext:marker-style-name="T29"/>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log --oneline</text:span><text:span text:style-name="T31"/></text:p>
      <text:p text:style-name="Standard" loext:marker-style-name="T37"><text:span text:style-name="T28">1e9bceb (</text:span><text:span text:style-name="T49">HEAD</text:span><text:span text:style-name="T48"> -&gt; </text:span><text:span text:style-name="T50">main</text:span><text:span text:style-name="T48">, </text:span><text:span text:style-name="T50">magic</text:span><text:span text:style-name="T48">) </text:span><text:span text:style-name="T37">Ajout hyperlien vers American Magic</text:span></text:p>
      <text:p text:style-name="Standard" loext:marker-style-name="T37"><text:span text:style-name="T48">8c2c3a8 </text:span><text:span text:style-name="T37">Ajout des images et page web American MAgic</text:span></text:p>
      <text:p text:style-name="Standard" loext:marker-style-name="T37"><text:span text:style-name="T48">d8b4385 (</text:span><text:span text:style-name="T55">origin/main</text:span><text:span text:style-name="T48">, </text:span><text:span text:style-name="T55">origin/HEAD</text:span><text:span text:style-name="T48">) </text:span><text:span text:style-name="T37">Retour à la feuille de style d'origine</text:span></text:p>
      <text:p text:style-name="Standard" loext:marker-style-name="T37"><text:span text:style-name="T48">9473c40 </text:span><text:span text:style-name="T37">Deuxièeme version du projet</text:span></text:p>
      <text:p text:style-name="Standard" loext:marker-style-name="T37"><text:span text:style-name="T48">4832b8f </text:span><text:span text:style-name="T37">Create README.md</text:span></text:p>
      <text:p text:style-name="Standard" loext:marker-style-name="T37"><text:span text:style-name="T48">a3c9c99 </text:span><text:span text:style-name="T37">Première version du projet</text:span></text:p>
      <text:p text:style-name="P100"/>
      <text:p text:style-name="Mon_5f_texte"/>
      <text:p text:style-name="Mon_5f_texte">Et oui, il ne reste plus qu’à mettre à jour le dépôt distant pour que tout soit à jour. Réalisez cette opération et vérifiez que le dépôt distant est bien à jour.</text:p>
      <text:p text:style-name="Mon_5f_texte"/>
      <text:p text:style-name="P18">Reportez la (ou les) commande(s) utilisée(s) :</text:p>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add .</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status</text:span><text:span text:style-name="T31"/></text:p>
      <text:p text:style-name="Standard" loext:marker-style-name="T31"><text:span text:style-name="T31">On branch main</text:span><text:span text:style-name="T31"/></text:p>
      <text:p text:style-name="Standard" loext:marker-style-name="T31"><text:span text:style-name="T31">Your branch is ahead of 'origin/main' by 2 commits.</text:span><text:span text:style-name="T31"/></text:p>
      <text:p text:style-name="Standard" loext:marker-style-name="T31"><text:span text:style-name="T31"><text:s text:c="2"/>(use "git push" to publish your local commits)</text:span><text:span text:style-name="T31"/></text:p>
      <text:p text:style-name="P36" loext:marker-style-name="T31"/>
      <text:p text:style-name="Standard" loext:marker-style-name="T31"><text:span text:style-name="T31">nothing to commit, working tree clean</text:span><text:span text:style-name="T31"/></text:p>
      <text:p text:style-name="Standard"/>
      <text:p text:style-name="Mon_5f_texte"/>
      <text:p text:style-name="Mon_5f_texte" loext:marker-style-name="T26">Exécutez un dernière fois : <text:s/><text:span text:style-name="T26">git status ; git branch ; git log –oneline</text:span><text:span text:style-name="T26"/></text:p>
      <text:p text:style-name="P18">Que constatez-vous ? <text:s/>Où se trouve le pointeur <text:span text:style-name="T97">origin/main</text:span> ?</text:p>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log --oneline</text:span><text:span text:style-name="T31"/></text:p>
      <text:p text:style-name="Standard" loext:marker-style-name="T37"><text:span text:style-name="T28">1e9bceb (</text:span><text:span text:style-name="T49">HEAD</text:span><text:span text:style-name="T48"> -&gt; </text:span><text:span text:style-name="T50">main</text:span><text:span text:style-name="T48">, </text:span><text:span text:style-name="T50">magic</text:span><text:span text:style-name="T48">) </text:span><text:span text:style-name="T37">Ajout hyperlien vers American Magic</text:span></text:p>
      <text:p text:style-name="Standard" loext:marker-style-name="T37"><text:span text:style-name="T48">8c2c3a8 </text:span><text:span text:style-name="T37">Ajout des images et page web American MAgic</text:span></text:p>
      <text:p text:style-name="Standard" loext:marker-style-name="T37"><text:span text:style-name="T48">d8b4385 (</text:span><text:span text:style-name="T55">origin/main</text:span><text:span text:style-name="T48">, </text:span><text:span text:style-name="T55">origin/HEAD</text:span><text:span text:style-name="T48">) </text:span><text:span text:style-name="T37">Retour à la feuille de style d'origine</text:span></text:p>
      <text:p text:style-name="Standard" loext:marker-style-name="T37"><text:span text:style-name="T48">9473c40 </text:span><text:span text:style-name="T37">Deuxièeme version du projet</text:span></text:p>
      <text:p text:style-name="Standard" loext:marker-style-name="T37"><text:span text:style-name="T48">4832b8f </text:span><text:span text:style-name="T37">Create README.md</text:span></text:p>
      <text:p text:style-name="Standard" loext:marker-style-name="T37"><text:span text:style-name="T48">a3c9c99 </text:span><text:span text:style-name="T37">Première version du projet</text:span></text:p>
      <text:p text:style-name="P101"/>
      <text:p text:style-name="P102">Il se trouve a l’identifiant : d8b4385</text:p>
      <text:p text:style-name="Réponse"/>
      <text:p text:style-name="P18"/>
      <text:p text:style-name="Mon_5f_texte">Dans cette partie de TP, vous avez vu :</text:p>
      <text:list xml:id="list181001446957685" text:continue-numbering="true" text:style-name="WWNum4">
        <text:list-item>
          <text:p text:style-name="P17">qu’une branche peut être considérée comme une “copie” d’un projet sur laquelle on peut opérer des modifications sans crainte pour le projet stable</text:p>
        </text:list-item>
        <text:list-item>
          <text:p text:style-name="P17">que la branche (<text:span text:style-name="T20">main</text:span> ou <text:span text:style-name="T93">master</text:span> avant 2020) est la branche principale d’un projet</text:p>
        </text:list-item>
        <text:list-item>
          <text:p text:style-name="P17">que la commande <text:span text:style-name="T26">git checkout</text:span> permet de basculer d’une branche à une autre</text:p>
        </text:list-item>
        <text:list-item>
          <text:p text:style-name="P17">que la commande <text:span text:style-name="T26">git merge </text:span>permet de fusionner deux branches</text:p>
        </text:list-item>
      </text:list>
      <text:p text:style-name="P19" loext:marker-style-name="T22"/>
      <text:p text:style-name="P47"/>
      <text:h text:style-name="P21" text:outline-level="2"><text:bookmark-start text:name="_Toc166434106"/>Gestion et visualisation avancées des branches<text:bookmark-end text:name="_Toc166434106"/></text:h>
      <text:p text:style-name="Standard"/>
      <text:p text:style-name="Mon_5f_texte">La partie précédente vous a permis d’exploiter les branches d’une manière locale. Nous allons voit maintenant la gestion en locale et sur le dépôt distant GitHub des branches.</text:p>
      <text:p text:style-name="Standard"/>
      <text:p text:style-name="P103">A partir de votre 'repository' <text:span text:style-name="T20">ACwebProjet</text:span> sous GitHub, affichez la frise temporelle (<text:span text:style-name="T98">Insights</text:span> / <text:span text:style-name="T98">Network</text:span>) actuelle. Vous devriez obtenir une frise semblable à celle-ci (à remplacer par la vôtre !) :</text:p>
      <text:p text:style-name="P103"><draw:frame draw:style-name="fr3" draw:name="Image 38" text:anchor-type="char" svg:x="2.267cm" svg:y="0.374cm" svg:width="16.999cm" svg:height="6.86cm" draw:z-index="149"><draw:image xlink:href="Pictures/10000000000005C0000002523334F2C9.png" xlink:type="simple" xlink:show="embed" xlink:actuate="onLoad" draw: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Standard"/>
      <text:p text:style-name="Standard"/>
      <text:p text:style-name="Standard"><draw:frame draw:style-name="fr4" draw:name="Image2" text:anchor-type="char" svg:width="16cm" svg:height="7.02cm" draw:z-index="157"><draw:image xlink:href="Pictures/10000001000003AB0000019CA62D7F49.png" xlink:type="simple" xlink:show="embed" xlink:actuate="onLoad" draw:mime-type="image/png"/></draw:frame></text:p>
      <text:p text:style-name="Standard"/>
      <text:p text:style-name="Mon_5f_texte">Commencez par créer localement une branche de développement, appelée <text:span text:style-name="T20">DevBranch</text:span>.</text:p>
      <text:p text:style-name="P18">Reportez la commande utilisée :</text:p>
      <text:p text:style-name="P104"><text:span text:style-name="T99"><text:s/>git branch DevBranch</text:span></text:p>
      <text:p text:style-name="Standard"/>
      <text:p text:style-name="Mon_5f_texte">Restez sur la branche <text:span text:style-name="T76">main</text:span> et modifiez la page <text:span text:style-name="T20">american_magic.html</text:span> (vous pouvez le faire sous Windows avec Notepad++ ou sous la console Git Bash avec l’éditeur nano) comme suit :</text:p>
      <text:p text:style-name="P105" loext:marker-style-name="T100"><text:span text:style-name="T98">&lt;title&gt;American Magic&lt;/title&gt;</text:span><text:span text:style-name="T100"> &lt;!-- Branche main --&gt;</text:span></text:p>
      <text:p text:style-name="Standard"/>
      <text:p text:style-name="Mon_5f_texte"><text:soft-page-break/>Indexez vos fichiers, vérifiez <text:span text:style-name="hgkelc">l'état du répertoire de travail et de </text:span>la zone d’index.</text:p>
      <text:p text:style-name="P18">Reportez les commandes <text:span text:style-name="T26">git</text:span> utilisées et les résultats obtenus :</text:p>
      <text:p text:style-name="Réponse"/>
      <text:p text:style-name="P106">commande : git add .</text:p>
      <text:p text:style-name="P106"/>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status</text:span><text:span text:style-name="T31"/></text:p>
      <text:p text:style-name="Standard" loext:marker-style-name="T31"><text:span text:style-name="T31">On branch main</text:span><text:span text:style-name="T31"/></text:p>
      <text:p text:style-name="Standard" loext:marker-style-name="T31"><text:span text:style-name="T31">Your branch is ahead of 'origin/main' by 2 commits.</text:span><text:span text:style-name="T31"/></text:p>
      <text:p text:style-name="Standard" loext:marker-style-name="T31"><text:span text:style-name="T31"><text:s text:c="2"/>(use "git push" to publish your local commits)</text:span><text:span text:style-name="T31"/></text:p>
      <text:p text:style-name="P36" loext:marker-style-name="T31"/>
      <text:p text:style-name="Standard" loext:marker-style-name="T31"><text:span text:style-name="T31">Changes to be committed:</text:span><text:span text:style-name="T31"/></text:p>
      <text:p text:style-name="Standard" loext:marker-style-name="T31"><text:span text:style-name="T31"><text:s text:c="2"/>(use "git restore --staged &lt;file&gt;..." to unstage)</text:span><text:span text:style-name="T31"/></text:p>
      <text:p text:style-name="P107"><text:span text:style-name="T31"><text:s text:c="8"/></text:span><text:span text:style-name="T29">modified: <text:s text:c="2"/>challenger/american_magic.html</text:span></text:p>
      <text:p text:style-name="Standard"/>
      <text:p text:style-name="Mon_5f_texte" loext:marker-style-name="T26">Exécutez la commande : <text:s/><text:span text:style-name="T26">git log –oneline</text:span><text:span text:style-name="T26"/></text:p>
      <text:p text:style-name="P18">Est-ce que tout vous semble correct ? </text:p>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log --oneline</text:span><text:span text:style-name="T31"/></text:p>
      <text:p text:style-name="Standard" loext:marker-style-name="T37"><text:span text:style-name="T28">1e9bceb (</text:span><text:span text:style-name="T49">HEAD</text:span><text:span text:style-name="T48"> -&gt; </text:span><text:span text:style-name="T50">main</text:span><text:span text:style-name="T48">, </text:span><text:span text:style-name="T50">magic</text:span><text:span text:style-name="T48">, </text:span><text:span text:style-name="T50">DevBranch</text:span><text:span text:style-name="T48">) </text:span><text:span text:style-name="T37">Ajout hyperlien vers American Magic</text:span></text:p>
      <text:p text:style-name="Standard" loext:marker-style-name="T37"><text:span text:style-name="T48">8c2c3a8 </text:span><text:span text:style-name="T37">Ajout des images et page web American MAgic</text:span></text:p>
      <text:p text:style-name="Standard" loext:marker-style-name="T37"><text:span text:style-name="T48">d8b4385 (</text:span><text:span text:style-name="T55">origin/main</text:span><text:span text:style-name="T48">, </text:span><text:span text:style-name="T55">origin/HEAD</text:span><text:span text:style-name="T48">) </text:span><text:span text:style-name="T37">Retour à la feuille de style d'origine</text:span></text:p>
      <text:p text:style-name="Standard" loext:marker-style-name="T37"><text:span text:style-name="T48">9473c40 </text:span><text:span text:style-name="T37">Deuxièeme version du projet</text:span></text:p>
      <text:p text:style-name="Standard" loext:marker-style-name="T37"><text:span text:style-name="T48">4832b8f </text:span><text:span text:style-name="T37">Create README.md</text:span></text:p>
      <text:p text:style-name="Standard" loext:marker-style-name="T37"><text:span text:style-name="T48">a3c9c99 </text:span><text:span text:style-name="T37">Première version du projet</text:span></text:p>
      <text:p text:style-name="Mon_5f_texte"/>
      <text:p text:style-name="Mon_5f_texte">Si oui, exécutez la commande :</text:p>
      <text:p text:style-name="P40"><text:span text:style-name="T26">git commit -m "American Magic Branche main" <text:s text:c="4"/></text:span></text:p>
      <text:p text:style-name="Standard"/>
      <text:p text:style-name="Mon_5f_texte">Exécutez de nouveau <text:span text:style-name="T26">git status</text:span> et si tout est correct exécutez <text:span text:style-name="T26">git branch ; git log --oneline</text:span></text:p>
      <text:p text:style-name="P18">Reportez et interprétez l’affichage produit : </text:p>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commit -m "American Magic Branche main"</text:span><text:span text:style-name="T31"/></text:p>
      <text:p text:style-name="Standard" loext:marker-style-name="T31"><text:span text:style-name="T31">[main be0c1e1] American Magic Branche main</text:span><text:span text:style-name="T31"/></text:p>
      <text:p text:style-name="Standard" loext:marker-style-name="T31"><text:span text:style-name="T31"><text:s/>1 file changed, 1 insertion(+), 1 deletion(-)</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status</text:span><text:span text:style-name="T31"/></text:p>
      <text:p text:style-name="Standard" loext:marker-style-name="T31"><text:span text:style-name="T31">On branch main</text:span><text:span text:style-name="T31"/></text:p>
      <text:p text:style-name="Standard" loext:marker-style-name="T31"><text:span text:style-name="T31">Your branch is ahead of 'origin/main' by 3 commits.</text:span><text:span text:style-name="T31"/></text:p>
      <text:p text:style-name="Standard" loext:marker-style-name="T31"><text:span text:style-name="T31"><text:s text:c="2"/>(use "git push" to publish your local commits)</text:span><text:span text:style-name="T31"/></text:p>
      <text:p text:style-name="P36" loext:marker-style-name="T31"/>
      <text:p text:style-name="Standard" loext:marker-style-name="T31"><text:span text:style-name="T31">nothing to commit, working tree clean</text:span><text:span text:style-name="T31"/></text:p>
      <text:p text:style-name="P36" loext:marker-style-name="T31"/>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branch</text:span><text:span text:style-name="T31"/></text:p>
      <text:p text:style-name="Standard" loext:marker-style-name="T31"><text:span text:style-name="T31"><text:s text:c="2"/>DevBranch</text:span><text:span text:style-name="T31"/></text:p>
      <text:p text:style-name="Standard" loext:marker-style-name="T31"><text:span text:style-name="T31"><text:s text:c="2"/>magic</text:span><text:span text:style-name="T31"/></text:p>
      <text:p text:style-name="Standard" loext:marker-style-name="T29"><text:span text:style-name="T31">* </text:span><text:span text:style-name="T29">main</text:span></text:p>
      <text:p text:style-name="Standard" loext:marker-style-name="T31"><text:span text:style-name="T31">ggigit</text:span><text:span text:style-name="T31"/></text:p>
      <text:p text:style-name="Standard" loext:marker-style-name="T39"><text:span text:style-name="T29">michael.gassant@RT-E208-PC14 </text:span><text:span text:style-name="T30">MINGW64 </text:span><text:span text:style-name="T28">/c/users/michael.gassant/Desktop/36th_americas_cup</text:span><text:span text:style-name="T39"> (main)</text:span></text:p>
      <text:p text:style-name="Standard" loext:marker-style-name="T31"><text:span text:style-name="T31">$ git log --oneline</text:span><text:span text:style-name="T31"/></text:p>
      <text:p text:style-name="Standard" loext:marker-style-name="T37"><text:span text:style-name="T28">be0c1e1 (</text:span><text:span text:style-name="T49">HEAD</text:span><text:span text:style-name="T48"> -&gt; </text:span><text:span text:style-name="T50">main</text:span><text:span text:style-name="T48">) </text:span><text:span text:style-name="T37">American Magic Branche main</text:span></text:p>
      <text:p text:style-name="Standard" loext:marker-style-name="T37"><text:span text:style-name="T48">1e9bceb (</text:span><text:span text:style-name="T50">magic</text:span><text:span text:style-name="T48">, </text:span><text:span text:style-name="T50">DevBranch</text:span><text:span text:style-name="T48">) </text:span><text:span text:style-name="T37">Ajout hyperlien vers American Magic</text:span></text:p>
      <text:p text:style-name="Standard" loext:marker-style-name="T37"><text:span text:style-name="T48">8c2c3a8 </text:span><text:span text:style-name="T37">Ajout des images et page web American MAgic</text:span></text:p>
      <text:p text:style-name="Standard" loext:marker-style-name="T37"><text:span text:style-name="T48">d8b4385 (</text:span><text:span text:style-name="T55">origin/main</text:span><text:span text:style-name="T48">, </text:span><text:span text:style-name="T55">origin/HEAD</text:span><text:span text:style-name="T48">) </text:span><text:span text:style-name="T37">Retour à la feuille de style d'origine</text:span></text:p>
      <text:p text:style-name="Standard" loext:marker-style-name="T37"><text:span text:style-name="T48">9473c40 </text:span><text:span text:style-name="T37">Deuxièeme version du projet</text:span></text:p>
      <text:p text:style-name="Standard" loext:marker-style-name="T37"><text:span text:style-name="T48">4832b8f </text:span><text:span text:style-name="T37">Create README.md</text:span></text:p>
      <text:p text:style-name="Standard" loext:marker-style-name="T37"><text:span text:style-name="T48">a3c9c99 </text:span><text:span text:style-name="T37">Première version du projet</text:span></text:p>
      <text:p text:style-name="Standard"/>
      <text:p text:style-name="P108" loext:marker-style-name="T22"/>
      <text:p text:style-name="Mon_5f_texte"><text:soft-page-break/>Enfin envoyez la version actuelle de dépôt local sur le dépôt distant, en utilisant la commande :</text:p>
      <text:p text:style-name="Mon_5f_texte"><text:span text:style-name="T26">git <text:s/>push <text:s/>-u <text:s/>origin <text:s/></text:span><text:span text:style-name="T101">main</text:span></text:p>
      <text:p text:style-name="Standard"/>
      <text:p text:style-name="P18">Suite à cette commande, exécutez <text:span text:style-name="T26">git status ; git log --oneline</text:span> et interprétez l’affichage produit : </text:p>
      <text:p text:style-name="Réponse"/>
      <text:p text:style-name="Standard"/>
      <text:p text:style-name="Mon_5f_texte">Basculez sur la branche <text:span text:style-name="T76">DevBranch</text:span> et modifiez la page <text:span text:style-name="T20">american_magic.html</text:span> (vous pouvez le faire sous Windows avec Notepad++ ou sous la console Git Bash avec l’éditeur nano) comme suit :</text:p>
      <text:p text:style-name="P105" loext:marker-style-name="T100"><text:span text:style-name="T98">&lt;title&gt;American Magic&lt;/title&gt;</text:span><text:span text:style-name="T100"> &lt;!-- Branche DevBranch --&gt;</text:span></text:p>
      <text:p text:style-name="Standard"/>
      <text:p text:style-name="Mon_5f_texte">Indexez vos fichiers, vérifiez <text:span text:style-name="hgkelc">l'état du répertoire de travail et de </text:span>la zone d’index.</text:p>
      <text:p text:style-name="P18">Reportez les 3 commandes <text:span text:style-name="T26">git</text:span> utilisées et les résultats obtenus :</text:p>
      <text:p text:style-name="Réponse"/>
      <text:p text:style-name="Réponse"/>
      <text:p text:style-name="Réponse"/>
      <text:p text:style-name="Réponse"/>
      <text:p text:style-name="Standard"/>
      <text:p text:style-name="Mon_5f_texte" loext:marker-style-name="T26">Exécutez la commande : <text:s/><text:span text:style-name="T26">git log --oneline</text:span><text:span text:style-name="T26"/></text:p>
      <text:p text:style-name="P18">Est-ce que tout vous semble correct ? </text:p>
      <text:p text:style-name="Réponse"/>
      <text:p text:style-name="Réponse"/>
      <text:p text:style-name="Standard"/>
      <text:p text:style-name="Mon_5f_texte">Si oui, exécutez la commande :</text:p>
      <text:p text:style-name="P40"><text:span text:style-name="T26">git commit -m "American Magic Branche DevBranch" <text:s text:c="4"/></text:span></text:p>
      <text:p text:style-name="Mon_5f_texte"/>
      <text:p text:style-name="Mon_5f_texte">Exécutez de nouveau <text:span text:style-name="T26">git status</text:span> et si tout est correct exécutez <text:span text:style-name="T26">git branch ; git log --oneline</text:span></text:p>
      <text:p text:style-name="P18">Interprétez l’affichage produit : </text:p>
      <text:p text:style-name="Réponse"/>
      <text:p text:style-name="Réponse"/>
      <text:p text:style-name="Réponse"/>
      <text:p text:style-name="Réponse"/>
      <text:p text:style-name="Réponse"/>
      <text:p text:style-name="Réponse"/>
      <text:p text:style-name="P19" loext:marker-style-name="T22"/>
      <text:p text:style-name="Mon_5f_texte">Enfin envoyez la version actuelle de dépôt local sur le dépôt distant (branche <text:span text:style-name="T76">DevBranch</text:span>), en utilisant la commande :</text:p>
      <text:p text:style-name="Mon_5f_texte"><text:span text:style-name="T26">git <text:s/>push <text:s/>-u <text:s/>origin <text:s/></text:span><text:span text:style-name="T101">DevBranch</text:span></text:p>
      <text:p text:style-name="Standard"/>
      <text:p text:style-name="P18">Reportez et interprétez l’affichage produit : </text:p>
      <text:p text:style-name="Réponse"/>
      <text:p text:style-name="Réponse"><text:soft-page-break/></text:p>
      <text:p text:style-name="Réponse"/>
      <text:p text:style-name="Réponse"/>
      <text:p text:style-name="Réponse"/>
      <text:p text:style-name="Réponse"/>
      <text:p text:style-name="Standard"/>
      <text:p text:style-name="P103">A partir de votre 'repository' <text:span text:style-name="T20">ACwebProjet</text:span> sous GitHub, affichez la frise temporelle (<text:span text:style-name="T98">Insights</text:span> / <text:span text:style-name="T98">Network</text:span>) actuelle. Vous devriez obtenir une frise semblable à celle-ci (à remplacer par la vôtre !) :</text:p>
      <text:p text:style-name="P103"><draw:frame draw:style-name="fr5" draw:name="Image 42" text:anchor-type="char" svg:x="-0.75cm" svg:y="0.296cm" svg:width="16.999cm" svg:height="6.149cm" draw:z-index="150"><draw:image xlink:href="Pictures/10000000000005BF00000215027F1F75.png" xlink:type="simple" xlink:show="embed" xlink:actuate="onLoad" draw: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Cliquez sur le nœud présent sur la branche <text:span text:style-name="T101">DevBranch</text:span> ! </text:p>
      <text:p text:style-name="P18">Reportez et interprétez l’affichage produit : </text:p>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P103"/>
      <text:p text:style-name="P103"/>
      <text:p text:style-name="P103"><text:soft-page-break/>Vous pourriez continuer votre développement du site web alternatif sur cette branche tout en laissant la branche principale dans son état actuel. Mais vous souhaitez pour le moment y mettre fin, tant localement que sur le dépôt distant GitHub !</text:p>
      <text:p text:style-name="Standard"/>
      <text:p text:style-name="Mon_5f_texte">Commencez par basculez sur la branche <text:span text:style-name="T76">main</text:span>.</text:p>
      <text:p text:style-name="P18">Reportez la commande utilisée :</text:p>
      <text:p text:style-name="Réponse"/>
      <text:p text:style-name="Réponse"/>
      <text:p text:style-name="Standard"/>
      <text:p text:style-name="Mon_5f_texte">Vérifiez-le par la commande <text:span text:style-name="T26">git branch </text:span></text:p>
      <text:p text:style-name="P18">Reportez et interprétez l’affichage produit : </text:p>
      <text:p text:style-name="Réponse"/>
      <text:p text:style-name="Réponse"/>
      <text:p text:style-name="Réponse"/>
      <text:p text:style-name="Réponse"/>
      <text:p text:style-name="Réponse"/>
      <text:p text:style-name="Réponse"/>
      <text:p text:style-name="Standard"/>
      <text:p text:style-name="Mon_5f_texte">Supprimez localement la branche <text:span text:style-name="T76">DevBranch</text:span> par la commande <text:span text:style-name="T26">git branch -D </text:span><text:span text:style-name="T101">DevBranch</text:span></text:p>
      <text:p text:style-name="P18">Reportez et interprétez l’affichage produit : </text:p>
      <text:p text:style-name="Réponse"/>
      <text:p text:style-name="Réponse"/>
      <text:p text:style-name="Réponse"/>
      <text:p text:style-name="Réponse"/>
      <text:p text:style-name="Réponse"/>
      <text:p text:style-name="Réponse"/>
      <text:p text:style-name="Standard"/>
      <text:p text:style-name="Mon_5f_texte">Supprimez sur le dépôt distant la branche <text:span text:style-name="T76">DevBranch</text:span> par la commande :</text:p>
      <text:p text:style-name="Mon_5f_texte"><text:s text:c="3"/><text:span text:style-name="T26">git push origin --delete</text:span> <text:span text:style-name="T101">DevBranch</text:span></text:p>
      <text:p text:style-name="P18">Reportez et interprétez l’affichage produit : </text:p>
      <text:p text:style-name="Réponse"/>
      <text:p text:style-name="Réponse"/>
      <text:p text:style-name="Réponse"/>
      <text:p text:style-name="Réponse"/>
      <text:p text:style-name="Réponse"/>
      <text:p text:style-name="Réponse"/>
      <text:p text:style-name="Standard"/>
      <text:p text:style-name="P103">A partir de votre 'repository' <text:span text:style-name="T20">ACwebProjet</text:span> sous GitHub, affichez la frise temporelle (<text:span text:style-name="T98">Insights</text:span> / <text:span text:style-name="T98">Network</text:span>) actuelle. Vous devriez obtenir une frise semblable à celle-ci (à remplacer par la vôtre !) :</text:p>
      <text:p text:style-name="Standard"><draw:frame draw:style-name="fr5" draw:name="Image 44" text:anchor-type="char" svg:x="-0.721cm" svg:y="0.372cm" svg:width="16.999cm" svg:height="6.179cm" draw:z-index="151"><draw:image xlink:href="Pictures/10000000000005BF00000217893BC53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Mon_5f_texte">Dans cette partie de TP, vous avez vu :</text:p>
      <text:list text:continue-numbering="true" text:style-name="WWNum4">
        <text:list-item>
          <text:p text:style-name="P17">que sur le dépôt distant GitHub il est facile de suivre l’évolution du projet, en particulier grâce à la frise temporelle</text:p>
        </text:list-item>
        <text:list-item>
          <text:p text:style-name="P17">qu’une branche particulière peut être déposée sur le dépôt distant par la commande <text:span text:style-name="T26">git push -u origin</text:span> <text:span text:style-name="T101">Branche</text:span></text:p>
        </text:list-item>
        <text:list-item>
          <text:p text:style-name="P17">qu’une branche devenue obsolète peut être supprimée sur le dépôt local et sur le dépôt distant par les commandes <text:span text:style-name="T26">git branch -D </text:span><text:span text:style-name="T101">Branche</text:span> et <text:span text:style-name="T26">git push origin --delete </text:span><text:span text:style-name="T101">Branche</text:span> <text:s text:c="2"/></text:p>
        </text:list-item>
      </text:list>
      <text:p text:style-name="Standard"/>
      <text:p text:style-name="Standard"/>
      <text:h text:style-name="Heading_20_1" text:outline-level="1" loext:marker-style-name="T19"><text:bookmark-start text:name="_Toc166434107"/><text:span text:style-name="T19">Formation complémentaire</text:span><text:bookmark-end text:name="_Toc166434107"/><text:span text:style-name="T19"/></text:h>
      <text:p text:style-name="Standard"/>
      <text:p text:style-name="P109"><text:span text:style-name="T20">Au final</text:span>, à partir de Webetud ou du serveur de fichiers <text:span text:style-name="T20">S2022</text:span> (\\192.168.100.1\Public\BUT1\SAé23), approfondissez votre formation en analysant les fichiers <text:span text:style-name="T20">Git_Formation.pdf</text:span> d’Isabelle BLASQUEZ et Git_travailAplusieurs.pdf de Bruno MERMET.</text:p>
      <text:p text:style-name="P19" loext:marker-style-name="T22"/>
      <text:p text:style-name="P19" loext:marker-style-name="T22"/>
      <text:h text:style-name="Heading_20_1" text:outline-level="1" loext:marker-style-name="T19"><text:bookmark-start text:name="_Toc166434108"/><text:span text:style-name="T19">Aide-mémoire Git</text:span><text:bookmark-end text:name="_Toc166434108"/><text:span text:style-name="T19"/></text:h>
      <text:p text:style-name="Standard"/>
      <text:h text:style-name="P21" text:outline-level="2"><text:bookmark-start text:name="_Toc166434109"/>Initialisation d’un dépôt Git<text:bookmark-end text:name="_Toc166434109"/></text:h>
      <text:list text:style-name="WWNum5">
        <text:list-item>
          <text:p text:style-name="P110"><text:span text:style-name="T40">git init</text:span> : initialise un nouveau dépôt Git dans le répertoire courant.</text:p>
        </text:list-item>
      </text:list>
      <text:list text:style-name="WWNum6">
        <text:list-item>
          <text:p text:style-name="P111"><text:span text:style-name="T40">git clone URL</text:span> : clone un dépôt Git distant dans un nouveau répertoire local.</text:p>
        </text:list-item>
      </text:list>
      <text:p text:style-name="P112">Exemple : <text:span text:style-name="T40">git clone https://github.com/user/repo.git</text:span></text:p>
      <text:list text:style-name="WWNum7">
        <text:list-item>
          <text:p text:style-name="P113"><text:span text:style-name="T40">git config --global user.name "NOM"</text:span> : configure le nom d’utilisateur pour tous les dépôts locaux.</text:p>
        </text:list-item>
      </text:list>
      <text:p text:style-name="P112">Exemple : <text:span text:style-name="T40">git config --global user.name "John Doe"</text:span></text:p>
      <text:list text:style-name="WWNum8">
        <text:list-item>
          <text:p text:style-name="P114"><text:span text:style-name="T40">git config --global user.email "EMAIL"</text:span> : configure l’adresse e-mail pour tous les dépôts locaux (ne pas négliger cette instruction !).</text:p>
        </text:list-item>
      </text:list>
      <text:p text:style-name="P112">Exemple : <text:span text:style-name="T40">git config --global user.email "johndoe@example.com"</text:span></text:p>
      <text:list text:style-name="WWNum9">
        <text:list-item>
          <text:p text:style-name="P115"><text:span text:style-name="T40">git add .</text:span> : ajoute tout le répertoire à l’index.</text:p>
        </text:list-item>
        <text:list-item>
          <text:p text:style-name="P115"><text:span text:style-name="T40">git add FILE</text:span> : ajoute un fichier modifié ou nouvellement créé à l’index.</text:p>
        </text:list-item>
      </text:list>
      <text:p text:style-name="P112">Exemple : <text:span text:style-name="T40">git add file.txt</text:span></text:p>
      <text:list text:style-name="WWNum10">
        <text:list-item>
          <text:p text:style-name="P116"><text:span text:style-name="T40">git commit -m "MESSAGE"</text:span> : crée un instantané du code source actuel et le stocke dans l’historique des versions de Git.</text:p>
        </text:list-item>
      </text:list>
      <text:p text:style-name="P112" loext:marker-style-name="T40">Exemple : <text:span text:style-name="T40">git commit -m "Ajout d’un nouveau fichier"</text:span><text:span text:style-name="T40"/></text:p>
      <text:p text:style-name="P117" loext:marker-style-name="T40"/>
      <text:h text:style-name="P21" text:outline-level="2"><text:bookmark-start text:name="_Toc166434110"/>Gestion des branches Git<text:bookmark-end text:name="_Toc166434110"/></text:h>
      <text:list text:style-name="WWNum11">
        <text:list-item>
          <text:p text:style-name="P118"><text:span text:style-name="T40">git branch</text:span> : affiche la liste des branches locales.</text:p>
        </text:list-item>
      </text:list>
      <text:list text:style-name="WWNum12">
        <text:list-item>
          <text:p text:style-name="P119"><text:soft-page-break/><text:span text:style-name="T40">git branch BRANCH</text:span> : crée une nouvelle branche à partir de la branche actuelle.</text:p>
        </text:list-item>
      </text:list>
      <text:p text:style-name="P112">Exemple : <text:span text:style-name="T40">git branch feature</text:span></text:p>
      <text:list text:style-name="WWNum13">
        <text:list-item>
          <text:p text:style-name="P120"><text:span text:style-name="T40">git checkout BRANCH</text:span> : bascule vers une branche spécifique et met à jour le répertoire de travail.</text:p>
        </text:list-item>
      </text:list>
      <text:p text:style-name="P112">Exemple : <text:span text:style-name="T40">git checkout feature</text:span></text:p>
      <text:list text:style-name="WWNum14">
        <text:list-item>
          <text:p text:style-name="P121"><text:span text:style-name="T40">git merge BRANCH</text:span> : fusionne une branche spécifique dans la branche actuelle. </text:p>
        </text:list-item>
      </text:list>
      <text:p text:style-name="P112">Exemple : <text:span text:style-name="T40">git merge feature</text:span></text:p>
      <text:list text:style-name="WWNum15">
        <text:list-item>
          <text:p text:style-name="P122"><text:span text:style-name="T40">git branch -d BRANCH</text:span> : supprime une branche locale spécifique.</text:p>
        </text:list-item>
      </text:list>
      <text:p text:style-name="P123">Exemple : <text:span text:style-name="T40">git branch -d feature</text:span></text:p>
      <text:list text:style-name="WWNum16">
        <text:list-item>
          <text:p text:style-name="P124"><text:span text:style-name="T40">git push origin BRANCH</text:span> : envoie une branche locale vers le dépôt distant.</text:p>
        </text:list-item>
      </text:list>
      <text:p text:style-name="P125" loext:marker-style-name="T40">Exemple : <text:span text:style-name="T40">git push origin feature</text:span><text:span text:style-name="T40"/></text:p>
      <text:p text:style-name="P117" loext:marker-style-name="T40"/>
      <text:h text:style-name="P21" text:outline-level="2"><text:bookmark-start text:name="_Toc166434111"/>Gestion des commits Git<text:bookmark-end text:name="_Toc166434111"/></text:h>
      <text:list text:style-name="WWNum17">
        <text:list-item>
          <text:p text:style-name="P126"><text:span text:style-name="T40">git log</text:span> : affiche l’historique des commits pour la branche actuelle.</text:p>
        </text:list-item>
      </text:list>
      <text:list text:style-name="WWNum18">
        <text:list-item>
          <text:p text:style-name="P127"><text:span text:style-name="T40">git diff COMMIT1 COMMIT2</text:span> : affiche les différences entre deux commits spécifiques.</text:p>
        </text:list-item>
      </text:list>
      <text:p text:style-name="P112">Exemple : <text:span text:style-name="T40">git diff abc123 def456</text:span></text:p>
      <text:list text:style-name="WWNum19">
        <text:list-item>
          <text:p text:style-name="P128"><text:span text:style-name="T40">git reset COMMIT</text:span> : annule tous les commits après le commit spécifié et conserve les modifications en tant que modifications non validées.</text:p>
        </text:list-item>
      </text:list>
      <text:p text:style-name="P112" loext:marker-style-name="T40">Exemple : <text:span text:style-name="T40">git reset abc123</text:span><text:span text:style-name="T40"/></text:p>
      <text:list text:style-name="WWNum20">
        <text:list-item>
          <text:p text:style-name="P129"><text:span text:style-name="T40">git revert COMMIT</text:span> : annule le commit spécifié en créant un nouveau commit qui annule les modifications apportées par le commit spécifié.</text:p>
        </text:list-item>
      </text:list>
      <text:p text:style-name="P112">Exemple : <text:span text:style-name="T40">git revert abc123</text:span></text:p>
      <text:list text:style-name="WWNum21">
        <text:list-item>
          <text:p text:style-name="P130"><text:span text:style-name="T40">git cherry-pick COMMIT</text:span> : applique les modifications apportées par le commit spécifié à la branche actuelle.</text:p>
        </text:list-item>
      </text:list>
      <text:p text:style-name="P112">Exemple : <text:span text:style-name="T40">git cherry-pick abc123</text:span></text:p>
      <text:list text:style-name="WWNum22">
        <text:list-item>
          <text:p text:style-name="P131"><text:span text:style-name="T40">git bisect</text:span> : utilise une recherche binaire pour trouver le commit qui a introduit un bogue.</text:p>
        </text:list-item>
      </text:list>
      <text:p text:style-name="Standard"/>
      <text:h text:style-name="P21" text:outline-level="2"><text:bookmark-start text:name="_Toc166434112"/>Gestion des conflits de fusion<text:bookmark-end text:name="_Toc166434112"/></text:h>
      <text:list text:style-name="WWNum23">
        <text:list-item>
          <text:p text:style-name="P132"><text:span text:style-name="T40">git merge --abort</text:span> : annule une fusion en cours et restaure l’état précédent de la branche actuelle.</text:p>
        </text:list-item>
      </text:list>
      <text:p text:style-name="P112">Exemple : <text:span text:style-name="T40">git merge --abort</text:span></text:p>
      <text:list text:style-name="WWNum24">
        <text:list-item>
          <text:p text:style-name="P133">Résoudre manuellement les conflits de fusion en éditant les fichiers en conflit et en utilisant les commandes <text:span text:style-name="T40">git add</text:span> et <text:span text:style-name="T40">git commit</text:span> pour marquer les conflits comme résolus.</text:p>
        </text:list-item>
        <text:list-item>
          <text:p text:style-name="P133">Utiliser des outils tiers tels que <text:span text:style-name="T20">KDiff3</text:span> ou <text:span text:style-name="T20">Meld</text:span> pour résoudre les conflits de fusion.</text:p>
        </text:list-item>
      </text:list>
      <text:p text:style-name="Standard"/>
      <text:h text:style-name="P21" text:outline-level="2"><text:bookmark-start text:name="_Toc166434113"/>Gestion des tags Git<text:bookmark-end text:name="_Toc166434113"/></text:h>
      <text:list text:style-name="WWNum25">
        <text:list-item>
          <text:p text:style-name="P134"><text:span text:style-name="T40">git tag</text:span> : affiche la liste des tags existants pour la branche actuelle.</text:p>
        </text:list-item>
      </text:list>
      <text:list text:style-name="WWNum26">
        <text:list-item>
          <text:p text:style-name="P135"><text:span text:style-name="T40">git tag TAG</text:span> : crée un nouveau tag pour le commit actuel.</text:p>
        </text:list-item>
      </text:list>
      <text:p text:style-name="P112">Exemple : <text:span text:style-name="T40">git tag v1.0.0</text:span></text:p>
      <text:list text:style-name="WWNum27">
        <text:list-item>
          <text:p text:style-name="P136"><text:span text:style-name="T40">git show TAG</text:span> : affiche les informations sur un tag spécifique.</text:p>
        </text:list-item>
      </text:list>
      <text:p text:style-name="P112">Exemple : <text:span text:style-name="T40">git show v1.0.0</text:span></text:p>
      <text:list text:style-name="WWNum28">
        <text:list-item>
          <text:p text:style-name="P137"><text:span text:style-name="T40">git push origin TAG</text:span> : envoie un tag local vers le dépôt distant.</text:p>
        </text:list-item>
      </text:list>
      <text:p text:style-name="P112">Exemple : <text:span text:style-name="T40">git push origin v1.0.0</text:span></text:p>
      <text:list text:style-name="WWNum29">
        <text:list-item>
          <text:p text:style-name="P138"><text:span text:style-name="T40">git tag -d TAGNAME</text:span> : supprime le tag TAGNAME.</text:p>
        </text:list-item>
      </text:list>
      <text:p text:style-name="Standard"/>
      <text:p text:style-name="Standard"><text:soft-page-break/></text:p>
      <text:p text:style-name="P11"/>
      <text:p text:style-name="P16"><draw:frame draw:style-name="fr6" draw:name="Image 45" text:anchor-type="as-char" svg:width="16.002cm" svg:height="22.627cm" draw:z-index="0"><draw:image xlink:href="Pictures/1000000000000398000005151BB3C087.png" xlink:type="simple" xlink:show="embed" xlink:actuate="onLoad" draw:mime-type="image/png"/></draw:frame></text:p>
      <text:p text:style-name="Standard"/>
      <text:p text:style-name="Standard">https://www.onasus.com/10-commandes-utiles-de-git-a-connait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wiss"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Verdana" svg:font-family="Verdana" style:font-family-generic="swiss"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text-align="start"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class="chapter">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class="chapter">
      <style:paragraph-properties fo:margin-top="0.071cm" fo:margin-bottom="0.212cm" style:contextual-spacing="false" fo:orphans="0" fo:widows="0" fo:keep-with-next="always"/>
      <style:text-properties style:font-name="Arial" fo:font-family="Arial" style:font-family-generic="swiss" style:font-pitch="variable" fo:font-weight="bold" style:font-weight-asian="bold" style:font-name-complex="Arial1" style:font-family-complex="Arial" style:font-family-generic-complex="system" style:font-pitch-complex="variable" style:font-style-complex="italic" style:font-weight-complex="bold"/>
    </style:style>
    <style:style style:name="Heading_20_3" style:display-name="Heading 3" style:family="paragraph" style:parent-style-name="Standard" style:next-style-name="Standard" loext:linked-style-name="Titre_20_3_20_Car" style:default-outline-level="3" style:class="chapter">
      <style:paragraph-properties fo:orphans="0" fo:widows="0"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4" style:display-name="Heading 4" style:family="paragraph" style:parent-style-name="Standard" style:next-style-name="Standard" loext:linked-style-name="Titre_20_4_20_Car" style:default-outline-level="4" style:class="chapter">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loext:linked-style-name="Titre_20_5_20_Car" style:default-outline-level="5" style:class="chapter">
      <style:paragraph-properties fo:orphans="0" fo:widows="0" fo:keep-with-next="always"/>
      <style:text-properties fo:font-weight="bold" style:font-weight-asian="bold" style:font-weight-complex="bold"/>
    </style:style>
    <style:style style:name="Heading_20_6" style:display-name="Heading 6" style:family="paragraph" style:parent-style-name="Standard" style:next-style-name="Standard" loext:linked-style-name="Titre_20_6_20_Car" style:default-outline-level="6" style:class="chapter">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loext:linked-style-name="Titre_20_7_20_Car" style:default-outline-level="7" style:class="chapter">
      <style:paragraph-properties fo:margin-top="0.423cm" fo:margin-bottom="0.106cm" style:contextual-spacing="false"/>
    </style:style>
    <style:style style:name="Heading_20_8" style:display-name="Heading 8" style:family="paragraph" style:parent-style-name="Standard" style:next-style-name="Standard" loext:linked-style-name="Titre_20_8_20_Car" style:default-outline-level="8" style:class="chapter">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loext:linked-style-name="Titre_20_9_20_Car" style:default-outline-level="9" style:class="chapter">
      <style:paragraph-properties fo:orphans="0" fo:widows="0" fo:keep-with-next="always"/>
      <style:text-properties style:font-name="Arial" fo:font-family="Arial" style:font-family-generic="swiss" style:font-pitch="variable" fo:font-size="14pt" fo:font-style="italic" style:text-underline-style="solid" style:text-underline-width="auto" style:text-underline-color="font-color"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auto-update="true" style:class="index">
      <style:paragraph-properties fo:margin-left="2cm" fo:margin-top="0.212cm" fo:margin-bottom="0cm" style:contextual-spacing="false">
        <style:tab-stops>
          <style:tab-stop style:position="15.984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2.501cm" fo:margin-top="0.106cm" fo:margin-bottom="0cm" style:contextual-spacing="false">
        <style:tab-stops>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847cm"/>
    </style:style>
    <style:style style:name="mon_5f_chapitre" style:display-name="mon_chapitre" style:family="paragraph">
      <style:paragraph-properties fo:margin-top="1.905cm" fo:margin-bottom="1.058cm" style:contextual-spacing="false" fo:text-align="start" style:justify-single-word="false" fo:orphans="2" fo:widows="2" fo:padding-left="0cm" fo:padding-right="0cm" fo:padding-top="0cm" fo:padding-bottom="0.035cm" fo:border-left="none" fo:border-right="none" fo:border-top="none" fo:border-bottom="1.5pt solid #000000" style:writing-mode="lr-tb"/>
      <style:text-properties style:font-name="Arial" fo:font-family="Arial" style:font-family-generic="swiss" style:font-pitch="variable" fo:font-size="20pt" fo:font-style="italic" style:font-size-asian="20pt" style:font-style-asian="italic" style:font-name-complex="Arial1" style:font-family-complex="Arial" style:font-family-generic-complex="system" style:font-pitch-complex="variable" style:font-size-complex="20pt" style:font-style-complex="italic"/>
    </style:style>
    <style:style style:name="mon_5f_parag" style:display-name="mon_parag" style:family="paragraph" loext:linked-style-name="mon_5f_parag_20_Car">
      <style:paragraph-properties fo:margin-top="0.071cm" fo:margin-bottom="0.176cm" style:contextual-spacing="false" fo:text-align="justify" style:justify-single-word="false" fo:orphans="2" fo:widows="2" style:writing-mode="lr-tb"/>
      <style:text-properties style:font-name="Arial" fo:font-family="Arial" style:font-family-generic="swiss" style:font-pitch="variable" fo:font-size="12pt" style:font-size-asian="12pt" style:font-name-complex="Arial1" style:font-family-complex="Arial" style:font-family-generic-complex="system" style:font-pitch-complex="variable" style:font-size-complex="12pt"/>
    </style:style>
    <style:style style:name="mon_5f_parag_5f_2" style:display-name="mon_parag_2" style:family="paragraph" loext:linked-style-name="mon_5f_parag_5f_2_20_Car">
      <style:paragraph-properties fo:margin-top="0.212cm" fo:margin-bottom="0.212cm" style:contextual-spacing="false" fo:text-align="start" style:justify-single-word="false" fo:orphans="2" fo:widows="2" fo:padding="0.212cm" fo:border="0.74pt solid #000000" style:shadow="none" style:writing-mode="lr-tb"/>
      <style:text-properties style:font-name="Courier New" fo:font-family="'Courier New'" style:font-family-generic="roman" style:font-pitch="variable" fo:font-size="12pt" style:font-size-asian="12pt" style:font-name-complex="Courier New1" style:font-family-complex="'Courier New'" style:font-family-generic-complex="system" style:font-pitch-complex="variable" style:font-size-complex="12pt"/>
    </style:style>
    <style:style style:name="plan_5f_parag" style:display-name="plan_parag" style:family="paragraph">
      <style:paragraph-properties fo:margin-left="1.998cm" fo:margin-top="0.353cm" fo:margin-bottom="0cm" style:contextual-spacing="false" fo:line-height="0.564cm" fo:text-align="justify" style:justify-single-word="false" fo:orphans="2" fo:widows="2" fo:text-indent="0.499cm" style:auto-text-indent="false" style:writing-mode="lr-tb">
        <style:tab-stops>
          <style:tab-stop style:position="3.429cm"/>
          <style:tab-stop style:position="13.428cm" style:type="right"/>
        </style:tab-stops>
      </style:paragraph-properties>
      <style:text-properties style:font-name="Times" fo:font-family="Times" style:font-family-generic="roman" style:font-pitch="variable" fo:font-size="14pt" style:font-size-asian="14pt" style:font-name-complex="Times1" style:font-family-complex="Times" style:font-family-generic-complex="system" style:font-pitch-complex="variable" style:font-size-complex="14pt"/>
    </style:style>
    <style:style style:name="Body_20_Text_20_2" style:display-name="Body Text 2" style:family="paragraph" style:parent-style-name="Standard" loext:linked-style-name="Corps_20_de_20_texte_20_2_20_Car">
      <style:paragraph-properties fo:margin-top="0cm" fo:margin-bottom="0.212cm" style:contextual-spacing="false" fo:line-height="200%"/>
    </style:style>
    <style:style style:name="Body_20_Text_20_3" style:display-name="Body Text 3" style:family="paragraph" style:parent-style-name="Standard" loext:linked-style-name="Corps_20_de_20_texte_20_3_20_Car">
      <style:text-properties style:font-name="Arial" fo:font-family="Arial" style:font-family-generic="swiss" style:font-pitch="variable" fo:font-size="10pt" style:font-size-asian="10pt" style:font-name-complex="Arial1" style:font-family-complex="Arial" style:font-family-generic-complex="system" style:font-pitch-complex="variable" style:font-size-complex="10pt"/>
    </style:style>
    <style:style style:name="Normal_20__28_Web_29_" style:display-name="Normal (Web)" style:family="paragraph" style:parent-style-name="Standard">
      <style:paragraph-properties fo:margin-top="0.254cm" fo:margin-bottom="0.254cm" style:contextual-spacing="false" fo:text-align="start" style:justify-single-word="false"/>
    </style:style>
    <style:style style:name="Ecran" style:family="paragraph" style:parent-style-name="Standard">
      <style:paragraph-properties fo:margin-left="2.251cm" fo:text-align="start" style:justify-single-word="false"/>
      <style:text-properties style:font-name="Arial Narrow" fo:font-family="'Arial Narrow'" style:font-family-generic="swiss" style:font-pitch="variable" fo:font-size="9pt" style:font-size-asian="9pt" style:font-size-complex="9pt"/>
    </style:style>
    <style:style style:name="Question" style:family="paragraph" style:parent-style-name="Standard">
      <style:paragraph-properties fo:margin-left="1cm" fo:margin-top="0.106cm" fo:margin-bottom="0.106cm" style:contextual-spacing="false" fo:text-align="start" style:justify-single-word="false"/>
      <style:text-properties style:font-name="Arial" fo:font-family="Arial" style:font-family-generic="swiss"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mon_5f_parag_5f_gras" style:display-name="mon_parag_gras" style:family="paragraph" style:parent-style-name="mon_5f_parag">
      <style:paragraph-properties fo:orphans="0" fo:widows="0"/>
      <style:text-properties fo:font-weight="bold" style:font-weight-asian="bold" style:font-weight-complex="bold"/>
    </style:style>
    <style:style style:name="mon_5f_parag_5f_s" style:display-name="mon_parag_s" style:family="paragraph" style:parent-style-name="mon_5f_parag">
      <style:paragraph-properties fo:orphans="0" fo:widows="0"/>
      <style:text-properties style:text-underline-style="solid" style:text-underline-width="auto" style:text-underline-color="font-color"/>
    </style:style>
    <style:style style:name="mon_5f_parag_5f_rep" style:display-name="mon_parag_rep" style:family="paragraph">
      <style:paragraph-properties fo:margin-top="0.176cm" fo:margin-bottom="0.176cm" style:contextual-spacing="false" fo:text-align="start" style:justify-single-word="false" fo:orphans="0" fo:widows="0" style:writing-mode="lr-tb"/>
      <style:text-properties style:font-name="Courier" fo:font-family="Courier" style:font-family-generic="roman" style:font-pitch="variable" fo:font-size="12pt" style:font-size-asian="12pt" style:font-size-complex="12pt"/>
    </style:style>
    <style:style style:name="mon_5f_parag_5f_rep_5f_2" style:display-name="mon_parag_rep_2" style:family="paragraph" style:parent-style-name="mon_5f_parag_5f_rep">
      <style:paragraph-properties fo:padding="0.035cm" fo:border="0.74pt solid #000000" style:shadow="none"/>
    </style:style>
    <style:style style:name="Text_20_body_20_indent" style:display-name="Text body indent" style:family="paragraph" style:parent-style-name="Standard" loext:linked-style-name="Retrait_20_corps_20_de_20_texte_20_Car" style:class="text">
      <style:paragraph-properties fo:margin-left="0.499cm" fo:margin-top="0cm" fo:margin-bottom="0.212cm" style:contextual-spacing="false"/>
    </style:style>
    <style:style style:name="mon_5f_sous_5f_chapitre" style:display-name="mon_sous_chapitre" style:family="paragraph">
      <style:paragraph-properties fo:margin-top="0.635cm" fo:margin-bottom="0.635cm" style:contextual-spacing="false" fo:text-align="start" style:justify-single-word="false" fo:orphans="0" fo:widows="0" fo:padding-left="0cm" fo:padding-right="0cm" fo:padding-top="0cm" fo:padding-bottom="0.035cm" fo:border-left="none" fo:border-right="none" fo:border-top="none" fo:border-bottom="0.74pt solid #000000" style:writing-mode="lr-tb"/>
      <style:text-properties style:font-name="Arial" fo:font-family="Arial" style:font-family-generic="swiss" style:font-pitch="variable" fo:font-size="18pt" fo:font-style="italic" style:font-size-asian="18pt" style:font-style-asian="italic" style:font-name-complex="Arial1" style:font-family-complex="Arial" style:font-family-generic-complex="system" style:font-pitch-complex="variable" style:font-size-complex="18pt" style:font-style-complex="italic"/>
    </style:style>
    <style:style style:name="H2" style:family="paragraph" style:parent-style-name="Standard" style:next-style-name="Standard">
      <style:paragraph-properties fo:margin-top="0.176cm" fo:margin-bottom="0.176cm" style:contextual-spacing="false" fo:text-align="start" style:justify-single-word="false" fo:orphans="0" fo:widows="0" fo:keep-with-next="always"/>
      <style:text-properties fo:font-size="18pt" fo:font-weight="bold" style:font-size-asian="18pt" style:font-weight-asian="bold" style:font-size-complex="18pt" style:font-weight-complex="bold"/>
    </style:style>
    <style:style style:name="Preformatted" style:family="paragraph" style:parent-style-name="Standard">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Normal_20__28_Web_29_1" style:display-name="Normal (Web)1" style:family="paragraph" style:parent-style-name="Standard">
      <style:paragraph-properties fo:margin-top="0.494cm" fo:margin-bottom="0.494cm" style:contextual-spacing="false" fo:text-align="start" style:justify-single-word="false"/>
      <style:text-properties fo:color="#000000" loext:opacity="100%" style:font-name="Arial" fo:font-family="Arial" style:font-family-generic="swiss" style:font-pitch="variable" fo:font-size="9pt" style:font-size-asian="9pt" style:font-name-complex="Arial1" style:font-family-complex="Arial" style:font-family-generic-complex="system" style:font-pitch-complex="variable" style:font-size-complex="9pt"/>
    </style:style>
    <style:style style:name="Block_20_Text" style:display-name="Block Text" style:family="paragraph" style:parent-style-name="Standard">
      <style:paragraph-properties fo:margin-left="0.529cm" fo:margin-right="0.635cm" fo:margin-top="0.176cm" fo:margin-bottom="0.296cm" style:contextual-spacing="false" fo:text-align="start" style:justify-single-word="false" fo:padding-left="0.141cm" fo:padding-right="0.141cm" fo:padding-top="0.035cm" fo:padding-bottom="0.035cm" fo:border="0.51pt solid #000000" style:shadow="none"/>
      <style:text-properties fo:color="#00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ahoma" fo:font-family="Tahoma" style:font-family-generic="swiss" style:font-pitch="variable" fo:font-size="12pt" style:font-size-asian="12pt" style:font-name-complex="Tahoma1" style:font-family-complex="Tahoma" style:font-family-generic-complex="system" style:font-pitch-complex="variable" style:font-size-complex="12pt"/>
    </style:style>
    <style:style style:name="Paragraphe" style:family="paragraph" style:parent-style-name="Default" style:next-style-name="Default">
      <style:text-properties style:use-window-font-color="true" loext:opacity="0%"/>
    </style:style>
    <style:style style:name="Remarque" style:family="paragraph" style:parent-style-name="Default" style:next-style-name="Default">
      <style:text-properties style:use-window-font-color="true" loext:opacity="0%"/>
    </style:style>
    <style:style style:name="mon_5f_parag_5f_centre" style:display-name="mon_parag_centre" style:family="paragraph">
      <style:paragraph-properties fo:margin-top="0cm" fo:margin-bottom="0.212cm" style:contextual-spacing="false" fo:text-align="center" style:justify-single-word="false" fo:orphans="0" fo:widows="0" fo:hyphenation-ladder-count="no-limit" fo:hyphenation-keep="auto" loext:hyphenation-keep-type="column" style:writing-mode="lr-tb"/>
      <style:text-properties style:font-name="Arial" fo:font-family="Arial" style:font-family-generic="swiss" style:font-pitch="variable" fo:font-size="12pt" style:font-size-asian="12pt" style:font-name-complex="Arial1" style:font-family-complex="Arial"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TML_20_Preformatted" style:display-name="HTML Preformatted" style:family="paragraph" style:parent-style-name="Standard" loext:linked-style-name="Préformaté_20_HTML_20_Car">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Texte_20_de_20_bulles_20_C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p" style:family="paragraph" style:parent-style-name="Standard">
      <style:paragraph-properties fo:margin-top="0.494cm" fo:margin-bottom="0.494cm" style:contextual-spacing="false" fo:text-align="start" style:justify-single-word="false"/>
    </style:style>
    <style:style style:name="t" style:family="paragraph" style:parent-style-name="Standard">
      <style:paragraph-properties fo:margin-top="0.494cm" fo:margin-bottom="0.494cm" style:contextual-spacing="false" fo:text-align="start" style:justify-single-word="false"/>
    </style:style>
    <style:style style:name="List_20_Paragraph" style:display-name="List Paragraph" style:family="paragraph" style:parent-style-name="Standard">
      <style:paragraph-properties fo:margin-left="1.27cm" fo:margin-top="0cm" fo:margin-bottom="0cm" style:contextual-spacing="true"/>
    </style:style>
    <style:style style:name="Mon_5f_Sous-titre" style:display-name="Mon_Sous-titre" style:family="paragraph" style:parent-style-name="mon_5f_parag" style:auto-update="true" style:list-style-name="WWNum1" style:list-level="2">
      <style:paragraph-properties fo:margin-top="0.071cm" fo:margin-bottom="0.212cm" style:contextual-spacing="false" fo:text-align="start" style:justify-single-word="false"/>
      <style:text-properties fo:font-weight="bold" style:font-weight-asian="bold"/>
    </style:style>
    <style:style style:name="Mon_5f_titre" style:display-name="Mon_titre" style:family="paragraph" style:parent-style-name="Heading_20_1" style:auto-update="true" style:default-outline-level="1">
      <style:paragraph-properties fo:margin-left="0.97cm" fo:margin-top="0.423cm" fo:margin-bottom="0.635cm" style:contextual-spacing="false" fo:text-indent="-0.76cm" style:auto-text-indent="false"/>
    </style:style>
    <style:style style:name="Mon_5f_Grand-titre" style:display-name="Mon_Grand-titre" style:family="paragraph" style:parent-style-name="Heading_20_1" style:default-outline-level="1" style:list-style-name="">
      <style:paragraph-properties fo:text-align="center" style:justify-single-word="false"/>
      <style:text-properties style:font-name="Verdana" fo:font-family="Verdana" style:font-family-generic="swiss" style:font-pitch="variable" fo:font-size="20pt" style:font-size-asian="20pt" style:font-size-complex="20pt"/>
    </style:style>
    <style:style style:name="Ma_5f_puce" style:display-name="Ma_puce" style:family="paragraph" style:parent-style-name="mon_5f_parag" style:auto-update="true" style:list-style-name="WWNum3" style:list-level="3">
      <style:paragraph-properties fo:text-align="start" style:justify-single-word="false"/>
      <style:text-properties style:font-name="Times New Roman" fo:font-family="'Times New Roman'" style:font-family-generic="roman" style:font-pitch="variable"/>
    </style:style>
    <style:style style:name="Mon_5f_texte" style:display-name="Mon_texte" style:family="paragraph" style:parent-style-name="mon_5f_parag" loext:linked-style-name="Mon_5f_texte_20_Car">
      <style:paragraph-properties fo:text-indent="0.63cm" style:auto-text-indent="false"/>
      <style:text-properties style:font-name="Times New Roman" fo:font-family="'Times New Roman'" style:font-family-generic="roman" style:font-pitch="variable"/>
    </style:style>
    <style:style style:name="new" style:family="paragraph" style:parent-style-name="Mon_5f_texte" loext:linked-style-name="new_20_Car">
      <style:text-properties style:font-name="Consolas" fo:font-family="Consolas" style:font-family-generic="roman" style:font-pitch="variable" fo:font-size="11pt" fo:font-weight="bold" style:font-size-asian="11pt" style:font-weight-asian="bold"/>
    </style:style>
    <style:style style:name="Texte" style:family="paragraph">
      <style:paragraph-properties fo:margin-top="0cm" fo:margin-bottom="0cm" style:contextual-spacing="false" fo:text-align="start" style:justify-single-word="false" fo:orphans="2" fo:widows="2" style:writing-mode="lr-tb"/>
      <style:text-properties fo:color="#000000" loext:opacity="100%" fo:font-size="12pt" style:font-size-asian="12pt" style:font-size-complex="12pt"/>
    </style:style>
    <style:style style:name="Marginalia" style:family="paragraph" style:parent-style-name="Standard" loext:linked-style-name="Commentaire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Objet_20_du_20_commentaire_20_Car">
      <style:text-properties fo:font-weight="bold" style:font-weight-asian="bold" style:font-weight-complex="bold"/>
    </style:style>
    <style:style style:name="mcqview_5f__5f_question" style:display-name="mcqview__question" style:family="paragraph" style:parent-style-name="Standard">
      <style:paragraph-properties fo:margin-top="0.494cm" fo:margin-bottom="0.494cm" style:contextual-spacing="false" fo:text-align="start" style:justify-single-word="false"/>
    </style:style>
    <style:style style:name="Réponse" style:family="paragraph" style:parent-style-name="mon_5f_parag_5f_2" loext:linked-style-name="Réponse_20_Car">
      <style:paragraph-properties fo:margin-top="0cm" fo:margin-bottom="0cm" style:contextual-spacing="false" fo:padding-left="0.212cm" fo:padding-right="0.212cm" fo:padding-top="0.212cm" fo:padding-bottom="0.176cm" fo:border="0.74pt solid #000000"/>
      <style:text-properties style:font-name="Consolas" fo:font-family="Consolas" style:font-family-generic="roman" style:font-pitch="variable" fo:font-size="10pt" style:font-size-asian="10pt" style:font-size-complex="10pt"/>
    </style:style>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style:font-name="Arial" fo:font-family="Arial" style:font-family-generic="swiss"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Titre_20_3_20_Car" style:display-name="Titre 3 Car"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itre_20_4_20_Car" style:display-name="Titre 4 Car" style:family="text" style:parent-style-name="Default_20_Paragraph_20_Font">
      <style:text-properties fo:font-size="14pt" fo:font-weight="bold" style:font-size-asian="14pt" style:font-weight-asian="bold" style:font-size-complex="14pt" style:font-weight-complex="bold"/>
    </style:style>
    <style:style style:name="Titre_20_5_20_Car" style:display-name="Titre 5 Car" style:family="text" style:parent-style-name="Default_20_Paragraph_20_Font">
      <style:text-properties fo:font-size="12pt" fo:font-weight="bold" style:font-size-asian="12pt" style:font-weight-asian="bold" style:font-size-complex="12pt" style:font-weight-complex="bold"/>
    </style:style>
    <style:style style:name="Titre_20_6_20_Car" style:display-name="Titre 6 Car" style:family="text" style:parent-style-name="Default_20_Paragraph_20_Font">
      <style:text-properties fo:font-size="11pt" fo:font-weight="bold" style:font-size-asian="11pt" style:font-weight-asian="bold" style:font-size-complex="11pt" style:font-weight-complex="bold"/>
    </style:style>
    <style:style style:name="Titre_20_7_20_Car" style:display-name="Titre 7 Car" style:family="text" style:parent-style-name="Default_20_Paragraph_20_Font">
      <style:text-properties fo:font-size="12pt" style:font-size-asian="12pt" style:font-size-complex="12pt"/>
    </style:style>
    <style:style style:name="Titre_20_8_20_Car" style:display-name="Titre 8 Car" style:family="text" style:parent-style-name="Default_20_Paragraph_20_Font">
      <style:text-properties fo:font-size="12pt" fo:font-style="italic" style:font-size-asian="12pt" style:font-style-asian="italic" style:font-size-complex="12pt" style:font-style-complex="italic"/>
    </style:style>
    <style:style style:name="Titre_20_9_20_Car" style:display-name="Titre 9 Car" style:family="text" style:parent-style-name="Default_20_Paragraph_20_Font">
      <style:text-properties style:font-name="Arial" fo:font-family="Arial" style:font-family-generic="swiss" style:font-pitch="variable" fo:font-size="14pt" fo:font-style="italic" style:text-underline-style="solid" style:text-underline-width="auto" style:text-underline-color="font-color"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En-tête_20_Car" style:display-name="En-tête Car" style:family="text" style:parent-style-name="Default_20_Paragraph_20_Font">
      <style:text-properties fo:font-size="12pt" style:font-size-asian="12pt" style:font-size-complex="12pt"/>
    </style:style>
    <style:style style:name="Pied_20_de_20_page_20_Car" style:display-name="Pied de page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mon_5f_parag_20_Car" style:display-name="mon_parag Car" style:family="text" style:parent-style-name="Default_20_Paragraph_20_Font" loext:linked-style-name="mon_5f_parag">
      <style:text-properties style:font-name="Arial" fo:font-family="Arial" style:font-family-generic="swiss" style:font-pitch="variable" fo:font-size="12pt" style:font-size-asian="12pt" style:font-name-complex="Arial1" style:font-family-complex="Arial" style:font-family-generic-complex="system" style:font-pitch-complex="variable" style:font-size-complex="12pt"/>
    </style:style>
    <style:style style:name="Machine_20_à_20_écrire" style:display-name="Machine à écrire" style:family="text">
      <style:text-properties style:font-name="Courier New" fo:font-family="'Courier New'" style:font-family-generic="roman" style:font-pitch="variable" fo:font-size="10pt" style:font-size-asian="10pt" style:font-size-complex="10pt"/>
    </style:style>
    <style:style style:name="Corps_20_de_20_texte_20_Car" style:display-name="Corps de texte Car" style:family="text" style:parent-style-name="Default_20_Paragraph_20_Font">
      <style:text-properties fo:font-size="12pt" style:font-size-asian="12pt" style:font-size-complex="12pt"/>
    </style:style>
    <style:style style:name="Corps_20_de_20_texte_20_2_20_Car" style:display-name="Corps de texte 2 Car" style:family="text" style:parent-style-name="Default_20_Paragraph_20_Font" loext:linked-style-name="Body_20_Text_20_2">
      <style:text-properties fo:font-size="12pt" style:font-size-asian="12pt" style:font-size-complex="12pt"/>
    </style:style>
    <style:style style:name="Titre_20_2_20_Car" style:display-name="Titre 2 Car" style:family="text">
      <style:text-properties style:font-name="Arial" fo:font-family="Arial" style:font-family-generic="swiss" style:font-pitch="variable" fo:font-size="12pt" fo:language="fr" fo:country="FR" fo:font-style="italic" fo:font-weight="bold" style:font-size-asian="12pt" style:language-asian="fr" style:country-asian="FR" style:font-style-asian="italic" style:font-weight-asian="bold" style:font-size-complex="12pt" style:language-complex="ar" style:country-complex="SA" style:font-style-complex="italic" style:font-weight-complex="bold"/>
    </style:style>
    <style:style style:name="Corps_20_de_20_texte_20_3_20_Car" style:display-name="Corps de texte 3 Car" style:family="text" style:parent-style-name="Default_20_Paragraph_20_Font" loext:linked-style-name="Body_20_Text_20_3">
      <style:text-properties style:font-name="Arial" fo:font-family="Arial" style:font-family-generic="swiss" style:font-pitch="variable" style:font-name-complex="Arial1" style:font-family-complex="Arial" style:font-family-generic-complex="system" style:font-pitch-complex="variable"/>
    </style:style>
    <style:style style:name="postbody1" style:family="text">
      <style:text-properties fo:font-size="9pt" style:font-size-asian="9pt" style:font-size-complex="9pt"/>
    </style:style>
    <style:style style:name="HTML_20_Typewriter" style:display-name="HTML Typewrite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Wingdings" style:font-family-complex="Wingdings" style:font-family-generic-complex="system" style:font-pitch-complex="variable" style:font-size-complex="10pt"/>
    </style:style>
    <style:style style:name="Retrait_20_corps_20_de_20_texte_20_Car" style:display-name="Retrait corps de texte Car" style:family="text" style:parent-style-name="Default_20_Paragraph_20_Font">
      <style:text-properties fo:font-size="12pt"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Texte_20_de_20_bulles_20_Car" style:display-name="Texte de bulles C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mment" style:family="text" style:parent-style-name="Default_20_Paragraph_20_Font"/>
    <style:style style:name="vars" style:family="text" style:parent-style-name="Default_20_Paragraph_20_Font"/>
    <style:style style:name="string" style:family="text" style:parent-style-name="Default_20_Paragraph_20_Font"/>
    <style:style style:name="st0" style:family="text" style:parent-style-name="Default_20_Paragraph_20_Font"/>
    <style:style style:name="HTML_20_Variable" style:display-name="HTML Variable" style:family="text">
      <style:text-properties fo:font-style="italic" style:font-style-asian="italic" style:font-style-complex="italic"/>
    </style:style>
    <style:style style:name="apple-converted-space" style:family="text"/>
    <style:style style:name="Mon_5f_texte_20_Car" style:display-name="Mon_texte Car" style:family="text" style:parent-style-name="mon_5f_parag_20_Car" loext:linked-style-name="Mon_5f_texte">
      <style:text-properties style:font-name="Arial" fo:font-family="Arial" style:font-family-generic="swiss" style:font-pitch="variable" fo:font-size="12pt" style:font-size-asian="12pt" style:font-name-complex="Arial1" style:font-family-complex="Arial" style:font-family-generic-complex="system" style:font-pitch-complex="variable" style:font-size-complex="12pt"/>
    </style:style>
    <style:style style:name="new_20_Car" style:display-name="new Car" style:family="text" style:parent-style-name="Mon_5f_texte_20_Car" loext:linked-style-name="new">
      <style:text-properties style:font-name="Consolas1" fo:font-family="Consolas" style:font-family-generic="swiss" style:font-pitch="variable" fo:font-size="11pt" fo:font-weight="bold" style:font-size-asian="11pt" style:font-weight-asian="bold" style:font-name-complex="Arial1" style:font-family-complex="Arial"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style style:name="Objet_20_du_20_commentaire_20_Car" style:display-name="Objet du commentaire Car" style:family="text" style:parent-style-name="Commentaire_20_Car" loext:linked-style-name="annotation_20_subject">
      <style:text-properties fo:font-weight="bold" style:font-weight-asian="bold" style:font-weight-complex="bold"/>
    </style:style>
    <style:style style:name="mon_5f_parag_5f_2_20_Car" style:display-name="mon_parag_2 Car" style:family="text" style:parent-style-name="Default_20_Paragraph_20_Font" loext:linked-style-name="mon_5f_parag_5f_2">
      <style:text-properties style:font-name="Courier New" fo:font-family="'Courier New'" style:font-family-generic="roman" style:font-pitch="variable" fo:font-size="12pt" style:font-size-asian="12pt" style:font-name-complex="Courier New1" style:font-family-complex="'Courier New'" style:font-family-generic-complex="system" style:font-pitch-complex="variable" style:font-size-complex="12pt"/>
    </style:style>
    <style:style style:name="Réponse_20_Car" style:display-name="Réponse Car" style:family="text" style:parent-style-name="mon_5f_parag_5f_2_20_Car" loext:linked-style-name="Réponse">
      <style:text-properties style:font-name="Consolas" fo:font-family="Consolas" style:font-family-generic="roman" style:font-pitch="variable" fo:font-size="12pt" style:font-size-asian="12pt" style:font-name-complex="Courier New1" style:font-family-complex="'Courier New'" style:font-family-generic-complex="system" style:font-pitch-complex="variable" style:font-size-complex="12pt"/>
    </style:style>
    <style:style style:name="hgkelc"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text-properties style:font-name="Times New Roman" fo:font-family="'Times New Roman'"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Times New Roman" fo:font-family="'Times New Roman'"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Times New Roman" fo:font-family="'Times New Roman'"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Times New Roman" fo:font-family="'Times New Roman'"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Times New Roman" fo:font-family="'Times New Roman'"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Times New Roman" fo:font-family="'Times New Roman'"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Times New Roman" fo:font-family="'Times New Roman'"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Times New Roman" fo:font-family="'Times New Roman'"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Times New Roman" fo:font-family="'Times New Roman'" style:font-family-generic="roman" style:font-pitch="variable"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Times New Roman" fo:font-family="'Times New Roman'"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Times New Roman" fo:font-family="'Times New Roman'"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Times New Roman" fo:font-family="'Times New Roman'" style:font-family-generic="roman" style:font-pitch="variable"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Times New Roman" fo:font-family="'Times New Roman'" style:font-family-generic="roman" style:font-pitch="variable"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Times New Roman" fo:font-family="'Times New Roman'" style:font-family-generic="roman" style:font-pitch="variable"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style:font-name="Times New Roman" fo:font-family="'Times New Roman'" style:font-family-generic="roman" style:font-pitch="variable"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style:font-name="Times New Roman" fo:font-family="'Times New Roman'" style:font-family-generic="roman" style:font-pitch="variable"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style:font-name="Times New Roman" fo:font-family="'Times New Roman'" style:font-family-generic="roman" style:font-pitch="variable"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style:font-name="Times New Roman" fo:font-family="'Times New Roman'" style:font-family-generic="roman" style:font-pitch="variable"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style:font-name="Times New Roman" fo:font-family="'Times New Roman'" style:font-family-generic="roman" style:font-pitch="variable"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style:font-name="Times New Roman" fo:font-family="'Times New Roman'" style:font-family-generic="roman" style:font-pitch="variable"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style:font-name="Times New Roman" fo:font-family="'Times New Roman'" style:font-family-generic="roman" style:font-pitch="variable"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style:font-name="Times New Roman" fo:font-family="'Times New Roman'" style:font-family-generic="roman" style:font-pitch="variable"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style:font-name="Times New Roman" fo:font-family="'Times New Roman'" style:font-family-generic="roman" style:font-pitch="variable"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ListLabel_20_10" loext:num-list-format="%1% -" style:num-suffix=" -" style:num-format="1">
        <style:list-level-properties text:list-level-position-and-space-mode="label-alignment">
          <style:list-level-label-alignment text:label-followed-by="space" fo:text-indent="-0.762cm" fo:margin-left="0.974cm"/>
        </style:list-level-properties>
      </text:outline-level-style>
      <text:outline-level-style text:level="2" text:style-name="ListLabel_20_11" loext:num-list-format="%1%.%2% -" style:num-suffix=" -" style:num-format="1" text:display-levels="2">
        <style:list-level-properties text:list-level-position-and-space-mode="label-alignment">
          <style:list-level-label-alignment text:label-followed-by="space" fo:text-indent="-1.016cm" fo:margin-left="6.768cm"/>
        </style:list-level-properties>
      </text:outline-level-style>
      <text:outline-level-style text:level="3" text:style-name="ListLabel_20_12" loext:num-list-format="%1%.%2%.%3%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ListLabel_20_13" loext:num-list-format="%1%.%2%.%3%.%4%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ListLabel_20_14" loext:num-list-format="%1%.%2%.%3%.%4%.%5%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ListLabel_20_15"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16"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17"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18"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Wingdings" style:font-style-name="Normal"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3.154cm"/>
        </style:list-level-properties>
        <style:text-properties fo:font-family="Wingdings" style:font-style-name="Normal"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margin-right="0.635cm"/>
    </style:style>
    <style:style style:name="MP3" style:family="paragraph" style:parent-style-name="Header">
      <style:paragraph-properties fo:text-align="start" style:justify-single-word="false" fo:padding-left="0cm" fo:padding-right="0cm" fo:padding-top="0cm" fo:padding-bottom="0.035cm" fo:border-left="none" fo:border-right="none" fo:border-top="none" fo:border-bottom="0.51pt solid #000000"/>
    </style:style>
    <style:style style:name="MP4" style:family="paragraph" style:parent-style-name="Footer">
      <style:paragraph-properties fo:margin-right="0.016cm" fo:padding="0cm" fo:border-left="none" fo:border-right="none" fo:border-top="0.51pt solid #000000" fo:border-bottom="none"/>
    </style:style>
    <style:style style:name="MT1" style:family="text">
      <style:text-properties fo:font-size="10pt" fo:font-style="italic" style:font-size-asian="10pt" style:font-style-asian="italic"/>
    </style:style>
    <style:style style:name="MT2" style:family="text">
      <style:text-properties fo:font-size="10pt" style:font-size-asian="10pt"/>
    </style:style>
    <style:page-layout style:name="Mpm1">
      <style:page-layout-properties fo:page-width="21.001cm" fo:page-height="29.7cm" style:num-format="1" style:print-orientation="portrait" fo:margin-top="1cm" fo:margin-bottom="2cm" fo:margin-left="3cm" fo:margin-right="2cm" style:writing-mode="lr-tb" style:layout-grid-color="#c0c0c0" style:layout-grid-lines="2619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cm" fo:margin-bottom="1.499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Header"/>
      </style:header-first>
      <style:footer>
        <text:p text:style-name="MP2"/>
      </style:footer>
      <style:footer-first>
        <text:p text:style-name="Footer"/>
      </style:footer-first>
    </style:master-page>
    <style:master-page style:name="Converted1" style:page-layout-name="Mpm2" draw:style-name="Mdp1">
      <style:header>
        <text:p text:style-name="MP3" loext:marker-style-name="MT1"><text:span text:style-name="MT1">SAé23 - </text:span><text:bookmark-start text:name="_Hlk95668678"/><text:span text:style-name="MT1">Mettre en place une solution informatique pour l’entreprise (v.25)</text:span><text:bookmark-end text:name="_Hlk95668678"/><text:span text:style-name="MT1"><text:tab/>R&amp;T BUT1 <text:s text:c="38"/></text:span><text:span text:style-name="MT1"/></text:p>
        <text:p text:style-name="Header"/>
      </style:header>
      <style:footer>
        <text:p text:style-name="MP4" loext:marker-style-name="MT2"><text:span text:style-name="MT1">IUT Blagnac – Département Réseaux et Télécoms <text:s text:c="8"/><text:tab/> </text:span><text:span text:style-name="MT2"><text:tab/>- </text:span><text:span text:style-name="MT2"><text:page-number text:select-page="current">44</text:page-number></text:span><text:span text:style-name="MT2"><text:s/>-</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IUT de Blagnac</dc:title>
    <meta:initial-creator>Mansalier</meta:initial-creator>
    <meta:editing-cycles>61</meta:editing-cycles>
    <meta:print-date>2018-04-11T10:28:00</meta:print-date>
    <meta:creation-date>2023-04-23T06:50:00</meta:creation-date>
    <dc:date>2026-05-18T18:07:34.429975200</dc:date>
    <meta:editing-duration>PT11H5M28S</meta:editing-duration>
    <meta:generator>LibreOffice/25.2.7.2$Windows_X86_64 LibreOffice_project/5cbfd1ab6520636bb5f7b99185aa69bd7456825d</meta:generator>
    <meta:document-statistic meta:table-count="0" meta:image-count="18" meta:object-count="0" meta:page-count="50" meta:paragraph-count="1128" meta:word-count="10223" meta:character-count="68940" meta:non-whitespace-character-count="59262"/>
    <meta:user-defined meta:name="AppVersion">16.0000</meta:user-defined>
    <meta:template xlink:type="simple" xlink:actuate="onRequest" xlink:title="Normal.dotm" xlink:href=""/>
  </office:meta>
</office:document-meta>
</file>